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rror by DL and DTL" table:style-name="ta1">
        <table:shapes>
          <draw:frame draw:z-index="0" draw:style-name="gr1" draw:text-style-name="P1" svg:width="18.904cm" svg:height="10.633cm" svg:x="16.303cm" svg:y="1.891cm">
            <draw:object draw:notify-on-update-of-ranges="'Error by DL and DTL'.A23:'Error by DL and DTL'.A23 'Error by DL and DTL'.A24:'Error by DL and DTL'.A28 'Error by DL and DTL'.B23:'Error by DL and DTL'.B23 'Error by DL and DTL'.B24:'Error by DL and DTL'.B28 'Error by DL and DTL'.C23:'Error by DL and DTL'.C23 'Error by DL and DTL'.C24:'Error by DL and DTL'.C28 'Error by DL and DTL'.D23:'Error by DL and DTL'.D23 'Error by DL and DTL'.D24:'Error by DL and DTL'.D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APRO</text:p>
          </table:table-cell>
          <table:table-cell office:value-type="string" calcext:value-type="string">
            <text:p>SPRAX</text:p>
          </table:table-cell>
          <table:table-cell office:value-type="string" calcext:value-type="string">
            <text:p>SPRAX_NEW</text:p>
          </table:table-cell>
          <table:table-cell office:value-type="string" calcext:value-type="string">
            <text:p>MiniNJ</text:p>
          </table:table-cell>
        </table:table-row>
        <table:table-row table:style-name="ro1">
          <table:table-cell office:value-type="string" calcext:value-type="string">
            <text:p>dtl=0.5</text:p>
          </table:table-cell>
          <table:table-cell office:value-type="float" office:value="0.0840909090909091" calcext:value-type="float">
            <text:p>0.0840909090909091</text:p>
          </table:table-cell>
          <table:table-cell office:value-type="float" office:value="0.115909090909091" calcext:value-type="float">
            <text:p>0.115909090909091</text:p>
          </table:table-cell>
          <table:table-cell office:value-type="float" office:value="0.075" calcext:value-type="float">
            <text:p>0.075</text:p>
          </table:table-cell>
          <table:table-cell office:value-type="float" office:value="0.0636363636363636" calcext:value-type="float">
            <text:p>0.0636363636363636</text:p>
          </table:table-cell>
        </table:table-row>
        <table:table-row table:style-name="ro1">
          <table:table-cell office:value-type="string" calcext:value-type="string">
            <text:p>dtl=1</text:p>
          </table:table-cell>
          <table:table-cell office:value-type="float" office:value="0.0772727272727272" calcext:value-type="float">
            <text:p>0.0772727272727272</text:p>
          </table:table-cell>
          <table:table-cell office:value-type="float" office:value="0.122727272727273" calcext:value-type="float">
            <text:p>0.122727272727273</text:p>
          </table:table-cell>
          <table:table-cell office:value-type="float" office:value="0.0886363636363636" calcext:value-type="float">
            <text:p>0.0886363636363636</text:p>
          </table:table-cell>
          <table:table-cell office:value-type="float" office:value="0.0840909090909091" calcext:value-type="float">
            <text:p>0.0840909090909091</text:p>
          </table:table-cell>
        </table:table-row>
        <table:table-row table:style-name="ro1">
          <table:table-cell office:value-type="string" calcext:value-type="string">
            <text:p>dtl=2</text:p>
          </table:table-cell>
          <table:table-cell office:value-type="float" office:value="0.184090909090909" calcext:value-type="float">
            <text:p>0.184090909090909</text:p>
          </table:table-cell>
          <table:table-cell office:value-type="float" office:value="0.193181818181818" calcext:value-type="float">
            <text:p>0.193181818181818</text:p>
          </table:table-cell>
          <table:table-cell office:value-type="float" office:value="0.115909090909091" calcext:value-type="float">
            <text:p>0.115909090909091</text:p>
          </table:table-cell>
          <table:table-cell office:value-type="float" office:value="0.122727272727273" calcext:value-type="float">
            <text:p>0.122727272727273</text:p>
          </table:table-cell>
        </table:table-row>
        <table:table-row table:style-name="ro1">
          <table:table-cell office:value-type="string" calcext:value-type="string">
            <text:p>dtl=3</text:p>
          </table:table-cell>
          <table:table-cell office:value-type="float" office:value="0.277272727272727" calcext:value-type="float">
            <text:p>0.277272727272727</text:p>
          </table:table-cell>
          <table:table-cell office:value-type="float" office:value="0.222727272727273" calcext:value-type="float">
            <text:p>0.222727272727273</text:p>
          </table:table-cell>
          <table:table-cell office:value-type="float" office:value="0.161363636363636" calcext:value-type="float">
            <text:p>0.161363636363636</text:p>
          </table:table-cell>
          <table:table-cell office:value-type="float" office:value="0.175" calcext:value-type="float">
            <text:p>0.175</text:p>
          </table:table-cell>
        </table:table-row>
        <table:table-row table:style-name="ro1">
          <table:table-cell office:value-type="string" calcext:value-type="string">
            <text:p>dtl=5</text:p>
          </table:table-cell>
          <table:table-cell office:value-type="float" office:value="0.434090909090909" calcext:value-type="float">
            <text:p>0.434090909090909</text:p>
          </table:table-cell>
          <table:table-cell office:value-type="float" office:value="0.334090909090909" calcext:value-type="float">
            <text:p>0.334090909090909</text:p>
          </table:table-cell>
          <table:table-cell office:value-type="float" office:value="0.222488038277512" calcext:value-type="float">
            <text:p>0.222488038277512</text:p>
          </table:table-cell>
          <table:table-cell office:value-type="float" office:value="0.272727272727273" calcext:value-type="float">
            <text:p>0.272727272727273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NOTE: data when I optimized hyper-parameter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PRAX_OLD</text:p>
          </table:table-cell>
          <table:table-cell office:value-type="string" calcext:value-type="string">
            <text:p>SPRAX_NEW</text:p>
          </table:table-cell>
          <table:table-cell office:value-type="string" calcext:value-type="string">
            <text:p>MiniNJ</text:p>
          </table:table-cell>
        </table:table-row>
        <table:table-row table:style-name="ro1">
          <table:table-cell table:number-columns-repeated="2"/>
          <table:table-cell office:value-type="float" office:value="0.0877272727272728" calcext:value-type="float">
            <text:p>0.0877272727272728</text:p>
          </table:table-cell>
          <table:table-cell office:value-type="float" office:value="0.0681818181818182" calcext:value-type="float">
            <text:p>0.0681818181818182</text:p>
          </table:table-cell>
          <table:table-cell office:value-type="float" office:value="0.0772727272727272" calcext:value-type="float">
            <text:p>0.0772727272727272</text:p>
          </table:table-cell>
        </table:table-row>
        <table:table-row table:style-name="ro1">
          <table:table-cell table:number-columns-repeated="2"/>
          <table:table-cell office:value-type="float" office:value="0.100454545454546" calcext:value-type="float">
            <text:p>0.100454545454546</text:p>
          </table:table-cell>
          <table:table-cell office:value-type="float" office:value="0.0727272727272727" calcext:value-type="float">
            <text:p>0.0727272727272727</text:p>
          </table:table-cell>
          <table:table-cell office:value-type="float" office:value="0.0568181818181818" calcext:value-type="float">
            <text:p>0.0568181818181818</text:p>
          </table:table-cell>
        </table:table-row>
        <table:table-row table:style-name="ro1">
          <table:table-cell table:number-columns-repeated="2"/>
          <table:table-cell office:value-type="float" office:value="0.111363636363636" calcext:value-type="float">
            <text:p>0.111363636363636</text:p>
          </table:table-cell>
          <table:table-cell office:value-type="float" office:value="0.075" calcext:value-type="float">
            <text:p>0.075</text:p>
          </table:table-cell>
          <table:table-cell office:value-type="float" office:value="0.0704545454545454" calcext:value-type="float">
            <text:p>0.0704545454545454</text:p>
          </table:table-cell>
        </table:table-row>
        <table:table-row table:style-name="ro1">
          <table:table-cell table:number-columns-repeated="2"/>
          <table:table-cell office:value-type="float" office:value="0.146363636363636" calcext:value-type="float">
            <text:p>0.146363636363636</text:p>
          </table:table-cell>
          <table:table-cell office:value-type="float" office:value="0.0954545454545454" calcext:value-type="float">
            <text:p>0.0954545454545454</text:p>
          </table:table-cell>
          <table:table-cell office:value-type="float" office:value="0.0886363636363636" calcext:value-type="float">
            <text:p>0.0886363636363636</text:p>
          </table:table-cell>
        </table:table-row>
        <table:table-row table:style-name="ro1">
          <table:table-cell table:number-columns-repeated="2"/>
          <table:table-cell office:value-type="float" office:value="0.190454545454546" calcext:value-type="float">
            <text:p>0.190454545454546</text:p>
          </table:table-cell>
          <table:table-cell office:value-type="float" office:value="0.11244019138756" calcext:value-type="float">
            <text:p>0.11244019138756</text:p>
          </table:table-cell>
          <table:table-cell office:value-type="float" office:value="0.141148325358852" calcext:value-type="float">
            <text:p>0.141148325358852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APRO</text:p>
          </table:table-cell>
          <table:table-cell office:value-type="string" calcext:value-type="string">
            <text:p>SPRAX</text:p>
          </table:table-cell>
          <table:table-cell office:value-type="string" calcext:value-type="string">
            <text:p>MiniNJ</text:p>
          </table:table-cell>
          <table:table-cell/>
        </table:table-row>
        <table:table-row table:style-name="ro1">
          <table:table-cell office:value-type="string" calcext:value-type="string">
            <text:p>dl=0</text:p>
          </table:table-cell>
          <table:table-cell office:value-type="float" office:value="0.0645454545454546" calcext:value-type="float">
            <text:p>0.0645454545454546</text:p>
          </table:table-cell>
          <table:table-cell office:value-type="float" office:value="0.0690909090909091" calcext:value-type="float">
            <text:p>0.0690909090909091</text:p>
          </table:table-cell>
          <table:table-cell office:value-type="float" office:value="0.0690909090909091" calcext:value-type="float">
            <text:p>0.0690909090909091</text:p>
          </table:table-cell>
          <table:table-cell/>
        </table:table-row>
        <table:table-row table:style-name="ro1">
          <table:table-cell office:value-type="string" calcext:value-type="string">
            <text:p>dl=0.5</text:p>
          </table:table-cell>
          <table:table-cell office:value-type="float" office:value="0.0772727272727273" calcext:value-type="float">
            <text:p>0.0772727272727273</text:p>
          </table:table-cell>
          <table:table-cell office:value-type="float" office:value="0.0813636363636364" calcext:value-type="float">
            <text:p>0.0813636363636364</text:p>
          </table:table-cell>
          <table:table-cell office:value-type="float" office:value="0.0740909090909091" calcext:value-type="float">
            <text:p>0.0740909090909091</text:p>
          </table:table-cell>
          <table:table-cell/>
        </table:table-row>
        <table:table-row table:style-name="ro1">
          <table:table-cell office:value-type="string" calcext:value-type="string">
            <text:p>dl=1</text:p>
          </table:table-cell>
          <table:table-cell office:value-type="float" office:value="0.0913636363636364" calcext:value-type="float">
            <text:p>0.0913636363636364</text:p>
          </table:table-cell>
          <table:table-cell office:value-type="float" office:value="0.0868181818181819" calcext:value-type="float">
            <text:p>0.0868181818181819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string" calcext:value-type="string">
            <text:p>dl=2</text:p>
          </table:table-cell>
          <table:table-cell office:value-type="float" office:value="0.122272727272727" calcext:value-type="float">
            <text:p>0.122272727272727</text:p>
          </table:table-cell>
          <table:table-cell office:value-type="float" office:value="0.101363636363636" calcext:value-type="float">
            <text:p>0.101363636363636</text:p>
          </table:table-cell>
          <table:table-cell office:value-type="float" office:value="0.0959090909090909" calcext:value-type="float">
            <text:p>0.0959090909090909</text:p>
          </table:table-cell>
          <table:table-cell/>
        </table:table-row>
        <table:table-row table:style-name="ro1">
          <table:table-cell office:value-type="string" calcext:value-type="string">
            <text:p>dl=5</text:p>
          </table:table-cell>
          <table:table-cell office:value-type="float" office:value="0.19377990430622" calcext:value-type="float">
            <text:p>0.19377990430622</text:p>
          </table:table-cell>
          <table:table-cell office:value-type="float" office:value="0.141528925619835" calcext:value-type="float">
            <text:p>0.141528925619835</text:p>
          </table:table-cell>
          <table:table-cell office:value-type="float" office:value="0.150826446280992" calcext:value-type="float">
            <text:p>0.15082644628099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4T12:36:51.897064574</meta:creation-date>
    <dc:date>2026-03-09T19:14:14.163817500</dc:date>
    <meta:editing-duration>P6DT15H39M47S</meta:editing-duration>
    <meta:editing-cycles>21</meta:editing-cycles>
    <meta:generator>LibreOffice/7.3.7.2$Linux_X86_64 LibreOffice_project/30$Build-2</meta:generator>
    <meta:print-date>2026-03-04T09:35:49.558415360</meta:print-date>
    <meta:document-statistic meta:table-count="1" meta:cell-count="7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905cm" svg:height="10.634cm" xlink:href=".." xlink:type="simple" chart:class="chart:line" chart:style-name="ch1">
        <chart:title svg:x="5.347cm" svg:y="0.348cm" chart:style-name="ch2">
          <text:p>Error by DL rate multiplier (T fixed to x1)</text:p>
        </chart:title>
        <chart:legend chart:legend-position="end" svg:x="16.37cm" svg:y="4.52cm" style:legend-expansion="high" chart:style-name="ch3"/>
        <chart:plot-area chart:style-name="ch4" table:cell-range-address="'Error by DL and DTL'.A23:'Error by DL and DTL'.D28" chart:data-source-has-labels="both" svg:x="0.378cm" svg:y="1.339cm" svg:width="15.614cm" svg:height="9.083cm">
          <chart:coordinate-region svg:x="1.29cm" svg:y="1.538cm" svg:width="14.37cm" svg:height="8.237cm"/>
          <chart:axis chart:dimension="x" chart:name="primary-x" chart:style-name="ch5" chartooo:axis-type="auto">
            <chartooo:date-scale/>
            <chart:categories table:cell-range-address="'Error by DL and DTL'.A24:'Error by DL and DTL'.A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rror by DL and DTL'.B24:'Error by DL and DTL'.B28" chart:label-cell-address="'Error by DL and DTL'.B23:'Error by DL and DTL'.B23" chart:class="chart:line">
            <chart:data-point chart:repeated="5"/>
          </chart:series>
          <chart:series chart:style-name="ch8" chart:values-cell-range-address="'Error by DL and DTL'.C24:'Error by DL and DTL'.C28" chart:label-cell-address="'Error by DL and DTL'.C23:'Error by DL and DTL'.C23" chart:class="chart:line">
            <chart:data-point chart:repeated="5"/>
          </chart:series>
          <chart:series chart:style-name="ch9" chart:values-cell-range-address="'Error by DL and DTL'.D24:'Error by DL and DTL'.D28" chart:label-cell-address="'Error by DL and DTL'.D23:'Error by DL and DTL'.D23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RO</text:p>
                <draw:g>
                  <svg:desc>'Error by DL and DTL'.B23:'Error by DL and DTL'.B23</svg:desc>
                </draw:g>
              </table:table-cell>
              <table:table-cell office:value-type="string">
                <text:p>SPRAX</text:p>
                <draw:g>
                  <svg:desc>'Error by DL and DTL'.C23:'Error by DL and DTL'.C23</svg:desc>
                </draw:g>
              </table:table-cell>
              <table:table-cell office:value-type="string">
                <text:p>MiniNJ</text:p>
                <draw:g>
                  <svg:desc>'Error by DL and DTL'.D23:'Error by DL and DTL'.D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l=0</text:p>
                <draw:g>
                  <svg:desc>'Error by DL and DTL'.A24:'Error by DL and DTL'.A28</svg:desc>
                </draw:g>
              </table:table-cell>
              <table:table-cell office:value-type="float" office:value="0.0645454545454546">
                <text:p>0.0645454545454546</text:p>
                <draw:g>
                  <svg:desc>'Error by DL and DTL'.B24:'Error by DL and DTL'.B28</svg:desc>
                </draw:g>
              </table:table-cell>
              <table:table-cell office:value-type="float" office:value="0.0690909090909091">
                <text:p>0.0690909090909091</text:p>
                <draw:g>
                  <svg:desc>'Error by DL and DTL'.C24:'Error by DL and DTL'.C28</svg:desc>
                </draw:g>
              </table:table-cell>
              <table:table-cell office:value-type="float" office:value="0.0690909090909091">
                <text:p>0.0690909090909091</text:p>
                <draw:g>
                  <svg:desc>'Error by DL and DTL'.D24:'Error by DL and DTL'.D28</svg:desc>
                </draw:g>
              </table:table-cell>
            </table:table-row>
            <table:table-row>
              <table:table-cell office:value-type="string">
                <text:p>dl=0.5</text:p>
              </table:table-cell>
              <table:table-cell office:value-type="float" office:value="0.0772727272727273">
                <text:p>0.0772727272727273</text:p>
              </table:table-cell>
              <table:table-cell office:value-type="float" office:value="0.0813636363636364">
                <text:p>0.0813636363636364</text:p>
              </table:table-cell>
              <table:table-cell office:value-type="float" office:value="0.0740909090909091">
                <text:p>0.0740909090909091</text:p>
              </table:table-cell>
            </table:table-row>
            <table:table-row>
              <table:table-cell office:value-type="string">
                <text:p>dl=1</text:p>
              </table:table-cell>
              <table:table-cell office:value-type="float" office:value="0.0913636363636364">
                <text:p>0.0913636363636364</text:p>
              </table:table-cell>
              <table:table-cell office:value-type="float" office:value="0.0868181818181819">
                <text:p>0.086818181818181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dl=2</text:p>
              </table:table-cell>
              <table:table-cell office:value-type="float" office:value="0.122272727272727">
                <text:p>0.122272727272727</text:p>
              </table:table-cell>
              <table:table-cell office:value-type="float" office:value="0.101363636363636">
                <text:p>0.101363636363636</text:p>
              </table:table-cell>
              <table:table-cell office:value-type="float" office:value="0.0959090909090909">
                <text:p>0.0959090909090909</text:p>
              </table:table-cell>
            </table:table-row>
            <table:table-row>
              <table:table-cell office:value-type="string">
                <text:p>dl=5</text:p>
              </table:table-cell>
              <table:table-cell office:value-type="float" office:value="0.19377990430622">
                <text:p>0.19377990430622</text:p>
              </table:table-cell>
              <table:table-cell office:value-type="float" office:value="0.141528925619835">
                <text:p>0.141528925619835</text:p>
              </table:table-cell>
              <table:table-cell office:value-type="float" office:value="0.150826446280992">
                <text:p>0.1508264462809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