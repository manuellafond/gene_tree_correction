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avg_support" table:style-name="ta1">
        <table:shapes>
          <draw:frame draw:z-index="0" draw:style-name="gr1" draw:text-style-name="P1" svg:width="31.417cm" svg:height="17.736cm" svg:x="9.678cm" svg:y="0.1cm">
            <draw:object draw:notify-on-update-of-ranges="all_avg_support.C1:all_avg_support.C24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52.5454545454546" calcext:value-type="float">
            <text:p>52.5454545454546</text:p>
          </table:table-cell>
          <table:table-cell/>
          <table:table-cell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46.8333333333333" calcext:value-type="float">
            <text:p>46.8333333333333</text:p>
          </table:table-cell>
          <table:table-cell/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4.7272727272727" calcext:value-type="float">
            <text:p>34.7272727272727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3.3461538461538" calcext:value-type="float">
            <text:p>53.3461538461538</text:p>
          </table:table-cell>
          <table:table-cell/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9.1428571428571" calcext:value-type="float">
            <text:p>39.1428571428571</text:p>
          </table:table-cell>
          <table:table-cell/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6.2444444444444" calcext:value-type="float">
            <text:p>36.2444444444444</text:p>
          </table:table-cell>
          <table:table-cell/>
          <table:table-cell office:value-type="float" office:value="4.84615384615385" calcext:value-type="float">
            <text:p>4.84615384615385</text:p>
          </table:table-cell>
        </table:table-row>
        <table:table-row table:style-name="ro1">
          <table:table-cell office:value-type="float" office:value="9.86363636363636" calcext:value-type="float">
            <text:p>9.86363636363636</text:p>
          </table:table-cell>
          <table:table-cell/>
          <table:table-cell office:value-type="float" office:value="5.10204081632653" calcext:value-type="float">
            <text:p>5.10204081632653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/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9.0571428571429" calcext:value-type="float">
            <text:p>39.0571428571429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.05882352941176" calcext:value-type="float">
            <text:p>6.05882352941176</text:p>
          </table:table-cell>
        </table:table-row>
        <table:table-row table:style-name="ro1">
          <table:table-cell office:value-type="float" office:value="50.7692307692308" calcext:value-type="float">
            <text:p>50.7692307692308</text:p>
          </table:table-cell>
          <table:table-cell/>
          <table:table-cell office:value-type="float" office:value="6.79047619047619" calcext:value-type="float">
            <text:p>6.790476190476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.5416666666667" calcext:value-type="float">
            <text:p>56.5416666666667</text:p>
          </table:table-cell>
          <table:table-cell/>
          <table:table-cell office:value-type="float" office:value="9.54237288135593" calcext:value-type="float">
            <text:p>9.54237288135593</text:p>
          </table:table-cell>
        </table:table-row>
        <table:table-row table:style-name="ro1">
          <table:table-cell office:value-type="float" office:value="46.46875" calcext:value-type="float">
            <text:p>46.46875</text:p>
          </table:table-cell>
          <table:table-cell/>
          <table:table-cell office:value-type="float" office:value="9.86363636363636" calcext:value-type="float">
            <text:p>9.86363636363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9.1481481481481" calcext:value-type="float">
            <text:p>29.1481481481481</text:p>
          </table:table-cell>
          <table:table-cell/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/>
          <table:table-cell office:value-type="float" office:value="12.2647058823529" calcext:value-type="float">
            <text:p>12.2647058823529</text:p>
          </table:table-cell>
        </table:table-row>
        <table:table-row table:style-name="ro1">
          <table:table-cell office:value-type="float" office:value="39.2142857142857" calcext:value-type="float">
            <text:p>39.2142857142857</text:p>
          </table:table-cell>
          <table:table-cell/>
          <table:table-cell office:value-type="float" office:value="12.3170731707317" calcext:value-type="float">
            <text:p>12.317073170731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/>
          <table:table-cell office:value-type="float" office:value="12.7793103448276" calcext:value-type="float">
            <text:p>12.7793103448276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/>
          <table:table-cell office:value-type="float" office:value="12.8205128205128" calcext:value-type="float">
            <text:p>12.82051282051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2.8571428571429" calcext:value-type="float">
            <text:p>12.8571428571429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/>
          <table:table-cell office:value-type="float" office:value="13.1379310344828" calcext:value-type="float">
            <text:p>13.1379310344828</text:p>
          </table:table-cell>
        </table:table-row>
        <table:table-row table:style-name="ro1">
          <table:table-cell office:value-type="float" office:value="50.9090909090909" calcext:value-type="float">
            <text:p>50.9090909090909</text:p>
          </table:table-cell>
          <table:table-cell/>
          <table:table-cell office:value-type="float" office:value="13.4318181818182" calcext:value-type="float">
            <text:p>13.4318181818182</text:p>
          </table:table-cell>
        </table:table-row>
        <table:table-row table:style-name="ro1">
          <table:table-cell office:value-type="float" office:value="42.2162162162162" calcext:value-type="float">
            <text:p>42.2162162162162</text:p>
          </table:table-cell>
          <table:table-cell/>
          <table:table-cell office:value-type="float" office:value="13.7777777777778" calcext:value-type="float">
            <text:p>13.7777777777778</text:p>
          </table:table-cell>
        </table:table-row>
        <table:table-row table:style-name="ro1">
          <table:table-cell office:value-type="float" office:value="55.2272727272727" calcext:value-type="float">
            <text:p>55.2272727272727</text:p>
          </table:table-cell>
          <table:table-cell/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60.9117647058824" calcext:value-type="float">
            <text:p>60.911764705882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.1481481481481" calcext:value-type="float">
            <text:p>30.1481481481481</text:p>
          </table:table-cell>
          <table:table-cell/>
          <table:table-cell office:value-type="float" office:value="14.0392156862745" calcext:value-type="float">
            <text:p>14.039215686274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/>
          <table:table-cell office:value-type="float" office:value="14.4142857142857" calcext:value-type="float">
            <text:p>14.4142857142857</text:p>
          </table:table-cell>
        </table:table-row>
        <table:table-row table:style-name="ro1">
          <table:table-cell office:value-type="float" office:value="40.2222222222222" calcext:value-type="float">
            <text:p>40.2222222222222</text:p>
          </table:table-cell>
          <table:table-cell/>
          <table:table-cell office:value-type="float" office:value="14.6976744186047" calcext:value-type="float">
            <text:p>14.69767441860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4.7014925373134" calcext:value-type="float">
            <text:p>14.70149253731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4.7777777777778" calcext:value-type="float">
            <text:p>14.7777777777778</text:p>
          </table:table-cell>
        </table:table-row>
        <table:table-row table:style-name="ro1">
          <table:table-cell office:value-type="float" office:value="39.4444444444444" calcext:value-type="float">
            <text:p>39.4444444444444</text:p>
          </table:table-cell>
          <table:table-cell/>
          <table:table-cell office:value-type="float" office:value="14.7886178861789" calcext:value-type="float">
            <text:p>14.7886178861789</text:p>
          </table:table-cell>
        </table:table-row>
        <table:table-row table:style-name="ro1">
          <table:table-cell office:value-type="float" office:value="50.734375" calcext:value-type="float">
            <text:p>50.734375</text:p>
          </table:table-cell>
          <table:table-cell/>
          <table:table-cell office:value-type="float" office:value="15.1379310344828" calcext:value-type="float">
            <text:p>15.1379310344828</text:p>
          </table:table-cell>
        </table:table-row>
        <table:table-row table:style-name="ro1">
          <table:table-cell office:value-type="float" office:value="69.9166666666667" calcext:value-type="float">
            <text:p>69.9166666666667</text:p>
          </table:table-cell>
          <table:table-cell/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40.1818181818182" calcext:value-type="float">
            <text:p>40.1818181818182</text:p>
          </table:table-cell>
          <table:table-cell/>
          <table:table-cell office:value-type="float" office:value="15.3333333333333" calcext:value-type="float">
            <text:p>15.3333333333333</text:p>
          </table:table-cell>
        </table:table-row>
        <table:table-row table:style-name="ro1">
          <table:table-cell office:value-type="float" office:value="34.3333333333333" calcext:value-type="float">
            <text:p>34.3333333333333</text:p>
          </table:table-cell>
          <table:table-cell/>
          <table:table-cell office:value-type="float" office:value="15.3333333333333" calcext:value-type="float">
            <text:p>15.3333333333333</text:p>
          </table:table-cell>
        </table:table-row>
        <table:table-row table:style-name="ro1">
          <table:table-cell office:value-type="float" office:value="34.1621621621622" calcext:value-type="float">
            <text:p>34.1621621621622</text:p>
          </table:table-cell>
          <table:table-cell/>
          <table:table-cell office:value-type="float" office:value="15.5909090909091" calcext:value-type="float">
            <text:p>15.5909090909091</text:p>
          </table:table-cell>
        </table:table-row>
        <table:table-row table:style-name="ro1">
          <table:table-cell office:value-type="float" office:value="44.7307692307692" calcext:value-type="float">
            <text:p>44.7307692307692</text:p>
          </table:table-cell>
          <table:table-cell/>
          <table:table-cell office:value-type="float" office:value="15.8695652173913" calcext:value-type="float">
            <text:p>15.8695652173913</text:p>
          </table:table-cell>
        </table:table-row>
        <table:table-row table:style-name="ro1">
          <table:table-cell office:value-type="float" office:value="43.5531914893617" calcext:value-type="float">
            <text:p>43.5531914893617</text:p>
          </table:table-cell>
          <table:table-cell/>
          <table:table-cell office:value-type="float" office:value="15.9230769230769" calcext:value-type="float">
            <text:p>15.9230769230769</text:p>
          </table:table-cell>
        </table:table-row>
        <table:table-row table:style-name="ro1">
          <table:table-cell office:value-type="float" office:value="47.1578947368421" calcext:value-type="float">
            <text:p>47.157894736842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.0983606557377" calcext:value-type="float">
            <text:p>42.0983606557377</text:p>
          </table:table-cell>
          <table:table-cell/>
          <table:table-cell office:value-type="float" office:value="16.0677966101695" calcext:value-type="float">
            <text:p>16.0677966101695</text:p>
          </table:table-cell>
        </table:table-row>
        <table:table-row table:style-name="ro1">
          <table:table-cell office:value-type="float" office:value="14.7886178861789" calcext:value-type="float">
            <text:p>14.7886178861789</text:p>
          </table:table-cell>
          <table:table-cell/>
          <table:table-cell office:value-type="float" office:value="16.2258064516129" calcext:value-type="float">
            <text:p>16.2258064516129</text:p>
          </table:table-cell>
        </table:table-row>
        <table:table-row table:style-name="ro1">
          <table:table-cell office:value-type="float" office:value="24.1739130434783" calcext:value-type="float">
            <text:p>24.1739130434783</text:p>
          </table:table-cell>
          <table:table-cell/>
          <table:table-cell office:value-type="float" office:value="16.2941176470588" calcext:value-type="float">
            <text:p>16.2941176470588</text:p>
          </table:table-cell>
        </table:table-row>
        <table:table-row table:style-name="ro1">
          <table:table-cell office:value-type="float" office:value="53.2537313432836" calcext:value-type="float">
            <text:p>53.2537313432836</text:p>
          </table:table-cell>
          <table:table-cell/>
          <table:table-cell office:value-type="float" office:value="16.6428571428571" calcext:value-type="float">
            <text:p>16.6428571428571</text:p>
          </table:table-cell>
        </table:table-row>
        <table:table-row table:style-name="ro1">
          <table:table-cell office:value-type="float" office:value="37.2727272727273" calcext:value-type="float">
            <text:p>37.2727272727273</text:p>
          </table:table-cell>
          <table:table-cell/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32.6585365853659" calcext:value-type="float">
            <text:p>32.6585365853659</text:p>
          </table:table-cell>
          <table:table-cell/>
          <table:table-cell office:value-type="float" office:value="16.9473684210526" calcext:value-type="float">
            <text:p>16.947368421052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/>
          <table:table-cell office:value-type="float" office:value="17.2571428571429" calcext:value-type="float">
            <text:p>17.2571428571429</text:p>
          </table:table-cell>
        </table:table-row>
        <table:table-row table:style-name="ro1">
          <table:table-cell office:value-type="float" office:value="15.9230769230769" calcext:value-type="float">
            <text:p>15.9230769230769</text:p>
          </table:table-cell>
          <table:table-cell/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49.05" calcext:value-type="float">
            <text:p>49.05</text:p>
          </table:table-cell>
          <table:table-cell/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/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46.35" calcext:value-type="float">
            <text:p>46.35</text:p>
          </table:table-cell>
          <table:table-cell/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74.8333333333333" calcext:value-type="float">
            <text:p>74.8333333333333</text:p>
          </table:table-cell>
          <table:table-cell/>
          <table:table-cell office:value-type="float" office:value="18.3478260869565" calcext:value-type="float">
            <text:p>18.3478260869565</text:p>
          </table:table-cell>
        </table:table-row>
        <table:table-row table:style-name="ro1">
          <table:table-cell office:value-type="float" office:value="30.6153846153846" calcext:value-type="float">
            <text:p>30.6153846153846</text:p>
          </table:table-cell>
          <table:table-cell/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47.4230769230769" calcext:value-type="float">
            <text:p>47.4230769230769</text:p>
          </table:table-cell>
          <table:table-cell/>
          <table:table-cell office:value-type="float" office:value="18.6896551724138" calcext:value-type="float">
            <text:p>18.6896551724138</text:p>
          </table:table-cell>
        </table:table-row>
        <table:table-row table:style-name="ro1">
          <table:table-cell office:value-type="float" office:value="51.7441860465116" calcext:value-type="float">
            <text:p>51.7441860465116</text:p>
          </table:table-cell>
          <table:table-cell/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/>
          <table:table-cell office:value-type="float" office:value="19.9261744966443" calcext:value-type="float">
            <text:p>19.92617449664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9.9545454545455" calcext:value-type="float">
            <text:p>19.954545454545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/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.3181818181818" calcext:value-type="float">
            <text:p>20.3181818181818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/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49.2142857142857" calcext:value-type="float">
            <text:p>49.2142857142857</text:p>
          </table:table-cell>
          <table:table-cell/>
          <table:table-cell office:value-type="float" office:value="20.4761904761905" calcext:value-type="float">
            <text:p>20.4761904761905</text:p>
          </table:table-cell>
        </table:table-row>
        <table:table-row table:style-name="ro1">
          <table:table-cell office:value-type="float" office:value="47.8636363636364" calcext:value-type="float">
            <text:p>47.8636363636364</text:p>
          </table:table-cell>
          <table:table-cell/>
          <table:table-cell office:value-type="float" office:value="20.5084745762712" calcext:value-type="float">
            <text:p>20.5084745762712</text:p>
          </table:table-cell>
        </table:table-row>
        <table:table-row table:style-name="ro1">
          <table:table-cell office:value-type="float" office:value="60.1764705882353" calcext:value-type="float">
            <text:p>60.1764705882353</text:p>
          </table:table-cell>
          <table:table-cell/>
          <table:table-cell office:value-type="float" office:value="20.5428571428571" calcext:value-type="float">
            <text:p>20.5428571428571</text:p>
          </table:table-cell>
        </table:table-row>
        <table:table-row table:style-name="ro1">
          <table:table-cell office:value-type="float" office:value="49.9166666666667" calcext:value-type="float">
            <text:p>49.9166666666667</text:p>
          </table:table-cell>
          <table:table-cell/>
          <table:table-cell office:value-type="float" office:value="20.7777777777778" calcext:value-type="float">
            <text:p>20.7777777777778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/>
          <table:table-cell office:value-type="float" office:value="20.9634146341463" calcext:value-type="float">
            <text:p>20.963414634146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/>
          <table:table-cell office:value-type="float" office:value="21.1041666666667" calcext:value-type="float">
            <text:p>21.1041666666667</text:p>
          </table:table-cell>
        </table:table-row>
        <table:table-row table:style-name="ro1">
          <table:table-cell office:value-type="float" office:value="51.4651162790698" calcext:value-type="float">
            <text:p>51.4651162790698</text:p>
          </table:table-cell>
          <table:table-cell/>
          <table:table-cell office:value-type="float" office:value="21.2222222222222" calcext:value-type="float">
            <text:p>21.2222222222222</text:p>
          </table:table-cell>
        </table:table-row>
        <table:table-row table:style-name="ro1">
          <table:table-cell office:value-type="float" office:value="64.1428571428571" calcext:value-type="float">
            <text:p>64.1428571428571</text:p>
          </table:table-cell>
          <table:table-cell/>
          <table:table-cell office:value-type="float" office:value="21.2352941176471" calcext:value-type="float">
            <text:p>21.2352941176471</text:p>
          </table:table-cell>
        </table:table-row>
        <table:table-row table:style-name="ro1">
          <table:table-cell office:value-type="float" office:value="49.7727272727273" calcext:value-type="float">
            <text:p>49.7727272727273</text:p>
          </table:table-cell>
          <table:table-cell/>
          <table:table-cell office:value-type="float" office:value="21.3962962962963" calcext:value-type="float">
            <text:p>21.3962962962963</text:p>
          </table:table-cell>
        </table:table-row>
        <table:table-row table:style-name="ro1">
          <table:table-cell office:value-type="float" office:value="54.1428571428571" calcext:value-type="float">
            <text:p>54.1428571428571</text:p>
          </table:table-cell>
          <table:table-cell/>
          <table:table-cell office:value-type="float" office:value="21.4444444444444" calcext:value-type="float">
            <text:p>21.4444444444444</text:p>
          </table:table-cell>
        </table:table-row>
        <table:table-row table:style-name="ro1">
          <table:table-cell office:value-type="float" office:value="50.0714285714286" calcext:value-type="float">
            <text:p>50.0714285714286</text:p>
          </table:table-cell>
          <table:table-cell/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2.8813559322034" calcext:value-type="float">
            <text:p>22.8813559322034</text:p>
          </table:table-cell>
          <table:table-cell/>
          <table:table-cell office:value-type="float" office:value="21.6428571428571" calcext:value-type="float">
            <text:p>21.6428571428571</text:p>
          </table:table-cell>
        </table:table-row>
        <table:table-row table:style-name="ro1">
          <table:table-cell office:value-type="float" office:value="52.2857142857143" calcext:value-type="float">
            <text:p>52.2857142857143</text:p>
          </table:table-cell>
          <table:table-cell/>
          <table:table-cell office:value-type="float" office:value="21.6666666666667" calcext:value-type="float">
            <text:p>21.6666666666667</text:p>
          </table:table-cell>
        </table:table-row>
        <table:table-row table:style-name="ro1">
          <table:table-cell office:value-type="float" office:value="48.8085106382979" calcext:value-type="float">
            <text:p>48.8085106382979</text:p>
          </table:table-cell>
          <table:table-cell/>
          <table:table-cell office:value-type="float" office:value="21.7878787878788" calcext:value-type="float">
            <text:p>21.7878787878788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/>
          <table:table-cell office:value-type="float" office:value="21.825" calcext:value-type="float">
            <text:p>21.825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/>
          <table:table-cell office:value-type="float" office:value="21.940119760479" calcext:value-type="float">
            <text:p>21.940119760479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/>
          <table:table-cell office:value-type="float" office:value="21.9473684210526" calcext:value-type="float">
            <text:p>21.9473684210526</text:p>
          </table:table-cell>
        </table:table-row>
        <table:table-row table:style-name="ro1">
          <table:table-cell office:value-type="float" office:value="42.4615384615385" calcext:value-type="float">
            <text:p>42.4615384615385</text:p>
          </table:table-cell>
          <table:table-cell/>
          <table:table-cell office:value-type="float" office:value="22.2777777777778" calcext:value-type="float">
            <text:p>22.2777777777778</text:p>
          </table:table-cell>
        </table:table-row>
        <table:table-row table:style-name="ro1">
          <table:table-cell office:value-type="float" office:value="13.7777777777778" calcext:value-type="float">
            <text:p>13.7777777777778</text:p>
          </table:table-cell>
          <table:table-cell/>
          <table:table-cell office:value-type="float" office:value="22.2857142857143" calcext:value-type="float">
            <text:p>22.2857142857143</text:p>
          </table:table-cell>
        </table:table-row>
        <table:table-row table:style-name="ro1">
          <table:table-cell office:value-type="float" office:value="58.1842105263158" calcext:value-type="float">
            <text:p>58.1842105263158</text:p>
          </table:table-cell>
          <table:table-cell/>
          <table:table-cell office:value-type="float" office:value="22.3617021276596" calcext:value-type="float">
            <text:p>22.3617021276596</text:p>
          </table:table-cell>
        </table:table-row>
        <table:table-row table:style-name="ro1">
          <table:table-cell office:value-type="float" office:value="57.2040816326531" calcext:value-type="float">
            <text:p>57.2040816326531</text:p>
          </table:table-cell>
          <table:table-cell/>
          <table:table-cell office:value-type="float" office:value="22.7586206896552" calcext:value-type="float">
            <text:p>22.7586206896552</text:p>
          </table:table-cell>
        </table:table-row>
        <table:table-row table:style-name="ro1">
          <table:table-cell office:value-type="float" office:value="21.2222222222222" calcext:value-type="float">
            <text:p>21.2222222222222</text:p>
          </table:table-cell>
          <table:table-cell/>
          <table:table-cell office:value-type="float" office:value="22.8684210526316" calcext:value-type="float">
            <text:p>22.8684210526316</text:p>
          </table:table-cell>
        </table:table-row>
        <table:table-row table:style-name="ro1">
          <table:table-cell office:value-type="float" office:value="47.4285714285714" calcext:value-type="float">
            <text:p>47.4285714285714</text:p>
          </table:table-cell>
          <table:table-cell/>
          <table:table-cell office:value-type="float" office:value="22.8813559322034" calcext:value-type="float">
            <text:p>22.8813559322034</text:p>
          </table:table-cell>
        </table:table-row>
        <table:table-row table:style-name="ro1">
          <table:table-cell office:value-type="float" office:value="56.2105263157895" calcext:value-type="float">
            <text:p>56.210526315789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.2258064516129" calcext:value-type="float">
            <text:p>57.225806451612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.6666666666667" calcext:value-type="float">
            <text:p>47.6666666666667</text:p>
          </table:table-cell>
          <table:table-cell/>
          <table:table-cell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float" office:value="60.1951219512195" calcext:value-type="float">
            <text:p>60.1951219512195</text:p>
          </table:table-cell>
          <table:table-cell/>
          <table:table-cell office:value-type="float" office:value="23.4117647058823" calcext:value-type="float">
            <text:p>23.4117647058823</text:p>
          </table:table-cell>
        </table:table-row>
        <table:table-row table:style-name="ro1">
          <table:table-cell office:value-type="float" office:value="41.0666666666667" calcext:value-type="float">
            <text:p>41.0666666666667</text:p>
          </table:table-cell>
          <table:table-cell/>
          <table:table-cell office:value-type="float" office:value="23.4827586206897" calcext:value-type="float">
            <text:p>23.4827586206897</text:p>
          </table:table-cell>
        </table:table-row>
        <table:table-row table:style-name="ro1">
          <table:table-cell office:value-type="float" office:value="53.3666666666667" calcext:value-type="float">
            <text:p>53.3666666666667</text:p>
          </table:table-cell>
          <table:table-cell/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5.3333333333333" calcext:value-type="float">
            <text:p>35.3333333333333</text:p>
          </table:table-cell>
          <table:table-cell/>
          <table:table-cell office:value-type="float" office:value="23.5405405405405" calcext:value-type="float">
            <text:p>23.5405405405405</text:p>
          </table:table-cell>
        </table:table-row>
        <table:table-row table:style-name="ro1">
          <table:table-cell office:value-type="float" office:value="56.2903225806452" calcext:value-type="float">
            <text:p>56.2903225806452</text:p>
          </table:table-cell>
          <table:table-cell/>
          <table:table-cell office:value-type="float" office:value="23.5714285714286" calcext:value-type="float">
            <text:p>23.5714285714286</text:p>
          </table:table-cell>
        </table:table-row>
        <table:table-row table:style-name="ro1">
          <table:table-cell office:value-type="float" office:value="68.6428571428571" calcext:value-type="float">
            <text:p>68.6428571428571</text:p>
          </table:table-cell>
          <table:table-cell/>
          <table:table-cell office:value-type="float" office:value="23.6666666666667" calcext:value-type="float">
            <text:p>23.6666666666667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/>
          <table:table-cell office:value-type="float" office:value="23.7777777777778" calcext:value-type="float">
            <text:p>23.7777777777778</text:p>
          </table:table-cell>
        </table:table-row>
        <table:table-row table:style-name="ro1">
          <table:table-cell office:value-type="float" office:value="46.8571428571429" calcext:value-type="float">
            <text:p>46.8571428571429</text:p>
          </table:table-cell>
          <table:table-cell/>
          <table:table-cell office:value-type="float" office:value="23.8474576271186" calcext:value-type="float">
            <text:p>23.84745762711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3.8823529411765" calcext:value-type="float">
            <text:p>23.8823529411765</text:p>
          </table:table-cell>
        </table:table-row>
        <table:table-row table:style-name="ro1">
          <table:table-cell office:value-type="float" office:value="64.4347826086957" calcext:value-type="float">
            <text:p>64.4347826086957</text:p>
          </table:table-cell>
          <table:table-cell/>
          <table:table-cell office:value-type="float" office:value="23.9056603773585" calcext:value-type="float">
            <text:p>23.9056603773585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/>
          <table:table-cell office:value-type="float" office:value="23.9166666666667" calcext:value-type="float">
            <text:p>23.9166666666667</text:p>
          </table:table-cell>
        </table:table-row>
        <table:table-row table:style-name="ro1">
          <table:table-cell office:value-type="float" office:value="41.0212765957447" calcext:value-type="float">
            <text:p>41.02127659574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/>
          <table:table-cell office:value-type="float" office:value="24.0384615384615" calcext:value-type="float">
            <text:p>24.0384615384615</text:p>
          </table:table-cell>
        </table:table-row>
        <table:table-row table:style-name="ro1">
          <table:table-cell office:value-type="float" office:value="50.9545454545455" calcext:value-type="float">
            <text:p>50.9545454545455</text:p>
          </table:table-cell>
          <table:table-cell/>
          <table:table-cell office:value-type="float" office:value="24.1025641025641" calcext:value-type="float">
            <text:p>24.1025641025641</text:p>
          </table:table-cell>
        </table:table-row>
        <table:table-row table:style-name="ro1">
          <table:table-cell office:value-type="float" office:value="71.8125" calcext:value-type="float">
            <text:p>71.8125</text:p>
          </table:table-cell>
          <table:table-cell/>
          <table:table-cell office:value-type="float" office:value="24.1739130434783" calcext:value-type="float">
            <text:p>24.17391304347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4.1951219512195" calcext:value-type="float">
            <text:p>24.1951219512195</text:p>
          </table:table-cell>
        </table:table-row>
        <table:table-row table:style-name="ro1">
          <table:table-cell office:value-type="float" office:value="64.9230769230769" calcext:value-type="float">
            <text:p>64.9230769230769</text:p>
          </table:table-cell>
          <table:table-cell/>
          <table:table-cell office:value-type="float" office:value="24.3846153846154" calcext:value-type="float">
            <text:p>24.3846153846154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/>
          <table:table-cell office:value-type="float" office:value="24.3846153846154" calcext:value-type="float">
            <text:p>24.3846153846154</text:p>
          </table:table-cell>
        </table:table-row>
        <table:table-row table:style-name="ro1">
          <table:table-cell office:value-type="float" office:value="73.5555555555556" calcext:value-type="float">
            <text:p>73.5555555555556</text:p>
          </table:table-cell>
          <table:table-cell/>
          <table:table-cell office:value-type="float" office:value="24.6610169491525" calcext:value-type="float">
            <text:p>24.6610169491525</text:p>
          </table:table-cell>
        </table:table-row>
        <table:table-row table:style-name="ro1">
          <table:table-cell office:value-type="float" office:value="55.8333333333333" calcext:value-type="float">
            <text:p>55.8333333333333</text:p>
          </table:table-cell>
          <table:table-cell/>
          <table:table-cell office:value-type="float" office:value="24.7446808510638" calcext:value-type="float">
            <text:p>24.7446808510638</text:p>
          </table:table-cell>
        </table:table-row>
        <table:table-row table:style-name="ro1">
          <table:table-cell office:value-type="float" office:value="63.2666666666667" calcext:value-type="float">
            <text:p>63.2666666666667</text:p>
          </table:table-cell>
          <table:table-cell/>
          <table:table-cell office:value-type="float" office:value="24.8529411764706" calcext:value-type="float">
            <text:p>24.8529411764706</text:p>
          </table:table-cell>
        </table:table-row>
        <table:table-row table:style-name="ro1">
          <table:table-cell office:value-type="float" office:value="36.2857142857143" calcext:value-type="float">
            <text:p>36.2857142857143</text:p>
          </table:table-cell>
          <table:table-cell/>
          <table:table-cell office:value-type="float" office:value="25.125" calcext:value-type="float">
            <text:p>25.125</text:p>
          </table:table-cell>
        </table:table-row>
        <table:table-row table:style-name="ro1">
          <table:table-cell office:value-type="float" office:value="41.6842105263158" calcext:value-type="float">
            <text:p>41.6842105263158</text:p>
          </table:table-cell>
          <table:table-cell/>
          <table:table-cell office:value-type="float" office:value="25.3207547169811" calcext:value-type="float">
            <text:p>25.3207547169811</text:p>
          </table:table-cell>
        </table:table-row>
        <table:table-row table:style-name="ro1">
          <table:table-cell office:value-type="float" office:value="69.75" calcext:value-type="float">
            <text:p>69.75</text:p>
          </table:table-cell>
          <table:table-cell/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48.3023255813954" calcext:value-type="float">
            <text:p>48.3023255813954</text:p>
          </table:table-cell>
          <table:table-cell/>
          <table:table-cell office:value-type="float" office:value="25.5789473684211" calcext:value-type="float">
            <text:p>25.5789473684211</text:p>
          </table:table-cell>
        </table:table-row>
        <table:table-row table:style-name="ro1">
          <table:table-cell office:value-type="float" office:value="51.0769230769231" calcext:value-type="float">
            <text:p>51.0769230769231</text:p>
          </table:table-cell>
          <table:table-cell/>
          <table:table-cell office:value-type="float" office:value="25.6222222222222" calcext:value-type="float">
            <text:p>25.6222222222222</text:p>
          </table:table-cell>
        </table:table-row>
        <table:table-row table:style-name="ro1">
          <table:table-cell office:value-type="float" office:value="38.1714285714286" calcext:value-type="float">
            <text:p>38.1714285714286</text:p>
          </table:table-cell>
          <table:table-cell/>
          <table:table-cell office:value-type="float" office:value="25.6352941176471" calcext:value-type="float">
            <text:p>25.6352941176471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25.6363636363636" calcext:value-type="float">
            <text:p>25.6363636363636</text:p>
          </table:table-cell>
        </table:table-row>
        <table:table-row table:style-name="ro1">
          <table:table-cell office:value-type="float" office:value="83.6666666666667" calcext:value-type="float">
            <text:p>83.6666666666667</text:p>
          </table:table-cell>
          <table:table-cell/>
          <table:table-cell office:value-type="float" office:value="25.6666666666667" calcext:value-type="float">
            <text:p>25.6666666666667</text:p>
          </table:table-cell>
        </table:table-row>
        <table:table-row table:style-name="ro1">
          <table:table-cell office:value-type="float" office:value="55.3333333333333" calcext:value-type="float">
            <text:p>55.3333333333333</text:p>
          </table:table-cell>
          <table:table-cell/>
          <table:table-cell office:value-type="float" office:value="25.6818181818182" calcext:value-type="float">
            <text:p>25.6818181818182</text:p>
          </table:table-cell>
        </table:table-row>
        <table:table-row table:style-name="ro1">
          <table:table-cell office:value-type="float" office:value="55.9090909090909" calcext:value-type="float">
            <text:p>55.9090909090909</text:p>
          </table:table-cell>
          <table:table-cell/>
          <table:table-cell office:value-type="float" office:value="25.8484848484848" calcext:value-type="float">
            <text:p>25.8484848484848</text:p>
          </table:table-cell>
        </table:table-row>
        <table:table-row table:style-name="ro1">
          <table:table-cell office:value-type="float" office:value="46.1702127659575" calcext:value-type="float">
            <text:p>46.1702127659575</text:p>
          </table:table-cell>
          <table:table-cell/>
          <table:table-cell office:value-type="float" office:value="25.8636363636364" calcext:value-type="float">
            <text:p>25.8636363636364</text:p>
          </table:table-cell>
        </table:table-row>
        <table:table-row table:style-name="ro1">
          <table:table-cell office:value-type="float" office:value="46.6363636363636" calcext:value-type="float">
            <text:p>46.6363636363636</text:p>
          </table:table-cell>
          <table:table-cell/>
          <table:table-cell office:value-type="float" office:value="25.8780487804878" calcext:value-type="float">
            <text:p>25.8780487804878</text:p>
          </table:table-cell>
        </table:table-row>
        <table:table-row table:style-name="ro1">
          <table:table-cell office:value-type="float" office:value="46.8571428571429" calcext:value-type="float">
            <text:p>46.8571428571429</text:p>
          </table:table-cell>
          <table:table-cell/>
          <table:table-cell office:value-type="float" office:value="25.8837209302326" calcext:value-type="float">
            <text:p>25.8837209302326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/>
          <table:table-cell office:value-type="float" office:value="25.9130434782609" calcext:value-type="float">
            <text:p>25.9130434782609</text:p>
          </table:table-cell>
        </table:table-row>
        <table:table-row table:style-name="ro1">
          <table:table-cell office:value-type="float" office:value="52.1111111111111" calcext:value-type="float">
            <text:p>52.1111111111111</text:p>
          </table:table-cell>
          <table:table-cell/>
          <table:table-cell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float" office:value="58.1923076923077" calcext:value-type="float">
            <text:p>58.1923076923077</text:p>
          </table:table-cell>
          <table:table-cell/>
          <table:table-cell office:value-type="float" office:value="25.9444444444444" calcext:value-type="float">
            <text:p>25.9444444444444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.0909090909091" calcext:value-type="float">
            <text:p>58.090909090909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.1428571428571" calcext:value-type="float">
            <text:p>47.1428571428571</text:p>
          </table:table-cell>
          <table:table-cell/>
          <table:table-cell office:value-type="float" office:value="26.0721649484536" calcext:value-type="float">
            <text:p>26.0721649484536</text:p>
          </table:table-cell>
        </table:table-row>
        <table:table-row table:style-name="ro1">
          <table:table-cell office:value-type="float" office:value="66.8571428571429" calcext:value-type="float">
            <text:p>66.8571428571429</text:p>
          </table:table-cell>
          <table:table-cell/>
          <table:table-cell office:value-type="float" office:value="26.0909090909091" calcext:value-type="float">
            <text:p>26.0909090909091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/>
          <table:table-cell office:value-type="float" office:value="26.1843971631206" calcext:value-type="float">
            <text:p>26.1843971631206</text:p>
          </table:table-cell>
        </table:table-row>
        <table:table-row table:style-name="ro1">
          <table:table-cell office:value-type="float" office:value="60.3333333333333" calcext:value-type="float">
            <text:p>60.3333333333333</text:p>
          </table:table-cell>
          <table:table-cell/>
          <table:table-cell office:value-type="float" office:value="26.2608695652174" calcext:value-type="float">
            <text:p>26.2608695652174</text:p>
          </table:table-cell>
        </table:table-row>
        <table:table-row table:style-name="ro1">
          <table:table-cell office:value-type="float" office:value="49.2727272727273" calcext:value-type="float">
            <text:p>49.2727272727273</text:p>
          </table:table-cell>
          <table:table-cell/>
          <table:table-cell office:value-type="float" office:value="26.3125" calcext:value-type="float">
            <text:p>26.3125</text:p>
          </table:table-cell>
        </table:table-row>
        <table:table-row table:style-name="ro1">
          <table:table-cell office:value-type="float" office:value="56.8181818181818" calcext:value-type="float">
            <text:p>56.8181818181818</text:p>
          </table:table-cell>
          <table:table-cell/>
          <table:table-cell office:value-type="float" office:value="26.3538461538462" calcext:value-type="float">
            <text:p>26.3538461538462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/>
          <table:table-cell office:value-type="float" office:value="26.4210526315789" calcext:value-type="float">
            <text:p>26.4210526315789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/>
          <table:table-cell office:value-type="float" office:value="26.5103244837758" calcext:value-type="float">
            <text:p>26.51032448377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6.6806722689076" calcext:value-type="float">
            <text:p>26.6806722689076</text:p>
          </table:table-cell>
        </table:table-row>
        <table:table-row table:style-name="ro1">
          <table:table-cell office:value-type="float" office:value="51.2424242424242" calcext:value-type="float">
            <text:p>51.2424242424242</text:p>
          </table:table-cell>
          <table:table-cell/>
          <table:table-cell office:value-type="float" office:value="26.6969696969697" calcext:value-type="float">
            <text:p>26.6969696969697</text:p>
          </table:table-cell>
        </table:table-row>
        <table:table-row table:style-name="ro1">
          <table:table-cell office:value-type="float" office:value="62.4210526315789" calcext:value-type="float">
            <text:p>62.4210526315789</text:p>
          </table:table-cell>
          <table:table-cell/>
          <table:table-cell office:value-type="float" office:value="26.7692307692308" calcext:value-type="float">
            <text:p>26.7692307692308</text:p>
          </table:table-cell>
        </table:table-row>
        <table:table-row table:style-name="ro1">
          <table:table-cell office:value-type="float" office:value="45.3571428571429" calcext:value-type="float">
            <text:p>45.3571428571429</text:p>
          </table:table-cell>
          <table:table-cell/>
          <table:table-cell office:value-type="float" office:value="26.8409090909091" calcext:value-type="float">
            <text:p>26.8409090909091</text:p>
          </table:table-cell>
        </table:table-row>
        <table:table-row table:style-name="ro1">
          <table:table-cell office:value-type="float" office:value="39.6470588235294" calcext:value-type="float">
            <text:p>39.6470588235294</text:p>
          </table:table-cell>
          <table:table-cell/>
          <table:table-cell office:value-type="float" office:value="26.8928571428571" calcext:value-type="float">
            <text:p>26.8928571428571</text:p>
          </table:table-cell>
        </table:table-row>
        <table:table-row table:style-name="ro1">
          <table:table-cell office:value-type="float" office:value="55.4137931034483" calcext:value-type="float">
            <text:p>55.4137931034483</text:p>
          </table:table-cell>
          <table:table-cell/>
          <table:table-cell office:value-type="float" office:value="26.9375" calcext:value-type="float">
            <text:p>26.93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6.9565217391304" calcext:value-type="float">
            <text:p>26.9565217391304</text:p>
          </table:table-cell>
        </table:table-row>
        <table:table-row table:style-name="ro1">
          <table:table-cell office:value-type="float" office:value="66.0909090909091" calcext:value-type="float">
            <text:p>66.090909090909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.5882352941176" calcext:value-type="float">
            <text:p>43.588235294117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.2941176470588" calcext:value-type="float">
            <text:p>68.2941176470588</text:p>
          </table:table-cell>
          <table:table-cell/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65.6666666666667" calcext:value-type="float">
            <text:p>65.6666666666667</text:p>
          </table:table-cell>
          <table:table-cell/>
          <table:table-cell office:value-type="float" office:value="27.1052631578947" calcext:value-type="float">
            <text:p>27.1052631578947</text:p>
          </table:table-cell>
        </table:table-row>
        <table:table-row table:style-name="ro1">
          <table:table-cell office:value-type="float" office:value="59.7692307692308" calcext:value-type="float">
            <text:p>59.7692307692308</text:p>
          </table:table-cell>
          <table:table-cell/>
          <table:table-cell office:value-type="float" office:value="27.152" calcext:value-type="float">
            <text:p>27.152</text:p>
          </table:table-cell>
        </table:table-row>
        <table:table-row table:style-name="ro1">
          <table:table-cell office:value-type="float" office:value="69.2631578947368" calcext:value-type="float">
            <text:p>69.2631578947368</text:p>
          </table:table-cell>
          <table:table-cell/>
          <table:table-cell office:value-type="float" office:value="27.4736842105263" calcext:value-type="float">
            <text:p>27.4736842105263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/>
          <table:table-cell office:value-type="float" office:value="27.5333333333333" calcext:value-type="float">
            <text:p>27.5333333333333</text:p>
          </table:table-cell>
        </table:table-row>
        <table:table-row table:style-name="ro1">
          <table:table-cell office:value-type="float" office:value="44.2727272727273" calcext:value-type="float">
            <text:p>44.2727272727273</text:p>
          </table:table-cell>
          <table:table-cell/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57.2352941176471" calcext:value-type="float">
            <text:p>57.2352941176471</text:p>
          </table:table-cell>
          <table:table-cell/>
          <table:table-cell office:value-type="float" office:value="27.6041666666667" calcext:value-type="float">
            <text:p>27.6041666666667</text:p>
          </table:table-cell>
        </table:table-row>
        <table:table-row table:style-name="ro1">
          <table:table-cell office:value-type="float" office:value="50.6551724137931" calcext:value-type="float">
            <text:p>50.6551724137931</text:p>
          </table:table-cell>
          <table:table-cell/>
          <table:table-cell office:value-type="float" office:value="27.6046511627907" calcext:value-type="float">
            <text:p>27.6046511627907</text:p>
          </table:table-cell>
        </table:table-row>
        <table:table-row table:style-name="ro1">
          <table:table-cell office:value-type="float" office:value="65.6666666666667" calcext:value-type="float">
            <text:p>65.6666666666667</text:p>
          </table:table-cell>
          <table:table-cell/>
          <table:table-cell office:value-type="float" office:value="27.6129032258064" calcext:value-type="float">
            <text:p>27.6129032258064</text:p>
          </table:table-cell>
        </table:table-row>
        <table:table-row table:style-name="ro1">
          <table:table-cell office:value-type="float" office:value="65.8064516129032" calcext:value-type="float">
            <text:p>65.8064516129032</text:p>
          </table:table-cell>
          <table:table-cell/>
          <table:table-cell office:value-type="float" office:value="27.6136363636364" calcext:value-type="float">
            <text:p>27.6136363636364</text:p>
          </table:table-cell>
        </table:table-row>
        <table:table-row table:style-name="ro1">
          <table:table-cell office:value-type="float" office:value="28.9444444444444" calcext:value-type="float">
            <text:p>28.9444444444444</text:p>
          </table:table-cell>
          <table:table-cell/>
          <table:table-cell office:value-type="float" office:value="27.6666666666667" calcext:value-type="float">
            <text:p>27.6666666666667</text:p>
          </table:table-cell>
        </table:table-row>
        <table:table-row table:style-name="ro1">
          <table:table-cell office:value-type="float" office:value="64.3636363636364" calcext:value-type="float">
            <text:p>64.3636363636364</text:p>
          </table:table-cell>
          <table:table-cell/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73.8571428571429" calcext:value-type="float">
            <text:p>73.8571428571429</text:p>
          </table:table-cell>
          <table:table-cell/>
          <table:table-cell office:value-type="float" office:value="27.7368421052632" calcext:value-type="float">
            <text:p>27.7368421052632</text:p>
          </table:table-cell>
        </table:table-row>
        <table:table-row table:style-name="ro1">
          <table:table-cell office:value-type="float" office:value="52.741935483871" calcext:value-type="float">
            <text:p>52.741935483871</text:p>
          </table:table-cell>
          <table:table-cell/>
          <table:table-cell office:value-type="float" office:value="27.7446808510638" calcext:value-type="float">
            <text:p>27.7446808510638</text:p>
          </table:table-cell>
        </table:table-row>
        <table:table-row table:style-name="ro1">
          <table:table-cell office:value-type="float" office:value="59.5333333333333" calcext:value-type="float">
            <text:p>59.5333333333333</text:p>
          </table:table-cell>
          <table:table-cell/>
          <table:table-cell office:value-type="float" office:value="27.7586206896552" calcext:value-type="float">
            <text:p>27.7586206896552</text:p>
          </table:table-cell>
        </table:table-row>
        <table:table-row table:style-name="ro1">
          <table:table-cell office:value-type="float" office:value="57.972972972973" calcext:value-type="float">
            <text:p>57.972972972973</text:p>
          </table:table-cell>
          <table:table-cell/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7.8571428571429" calcext:value-type="float">
            <text:p>27.85714285714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/>
          <table:table-cell office:value-type="float" office:value="27.9016393442623" calcext:value-type="float">
            <text:p>27.90163934426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7.9285714285714" calcext:value-type="float">
            <text:p>27.9285714285714</text:p>
          </table:table-cell>
        </table:table-row>
        <table:table-row table:style-name="ro1">
          <table:table-cell office:value-type="float" office:value="39.1860465116279" calcext:value-type="float">
            <text:p>39.1860465116279</text:p>
          </table:table-cell>
          <table:table-cell/>
          <table:table-cell office:value-type="float" office:value="28.1851851851852" calcext:value-type="float">
            <text:p>28.1851851851852</text:p>
          </table:table-cell>
        </table:table-row>
        <table:table-row table:style-name="ro1">
          <table:table-cell office:value-type="float" office:value="75.3333333333333" calcext:value-type="float">
            <text:p>75.3333333333333</text:p>
          </table:table-cell>
          <table:table-cell/>
          <table:table-cell office:value-type="float" office:value="28.1851851851852" calcext:value-type="float">
            <text:p>28.1851851851852</text:p>
          </table:table-cell>
        </table:table-row>
        <table:table-row table:style-name="ro1">
          <table:table-cell office:value-type="float" office:value="55.2068965517241" calcext:value-type="float">
            <text:p>55.2068965517241</text:p>
          </table:table-cell>
          <table:table-cell/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60.4186046511628" calcext:value-type="float">
            <text:p>60.4186046511628</text:p>
          </table:table-cell>
          <table:table-cell/>
          <table:table-cell office:value-type="float" office:value="28.325" calcext:value-type="float">
            <text:p>28.325</text:p>
          </table:table-cell>
        </table:table-row>
        <table:table-row table:style-name="ro1">
          <table:table-cell office:value-type="float" office:value="76.4545454545455" calcext:value-type="float">
            <text:p>76.4545454545455</text:p>
          </table:table-cell>
          <table:table-cell/>
          <table:table-cell office:value-type="float" office:value="28.4090909090909" calcext:value-type="float">
            <text:p>28.4090909090909</text:p>
          </table:table-cell>
        </table:table-row>
        <table:table-row table:style-name="ro1">
          <table:table-cell office:value-type="float" office:value="33.625" calcext:value-type="float">
            <text:p>33.625</text:p>
          </table:table-cell>
          <table:table-cell/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3.6206896551724" calcext:value-type="float">
            <text:p>43.6206896551724</text:p>
          </table:table-cell>
          <table:table-cell/>
          <table:table-cell office:value-type="float" office:value="28.525" calcext:value-type="float">
            <text:p>28.525</text:p>
          </table:table-cell>
        </table:table-row>
        <table:table-row table:style-name="ro1">
          <table:table-cell office:value-type="float" office:value="35.5245901639344" calcext:value-type="float">
            <text:p>35.5245901639344</text:p>
          </table:table-cell>
          <table:table-cell/>
          <table:table-cell office:value-type="float" office:value="28.5405405405405" calcext:value-type="float">
            <text:p>28.5405405405405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/>
          <table:table-cell office:value-type="float" office:value="28.5592105263158" calcext:value-type="float">
            <text:p>28.5592105263158</text:p>
          </table:table-cell>
        </table:table-row>
        <table:table-row table:style-name="ro1">
          <table:table-cell office:value-type="float" office:value="53.8421052631579" calcext:value-type="float">
            <text:p>53.8421052631579</text:p>
          </table:table-cell>
          <table:table-cell/>
          <table:table-cell office:value-type="float" office:value="28.5625" calcext:value-type="float">
            <text:p>28.5625</text:p>
          </table:table-cell>
        </table:table-row>
        <table:table-row table:style-name="ro1">
          <table:table-cell office:value-type="float" office:value="40.1818181818182" calcext:value-type="float">
            <text:p>40.1818181818182</text:p>
          </table:table-cell>
          <table:table-cell/>
          <table:table-cell office:value-type="float" office:value="28.7670454545455" calcext:value-type="float">
            <text:p>28.7670454545455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/>
          <table:table-cell office:value-type="float" office:value="28.8101265822785" calcext:value-type="float">
            <text:p>28.8101265822785</text:p>
          </table:table-cell>
        </table:table-row>
        <table:table-row table:style-name="ro1">
          <table:table-cell office:value-type="float" office:value="51.3870967741936" calcext:value-type="float">
            <text:p>51.3870967741936</text:p>
          </table:table-cell>
          <table:table-cell/>
          <table:table-cell office:value-type="float" office:value="28.9230769230769" calcext:value-type="float">
            <text:p>28.9230769230769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/>
          <table:table-cell office:value-type="float" office:value="28.9365079365079" calcext:value-type="float">
            <text:p>28.9365079365079</text:p>
          </table:table-cell>
        </table:table-row>
        <table:table-row table:style-name="ro1">
          <table:table-cell office:value-type="float" office:value="78.0833333333333" calcext:value-type="float">
            <text:p>78.0833333333333</text:p>
          </table:table-cell>
          <table:table-cell/>
          <table:table-cell office:value-type="float" office:value="28.9444444444444" calcext:value-type="float">
            <text:p>28.9444444444444</text:p>
          </table:table-cell>
        </table:table-row>
        <table:table-row table:style-name="ro1">
          <table:table-cell office:value-type="float" office:value="49.2352941176471" calcext:value-type="float">
            <text:p>49.235294117647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.7391304347826" calcext:value-type="float">
            <text:p>44.7391304347826</text:p>
          </table:table-cell>
          <table:table-cell/>
          <table:table-cell office:value-type="float" office:value="29.0333333333333" calcext:value-type="float">
            <text:p>29.033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9.0526315789474" calcext:value-type="float">
            <text:p>29.0526315789474</text:p>
          </table:table-cell>
        </table:table-row>
        <table:table-row table:style-name="ro1">
          <table:table-cell office:value-type="float" office:value="50.0909090909091" calcext:value-type="float">
            <text:p>50.0909090909091</text:p>
          </table:table-cell>
          <table:table-cell/>
          <table:table-cell office:value-type="float" office:value="29.0657894736842" calcext:value-type="float">
            <text:p>29.0657894736842</text:p>
          </table:table-cell>
        </table:table-row>
        <table:table-row table:style-name="ro1">
          <table:table-cell office:value-type="float" office:value="47.0869565217391" calcext:value-type="float">
            <text:p>47.0869565217391</text:p>
          </table:table-cell>
          <table:table-cell/>
          <table:table-cell office:value-type="float" office:value="29.0909090909091" calcext:value-type="float">
            <text:p>29.0909090909091</text:p>
          </table:table-cell>
        </table:table-row>
        <table:table-row table:style-name="ro1">
          <table:table-cell office:value-type="float" office:value="44.5925925925926" calcext:value-type="float">
            <text:p>44.5925925925926</text:p>
          </table:table-cell>
          <table:table-cell/>
          <table:table-cell office:value-type="float" office:value="29.1219512195122" calcext:value-type="float">
            <text:p>29.1219512195122</text:p>
          </table:table-cell>
        </table:table-row>
        <table:table-row table:style-name="ro1">
          <table:table-cell office:value-type="float" office:value="40.3777777777778" calcext:value-type="float">
            <text:p>40.3777777777778</text:p>
          </table:table-cell>
          <table:table-cell/>
          <table:table-cell office:value-type="float" office:value="29.1363636363636" calcext:value-type="float">
            <text:p>29.1363636363636</text:p>
          </table:table-cell>
        </table:table-row>
        <table:table-row table:style-name="ro1">
          <table:table-cell office:value-type="float" office:value="42.2564102564103" calcext:value-type="float">
            <text:p>42.2564102564103</text:p>
          </table:table-cell>
          <table:table-cell/>
          <table:table-cell office:value-type="float" office:value="29.1481481481481" calcext:value-type="float">
            <text:p>29.1481481481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9.2272727272727" calcext:value-type="float">
            <text:p>29.2272727272727</text:p>
          </table:table-cell>
        </table:table-row>
        <table:table-row table:style-name="ro1">
          <table:table-cell office:value-type="float" office:value="62.7777777777778" calcext:value-type="float">
            <text:p>62.7777777777778</text:p>
          </table:table-cell>
          <table:table-cell/>
          <table:table-cell office:value-type="float" office:value="29.2857142857143" calcext:value-type="float">
            <text:p>29.2857142857143</text:p>
          </table:table-cell>
        </table:table-row>
        <table:table-row table:style-name="ro1">
          <table:table-cell office:value-type="float" office:value="52.1538461538462" calcext:value-type="float">
            <text:p>52.1538461538462</text:p>
          </table:table-cell>
          <table:table-cell/>
          <table:table-cell office:value-type="float" office:value="29.3048780487805" calcext:value-type="float">
            <text:p>29.3048780487805</text:p>
          </table:table-cell>
        </table:table-row>
        <table:table-row table:style-name="ro1">
          <table:table-cell office:value-type="float" office:value="77.1111111111111" calcext:value-type="float">
            <text:p>77.1111111111111</text:p>
          </table:table-cell>
          <table:table-cell/>
          <table:table-cell office:value-type="float" office:value="29.4739130434783" calcext:value-type="float">
            <text:p>29.4739130434783</text:p>
          </table:table-cell>
        </table:table-row>
        <table:table-row table:style-name="ro1">
          <table:table-cell office:value-type="float" office:value="49.6666666666667" calcext:value-type="float">
            <text:p>49.6666666666667</text:p>
          </table:table-cell>
          <table:table-cell/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42.8481012658228" calcext:value-type="float">
            <text:p>42.8481012658228</text:p>
          </table:table-cell>
          <table:table-cell/>
          <table:table-cell office:value-type="float" office:value="29.5119047619048" calcext:value-type="float">
            <text:p>29.5119047619048</text:p>
          </table:table-cell>
        </table:table-row>
        <table:table-row table:style-name="ro1">
          <table:table-cell office:value-type="float" office:value="36.0833333333333" calcext:value-type="float">
            <text:p>36.0833333333333</text:p>
          </table:table-cell>
          <table:table-cell/>
          <table:table-cell office:value-type="float" office:value="29.6153846153846" calcext:value-type="float">
            <text:p>29.61538461538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9.6603773584906" calcext:value-type="float">
            <text:p>29.6603773584906</text:p>
          </table:table-cell>
        </table:table-row>
        <table:table-row table:style-name="ro1">
          <table:table-cell office:value-type="float" office:value="56.15625" calcext:value-type="float">
            <text:p>56.15625</text:p>
          </table:table-cell>
          <table:table-cell/>
          <table:table-cell office:value-type="float" office:value="29.7260273972603" calcext:value-type="float">
            <text:p>29.72602739726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55.8333333333333" calcext:value-type="float">
            <text:p>55.8333333333333</text:p>
          </table:table-cell>
          <table:table-cell/>
          <table:table-cell office:value-type="float" office:value="29.7777777777778" calcext:value-type="float">
            <text:p>29.7777777777778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/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7.3636363636364" calcext:value-type="float">
            <text:p>37.3636363636364</text:p>
          </table:table-cell>
          <table:table-cell/>
          <table:table-cell office:value-type="float" office:value="29.8421052631579" calcext:value-type="float">
            <text:p>29.8421052631579</text:p>
          </table:table-cell>
        </table:table-row>
        <table:table-row table:style-name="ro1">
          <table:table-cell office:value-type="float" office:value="43.8305084745763" calcext:value-type="float">
            <text:p>43.8305084745763</text:p>
          </table:table-cell>
          <table:table-cell/>
          <table:table-cell office:value-type="float" office:value="29.9032258064516" calcext:value-type="float">
            <text:p>29.9032258064516</text:p>
          </table:table-cell>
        </table:table-row>
        <table:table-row table:style-name="ro1">
          <table:table-cell office:value-type="float" office:value="57.2142857142857" calcext:value-type="float">
            <text:p>57.2142857142857</text:p>
          </table:table-cell>
          <table:table-cell/>
          <table:table-cell office:value-type="float" office:value="30.1363636363636" calcext:value-type="float">
            <text:p>30.1363636363636</text:p>
          </table:table-cell>
        </table:table-row>
        <table:table-row table:style-name="ro1">
          <table:table-cell office:value-type="float" office:value="57.2857142857143" calcext:value-type="float">
            <text:p>57.2857142857143</text:p>
          </table:table-cell>
          <table:table-cell/>
          <table:table-cell office:value-type="float" office:value="30.1388888888889" calcext:value-type="float">
            <text:p>30.1388888888889</text:p>
          </table:table-cell>
        </table:table-row>
        <table:table-row table:style-name="ro1">
          <table:table-cell office:value-type="float" office:value="47.8421052631579" calcext:value-type="float">
            <text:p>47.8421052631579</text:p>
          </table:table-cell>
          <table:table-cell/>
          <table:table-cell office:value-type="float" office:value="30.1481481481481" calcext:value-type="float">
            <text:p>30.1481481481481</text:p>
          </table:table-cell>
        </table:table-row>
        <table:table-row table:style-name="ro1">
          <table:table-cell office:value-type="float" office:value="67.2941176470588" calcext:value-type="float">
            <text:p>67.2941176470588</text:p>
          </table:table-cell>
          <table:table-cell/>
          <table:table-cell office:value-type="float" office:value="30.1739130434783" calcext:value-type="float">
            <text:p>30.17391304347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0.3333333333333" calcext:value-type="float">
            <text:p>30.333333333333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/>
          <table:table-cell office:value-type="float" office:value="30.3728813559322" calcext:value-type="float">
            <text:p>30.3728813559322</text:p>
          </table:table-cell>
        </table:table-row>
        <table:table-row table:style-name="ro1">
          <table:table-cell office:value-type="float" office:value="46.7719298245614" calcext:value-type="float">
            <text:p>46.7719298245614</text:p>
          </table:table-cell>
          <table:table-cell/>
          <table:table-cell office:value-type="float" office:value="30.4202898550725" calcext:value-type="float">
            <text:p>30.4202898550725</text:p>
          </table:table-cell>
        </table:table-row>
        <table:table-row table:style-name="ro1">
          <table:table-cell office:value-type="float" office:value="36.1354166666667" calcext:value-type="float">
            <text:p>36.1354166666667</text:p>
          </table:table-cell>
          <table:table-cell/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61.9130434782609" calcext:value-type="float">
            <text:p>61.9130434782609</text:p>
          </table:table-cell>
          <table:table-cell/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0.53125" calcext:value-type="float">
            <text:p>30.53125</text:p>
          </table:table-cell>
        </table:table-row>
        <table:table-row table:style-name="ro1">
          <table:table-cell office:value-type="float" office:value="54.5238095238095" calcext:value-type="float">
            <text:p>54.5238095238095</text:p>
          </table:table-cell>
          <table:table-cell/>
          <table:table-cell office:value-type="float" office:value="30.5416666666667" calcext:value-type="float">
            <text:p>30.5416666666667</text:p>
          </table:table-cell>
        </table:table-row>
        <table:table-row table:style-name="ro1">
          <table:table-cell office:value-type="float" office:value="64.15" calcext:value-type="float">
            <text:p>64.15</text:p>
          </table:table-cell>
          <table:table-cell/>
          <table:table-cell office:value-type="float" office:value="30.5925925925926" calcext:value-type="float">
            <text:p>30.5925925925926</text:p>
          </table:table-cell>
        </table:table-row>
        <table:table-row table:style-name="ro1">
          <table:table-cell office:value-type="float" office:value="33.6296296296296" calcext:value-type="float">
            <text:p>33.6296296296296</text:p>
          </table:table-cell>
          <table:table-cell/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/>
          <table:table-cell office:value-type="float" office:value="30.6086956521739" calcext:value-type="float">
            <text:p>30.6086956521739</text:p>
          </table:table-cell>
        </table:table-row>
        <table:table-row table:style-name="ro1">
          <table:table-cell office:value-type="float" office:value="29.1363636363636" calcext:value-type="float">
            <text:p>29.1363636363636</text:p>
          </table:table-cell>
          <table:table-cell/>
          <table:table-cell office:value-type="float" office:value="30.6153846153846" calcext:value-type="float">
            <text:p>30.6153846153846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/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/>
          <table:table-cell office:value-type="float" office:value="30.7866666666667" calcext:value-type="float">
            <text:p>30.7866666666667</text:p>
          </table:table-cell>
        </table:table-row>
        <table:table-row table:style-name="ro1">
          <table:table-cell office:value-type="float" office:value="55.6923076923077" calcext:value-type="float">
            <text:p>55.6923076923077</text:p>
          </table:table-cell>
          <table:table-cell/>
          <table:table-cell office:value-type="float" office:value="30.7916666666667" calcext:value-type="float">
            <text:p>30.7916666666667</text:p>
          </table:table-cell>
        </table:table-row>
        <table:table-row table:style-name="ro1">
          <table:table-cell office:value-type="float" office:value="23.6666666666667" calcext:value-type="float">
            <text:p>23.6666666666667</text:p>
          </table:table-cell>
          <table:table-cell/>
          <table:table-cell office:value-type="float" office:value="30.7931034482759" calcext:value-type="float">
            <text:p>30.7931034482759</text:p>
          </table:table-cell>
        </table:table-row>
        <table:table-row table:style-name="ro1">
          <table:table-cell office:value-type="float" office:value="25.8484848484848" calcext:value-type="float">
            <text:p>25.8484848484848</text:p>
          </table:table-cell>
          <table:table-cell/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7.9333333333333" calcext:value-type="float">
            <text:p>37.9333333333333</text:p>
          </table:table-cell>
          <table:table-cell/>
          <table:table-cell office:value-type="float" office:value="30.84" calcext:value-type="float">
            <text:p>30.84</text:p>
          </table:table-cell>
        </table:table-row>
        <table:table-row table:style-name="ro1">
          <table:table-cell office:value-type="float" office:value="45.6551724137931" calcext:value-type="float">
            <text:p>45.6551724137931</text:p>
          </table:table-cell>
          <table:table-cell/>
          <table:table-cell office:value-type="float" office:value="31.0434782608696" calcext:value-type="float">
            <text:p>31.0434782608696</text:p>
          </table:table-cell>
        </table:table-row>
        <table:table-row table:style-name="ro1">
          <table:table-cell office:value-type="float" office:value="58.64" calcext:value-type="float">
            <text:p>58.64</text:p>
          </table:table-cell>
          <table:table-cell/>
          <table:table-cell office:value-type="float" office:value="31.1521739130435" calcext:value-type="float">
            <text:p>31.1521739130435</text:p>
          </table:table-cell>
        </table:table-row>
        <table:table-row table:style-name="ro1">
          <table:table-cell office:value-type="float" office:value="57.3333333333333" calcext:value-type="float">
            <text:p>57.3333333333333</text:p>
          </table:table-cell>
          <table:table-cell/>
          <table:table-cell office:value-type="float" office:value="31.2325581395349" calcext:value-type="float">
            <text:p>31.2325581395349</text:p>
          </table:table-cell>
        </table:table-row>
        <table:table-row table:style-name="ro1">
          <table:table-cell office:value-type="float" office:value="21.825" calcext:value-type="float">
            <text:p>21.825</text:p>
          </table:table-cell>
          <table:table-cell/>
          <table:table-cell office:value-type="float" office:value="31.2474226804124" calcext:value-type="float">
            <text:p>31.2474226804124</text:p>
          </table:table-cell>
        </table:table-row>
        <table:table-row table:style-name="ro1">
          <table:table-cell office:value-type="float" office:value="44.6947368421053" calcext:value-type="float">
            <text:p>44.6947368421053</text:p>
          </table:table-cell>
          <table:table-cell/>
          <table:table-cell office:value-type="float" office:value="31.2903225806452" calcext:value-type="float">
            <text:p>31.2903225806452</text:p>
          </table:table-cell>
        </table:table-row>
        <table:table-row table:style-name="ro1">
          <table:table-cell office:value-type="float" office:value="23.5405405405405" calcext:value-type="float">
            <text:p>23.5405405405405</text:p>
          </table:table-cell>
          <table:table-cell/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26.7692307692308" calcext:value-type="float">
            <text:p>26.7692307692308</text:p>
          </table:table-cell>
          <table:table-cell/>
          <table:table-cell office:value-type="float" office:value="31.36" calcext:value-type="float">
            <text:p>31.36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/>
          <table:table-cell office:value-type="float" office:value="31.36" calcext:value-type="float">
            <text:p>31.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31.4273504273504" calcext:value-type="float">
            <text:p>31.4273504273504</text:p>
          </table:table-cell>
        </table:table-row>
        <table:table-row table:style-name="ro1">
          <table:table-cell office:value-type="float" office:value="49.2857142857143" calcext:value-type="float">
            <text:p>49.2857142857143</text:p>
          </table:table-cell>
          <table:table-cell/>
          <table:table-cell office:value-type="float" office:value="31.4761904761905" calcext:value-type="float">
            <text:p>31.4761904761905</text:p>
          </table:table-cell>
        </table:table-row>
        <table:table-row table:style-name="ro1">
          <table:table-cell office:value-type="float" office:value="25.9259259259259" calcext:value-type="float">
            <text:p>25.9259259259259</text:p>
          </table:table-cell>
          <table:table-cell/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8.7894736842105" calcext:value-type="float">
            <text:p>38.7894736842105</text:p>
          </table:table-cell>
          <table:table-cell/>
          <table:table-cell office:value-type="float" office:value="31.5157894736842" calcext:value-type="float">
            <text:p>31.51578947368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1.5714285714286" calcext:value-type="float">
            <text:p>31.5714285714286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/>
          <table:table-cell office:value-type="float" office:value="31.7037037037037" calcext:value-type="float">
            <text:p>31.7037037037037</text:p>
          </table:table-cell>
        </table:table-row>
        <table:table-row table:style-name="ro1">
          <table:table-cell office:value-type="float" office:value="12.8205128205128" calcext:value-type="float">
            <text:p>12.8205128205128</text:p>
          </table:table-cell>
          <table:table-cell/>
          <table:table-cell office:value-type="float" office:value="31.7272727272727" calcext:value-type="float">
            <text:p>31.7272727272727</text:p>
          </table:table-cell>
        </table:table-row>
        <table:table-row table:style-name="ro1">
          <table:table-cell office:value-type="float" office:value="14.4142857142857" calcext:value-type="float">
            <text:p>14.4142857142857</text:p>
          </table:table-cell>
          <table:table-cell/>
          <table:table-cell office:value-type="float" office:value="31.7684210526316" calcext:value-type="float">
            <text:p>31.7684210526316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/>
          <table:table-cell office:value-type="float" office:value="31.875" calcext:value-type="float">
            <text:p>31.875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/>
          <table:table-cell office:value-type="float" office:value="31.9230769230769" calcext:value-type="float">
            <text:p>31.9230769230769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.1304347826087" calcext:value-type="float">
            <text:p>57.130434782608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.3571428571429" calcext:value-type="float">
            <text:p>65.3571428571429</text:p>
          </table:table-cell>
          <table:table-cell/>
          <table:table-cell office:value-type="float" office:value="32.1016949152542" calcext:value-type="float">
            <text:p>32.101694915254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/>
          <table:table-cell office:value-type="float" office:value="32.1073825503356" calcext:value-type="float">
            <text:p>32.1073825503356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/>
          <table:table-cell office:value-type="float" office:value="32.1904761904762" calcext:value-type="float">
            <text:p>32.1904761904762</text:p>
          </table:table-cell>
        </table:table-row>
        <table:table-row table:style-name="ro1">
          <table:table-cell office:value-type="float" office:value="32.4864864864865" calcext:value-type="float">
            <text:p>32.4864864864865</text:p>
          </table:table-cell>
          <table:table-cell/>
          <table:table-cell office:value-type="float" office:value="32.2727272727273" calcext:value-type="float">
            <text:p>32.2727272727273</text:p>
          </table:table-cell>
        </table:table-row>
        <table:table-row table:style-name="ro1">
          <table:table-cell office:value-type="float" office:value="26.0909090909091" calcext:value-type="float">
            <text:p>26.0909090909091</text:p>
          </table:table-cell>
          <table:table-cell/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6.7894736842105" calcext:value-type="float">
            <text:p>36.7894736842105</text:p>
          </table:table-cell>
          <table:table-cell/>
          <table:table-cell office:value-type="float" office:value="32.3163265306122" calcext:value-type="float">
            <text:p>32.3163265306122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/>
          <table:table-cell office:value-type="float" office:value="32.3181818181818" calcext:value-type="float">
            <text:p>32.3181818181818</text:p>
          </table:table-cell>
        </table:table-row>
        <table:table-row table:style-name="ro1">
          <table:table-cell office:value-type="float" office:value="34.8333333333333" calcext:value-type="float">
            <text:p>34.8333333333333</text:p>
          </table:table-cell>
          <table:table-cell/>
          <table:table-cell office:value-type="float" office:value="32.3559322033898" calcext:value-type="float">
            <text:p>32.355932203389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/>
          <table:table-cell office:value-type="float" office:value="32.3928571428571" calcext:value-type="float">
            <text:p>32.3928571428571</text:p>
          </table:table-cell>
        </table:table-row>
        <table:table-row table:style-name="ro1">
          <table:table-cell office:value-type="float" office:value="52.24" calcext:value-type="float">
            <text:p>52.24</text:p>
          </table:table-cell>
          <table:table-cell/>
          <table:table-cell office:value-type="float" office:value="32.4864864864865" calcext:value-type="float">
            <text:p>32.4864864864865</text:p>
          </table:table-cell>
        </table:table-row>
        <table:table-row table:style-name="ro1">
          <table:table-cell office:value-type="float" office:value="61.3809523809524" calcext:value-type="float">
            <text:p>61.3809523809524</text:p>
          </table:table-cell>
          <table:table-cell/>
          <table:table-cell office:value-type="float" office:value="32.4893617021277" calcext:value-type="float">
            <text:p>32.4893617021277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73.75" calcext:value-type="float">
            <text:p>73.7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51.0454545454545" calcext:value-type="float">
            <text:p>51.045454545454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90.25" calcext:value-type="float">
            <text:p>90.25</text:p>
          </table:table-cell>
          <table:table-cell/>
          <table:table-cell office:value-type="float" office:value="32.5217391304348" calcext:value-type="float">
            <text:p>32.5217391304348</text:p>
          </table:table-cell>
        </table:table-row>
        <table:table-row table:style-name="ro1">
          <table:table-cell office:value-type="float" office:value="17.2571428571429" calcext:value-type="float">
            <text:p>17.2571428571429</text:p>
          </table:table-cell>
          <table:table-cell/>
          <table:table-cell office:value-type="float" office:value="32.5217391304348" calcext:value-type="float">
            <text:p>32.5217391304348</text:p>
          </table:table-cell>
        </table:table-row>
        <table:table-row table:style-name="ro1">
          <table:table-cell office:value-type="float" office:value="60.6666666666667" calcext:value-type="float">
            <text:p>60.6666666666667</text:p>
          </table:table-cell>
          <table:table-cell/>
          <table:table-cell office:value-type="float" office:value="32.5909090909091" calcext:value-type="float">
            <text:p>32.5909090909091</text:p>
          </table:table-cell>
        </table:table-row>
        <table:table-row table:style-name="ro1">
          <table:table-cell office:value-type="float" office:value="16.6428571428571" calcext:value-type="float">
            <text:p>16.6428571428571</text:p>
          </table:table-cell>
          <table:table-cell/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/>
          <table:table-cell office:value-type="float" office:value="32.6341463414634" calcext:value-type="float">
            <text:p>32.6341463414634</text:p>
          </table:table-cell>
        </table:table-row>
        <table:table-row table:style-name="ro1">
          <table:table-cell office:value-type="float" office:value="35.5384615384615" calcext:value-type="float">
            <text:p>35.5384615384615</text:p>
          </table:table-cell>
          <table:table-cell/>
          <table:table-cell office:value-type="float" office:value="32.6363636363636" calcext:value-type="float">
            <text:p>32.636363636363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/>
          <table:table-cell office:value-type="float" office:value="32.6363636363636" calcext:value-type="float">
            <text:p>32.6363636363636</text:p>
          </table:table-cell>
        </table:table-row>
        <table:table-row table:style-name="ro1">
          <table:table-cell office:value-type="float" office:value="69.75" calcext:value-type="float">
            <text:p>69.75</text:p>
          </table:table-cell>
          <table:table-cell/>
          <table:table-cell office:value-type="float" office:value="32.6585365853659" calcext:value-type="float">
            <text:p>32.6585365853659</text:p>
          </table:table-cell>
        </table:table-row>
        <table:table-row table:style-name="ro1">
          <table:table-cell office:value-type="float" office:value="55.025" calcext:value-type="float">
            <text:p>55.025</text:p>
          </table:table-cell>
          <table:table-cell/>
          <table:table-cell office:value-type="float" office:value="32.7808219178082" calcext:value-type="float">
            <text:p>32.7808219178082</text:p>
          </table:table-cell>
        </table:table-row>
        <table:table-row table:style-name="ro1">
          <table:table-cell office:value-type="float" office:value="49.5454545454546" calcext:value-type="float">
            <text:p>49.5454545454546</text:p>
          </table:table-cell>
          <table:table-cell/>
          <table:table-cell office:value-type="float" office:value="32.7931034482759" calcext:value-type="float">
            <text:p>32.7931034482759</text:p>
          </table:table-cell>
        </table:table-row>
        <table:table-row table:style-name="ro1">
          <table:table-cell office:value-type="float" office:value="46.6285714285714" calcext:value-type="float">
            <text:p>46.6285714285714</text:p>
          </table:table-cell>
          <table:table-cell/>
          <table:table-cell office:value-type="float" office:value="32.8288288288288" calcext:value-type="float">
            <text:p>32.8288288288288</text:p>
          </table:table-cell>
        </table:table-row>
        <table:table-row table:style-name="ro1">
          <table:table-cell office:value-type="float" office:value="41.6666666666667" calcext:value-type="float">
            <text:p>41.6666666666667</text:p>
          </table:table-cell>
          <table:table-cell/>
          <table:table-cell office:value-type="float" office:value="32.8936170212766" calcext:value-type="float">
            <text:p>32.8936170212766</text:p>
          </table:table-cell>
        </table:table-row>
        <table:table-row table:style-name="ro1">
          <table:table-cell office:value-type="float" office:value="51.8947368421053" calcext:value-type="float">
            <text:p>51.8947368421053</text:p>
          </table:table-cell>
          <table:table-cell/>
          <table:table-cell office:value-type="float" office:value="32.9333333333333" calcext:value-type="float">
            <text:p>32.9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2.953488372093" calcext:value-type="float">
            <text:p>32.953488372093</text:p>
          </table:table-cell>
        </table:table-row>
        <table:table-row table:style-name="ro1">
          <table:table-cell office:value-type="float" office:value="46.3333333333333" calcext:value-type="float">
            <text:p>46.3333333333333</text:p>
          </table:table-cell>
          <table:table-cell/>
          <table:table-cell office:value-type="float" office:value="32.978021978022" calcext:value-type="float">
            <text:p>32.978021978022</text:p>
          </table:table-cell>
        </table:table-row>
        <table:table-row table:style-name="ro1">
          <table:table-cell office:value-type="float" office:value="59.1428571428571" calcext:value-type="float">
            <text:p>59.1428571428571</text:p>
          </table:table-cell>
          <table:table-cell/>
          <table:table-cell office:value-type="float" office:value="32.9811320754717" calcext:value-type="float">
            <text:p>32.9811320754717</text:p>
          </table:table-cell>
        </table:table-row>
        <table:table-row table:style-name="ro1">
          <table:table-cell office:value-type="float" office:value="64.7692307692308" calcext:value-type="float">
            <text:p>64.7692307692308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.7058823529412" calcext:value-type="float">
            <text:p>46.705882352941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.4821428571429" calcext:value-type="float">
            <text:p>46.4821428571429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.1304347826087" calcext:value-type="float">
            <text:p>62.1304347826087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.0294117647059" calcext:value-type="float">
            <text:p>42.0294117647059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.5952380952381" calcext:value-type="float">
            <text:p>43.595238095238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.1304347826087" calcext:value-type="float">
            <text:p>54.1304347826087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.7727272727273" calcext:value-type="float">
            <text:p>36.772727272727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.7777777777778" calcext:value-type="float">
            <text:p>52.7777777777778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.4666666666667" calcext:value-type="float">
            <text:p>47.4666666666667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.0666666666667" calcext:value-type="float">
            <text:p>50.0666666666667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.2068965517241" calcext:value-type="float">
            <text:p>57.206896551724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/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float" office:value="48.95" calcext:value-type="float">
            <text:p>48.95</text:p>
          </table:table-cell>
          <table:table-cell/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64.125" calcext:value-type="float">
            <text:p>64.125</text:p>
          </table:table-cell>
          <table:table-cell/>
          <table:table-cell office:value-type="float" office:value="33.2068965517241" calcext:value-type="float">
            <text:p>33.2068965517241</text:p>
          </table:table-cell>
        </table:table-row>
        <table:table-row table:style-name="ro1">
          <table:table-cell office:value-type="float" office:value="62.3636363636364" calcext:value-type="float">
            <text:p>62.3636363636364</text:p>
          </table:table-cell>
          <table:table-cell/>
          <table:table-cell office:value-type="float" office:value="33.2380952380952" calcext:value-type="float">
            <text:p>33.2380952380952</text:p>
          </table:table-cell>
        </table:table-row>
        <table:table-row table:style-name="ro1">
          <table:table-cell office:value-type="float" office:value="63.9107142857143" calcext:value-type="float">
            <text:p>63.9107142857143</text:p>
          </table:table-cell>
          <table:table-cell/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33.3913043478261" calcext:value-type="float">
            <text:p>33.3913043478261</text:p>
          </table:table-cell>
        </table:table-row>
        <table:table-row table:style-name="ro1">
          <table:table-cell office:value-type="float" office:value="50.0975609756098" calcext:value-type="float">
            <text:p>50.0975609756098</text:p>
          </table:table-cell>
          <table:table-cell/>
          <table:table-cell office:value-type="float" office:value="33.4137168141593" calcext:value-type="float">
            <text:p>33.4137168141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3.4166666666667" calcext:value-type="float">
            <text:p>33.4166666666667</text:p>
          </table:table-cell>
        </table:table-row>
        <table:table-row table:style-name="ro1">
          <table:table-cell office:value-type="float" office:value="55.2661290322581" calcext:value-type="float">
            <text:p>55.2661290322581</text:p>
          </table:table-cell>
          <table:table-cell/>
          <table:table-cell office:value-type="float" office:value="33.4285714285714" calcext:value-type="float">
            <text:p>33.4285714285714</text:p>
          </table:table-cell>
        </table:table-row>
        <table:table-row table:style-name="ro1">
          <table:table-cell office:value-type="float" office:value="52.4722222222222" calcext:value-type="float">
            <text:p>52.4722222222222</text:p>
          </table:table-cell>
          <table:table-cell/>
          <table:table-cell office:value-type="float" office:value="33.4642857142857" calcext:value-type="float">
            <text:p>33.4642857142857</text:p>
          </table:table-cell>
        </table:table-row>
        <table:table-row table:style-name="ro1">
          <table:table-cell office:value-type="float" office:value="37.5178571428571" calcext:value-type="float">
            <text:p>37.5178571428571</text:p>
          </table:table-cell>
          <table:table-cell/>
          <table:table-cell office:value-type="float" office:value="33.4814814814815" calcext:value-type="float">
            <text:p>33.481481481481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/>
          <table:table-cell office:value-type="float" office:value="33.4842767295597" calcext:value-type="float">
            <text:p>33.4842767295597</text:p>
          </table:table-cell>
        </table:table-row>
        <table:table-row table:style-name="ro1">
          <table:table-cell office:value-type="float" office:value="57.7284768211921" calcext:value-type="float">
            <text:p>57.7284768211921</text:p>
          </table:table-cell>
          <table:table-cell/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6.5833333333333" calcext:value-type="float">
            <text:p>36.5833333333333</text:p>
          </table:table-cell>
          <table:table-cell/>
          <table:table-cell office:value-type="float" office:value="33.515625" calcext:value-type="float">
            <text:p>33.515625</text:p>
          </table:table-cell>
        </table:table-row>
        <table:table-row table:style-name="ro1">
          <table:table-cell office:value-type="float" office:value="65.26" calcext:value-type="float">
            <text:p>65.26</text:p>
          </table:table-cell>
          <table:table-cell/>
          <table:table-cell office:value-type="float" office:value="33.625" calcext:value-type="float">
            <text:p>33.62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/>
          <table:table-cell office:value-type="float" office:value="33.6296296296296" calcext:value-type="float">
            <text:p>33.6296296296296</text:p>
          </table:table-cell>
        </table:table-row>
        <table:table-row table:style-name="ro1">
          <table:table-cell office:value-type="float" office:value="36.1627906976744" calcext:value-type="float">
            <text:p>36.1627906976744</text:p>
          </table:table-cell>
          <table:table-cell/>
          <table:table-cell office:value-type="float" office:value="33.6428571428571" calcext:value-type="float">
            <text:p>33.6428571428571</text:p>
          </table:table-cell>
        </table:table-row>
        <table:table-row table:style-name="ro1">
          <table:table-cell office:value-type="float" office:value="75.1666666666667" calcext:value-type="float">
            <text:p>75.1666666666667</text:p>
          </table:table-cell>
          <table:table-cell/>
          <table:table-cell office:value-type="float" office:value="33.6780487804878" calcext:value-type="float">
            <text:p>33.6780487804878</text:p>
          </table:table-cell>
        </table:table-row>
        <table:table-row table:style-name="ro1">
          <table:table-cell office:value-type="float" office:value="47.7333333333333" calcext:value-type="float">
            <text:p>47.7333333333333</text:p>
          </table:table-cell>
          <table:table-cell/>
          <table:table-cell office:value-type="float" office:value="33.6896551724138" calcext:value-type="float">
            <text:p>33.6896551724138</text:p>
          </table:table-cell>
        </table:table-row>
        <table:table-row table:style-name="ro1">
          <table:table-cell office:value-type="float" office:value="58.5294117647059" calcext:value-type="float">
            <text:p>58.5294117647059</text:p>
          </table:table-cell>
          <table:table-cell/>
          <table:table-cell office:value-type="float" office:value="33.7142857142857" calcext:value-type="float">
            <text:p>33.7142857142857</text:p>
          </table:table-cell>
        </table:table-row>
        <table:table-row table:style-name="ro1">
          <table:table-cell office:value-type="float" office:value="39.5988372093023" calcext:value-type="float">
            <text:p>39.5988372093023</text:p>
          </table:table-cell>
          <table:table-cell/>
          <table:table-cell office:value-type="float" office:value="33.72" calcext:value-type="float">
            <text:p>33.72</text:p>
          </table:table-cell>
        </table:table-row>
        <table:table-row table:style-name="ro1">
          <table:table-cell office:value-type="float" office:value="36.0588235294118" calcext:value-type="float">
            <text:p>36.0588235294118</text:p>
          </table:table-cell>
          <table:table-cell/>
          <table:table-cell office:value-type="float" office:value="33.741935483871" calcext:value-type="float">
            <text:p>33.741935483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3.7555555555556" calcext:value-type="float">
            <text:p>33.7555555555556</text:p>
          </table:table-cell>
        </table:table-row>
        <table:table-row table:style-name="ro1">
          <table:table-cell office:value-type="float" office:value="42.9130434782609" calcext:value-type="float">
            <text:p>42.9130434782609</text:p>
          </table:table-cell>
          <table:table-cell/>
          <table:table-cell office:value-type="float" office:value="33.7794871794872" calcext:value-type="float">
            <text:p>33.77948717948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3.8461538461538" calcext:value-type="float">
            <text:p>33.8461538461538</text:p>
          </table:table-cell>
        </table:table-row>
        <table:table-row table:style-name="ro1">
          <table:table-cell office:value-type="float" office:value="41.8918918918919" calcext:value-type="float">
            <text:p>41.8918918918919</text:p>
          </table:table-cell>
          <table:table-cell/>
          <table:table-cell office:value-type="float" office:value="33.8571428571429" calcext:value-type="float">
            <text:p>33.85714285714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3.8648648648649" calcext:value-type="float">
            <text:p>33.8648648648649</text:p>
          </table:table-cell>
        </table:table-row>
        <table:table-row table:style-name="ro1">
          <table:table-cell office:value-type="float" office:value="52.5428571428571" calcext:value-type="float">
            <text:p>52.5428571428571</text:p>
          </table:table-cell>
          <table:table-cell/>
          <table:table-cell office:value-type="float" office:value="33.8833333333333" calcext:value-type="float">
            <text:p>33.8833333333333</text:p>
          </table:table-cell>
        </table:table-row>
        <table:table-row table:style-name="ro1">
          <table:table-cell office:value-type="float" office:value="50.7466666666667" calcext:value-type="float">
            <text:p>50.7466666666667</text:p>
          </table:table-cell>
          <table:table-cell/>
          <table:table-cell office:value-type="float" office:value="33.8947368421053" calcext:value-type="float">
            <text:p>33.8947368421053</text:p>
          </table:table-cell>
        </table:table-row>
        <table:table-row table:style-name="ro1">
          <table:table-cell office:value-type="float" office:value="71.625" calcext:value-type="float">
            <text:p>71.625</text:p>
          </table:table-cell>
          <table:table-cell/>
          <table:table-cell office:value-type="float" office:value="33.9047619047619" calcext:value-type="float">
            <text:p>33.9047619047619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/>
          <table:table-cell office:value-type="float" office:value="33.9252577319588" calcext:value-type="float">
            <text:p>33.9252577319588</text:p>
          </table:table-cell>
        </table:table-row>
        <table:table-row table:style-name="ro1">
          <table:table-cell office:value-type="float" office:value="57.9457364341085" calcext:value-type="float">
            <text:p>57.9457364341085</text:p>
          </table:table-cell>
          <table:table-cell/>
          <table:table-cell office:value-type="float" office:value="33.9444444444444" calcext:value-type="float">
            <text:p>33.9444444444444</text:p>
          </table:table-cell>
        </table:table-row>
        <table:table-row table:style-name="ro1">
          <table:table-cell office:value-type="float" office:value="20.7777777777778" calcext:value-type="float">
            <text:p>20.7777777777778</text:p>
          </table:table-cell>
          <table:table-cell/>
          <table:table-cell office:value-type="float" office:value="33.9852941176471" calcext:value-type="float">
            <text:p>33.9852941176471</text:p>
          </table:table-cell>
        </table:table-row>
        <table:table-row table:style-name="ro1">
          <table:table-cell office:value-type="float" office:value="27.9016393442623" calcext:value-type="float">
            <text:p>27.901639344262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4.1116504854369" calcext:value-type="float">
            <text:p>34.1116504854369</text:p>
          </table:table-cell>
        </table:table-row>
        <table:table-row table:style-name="ro1">
          <table:table-cell office:value-type="float" office:value="53.4183673469388" calcext:value-type="float">
            <text:p>53.4183673469388</text:p>
          </table:table-cell>
          <table:table-cell/>
          <table:table-cell office:value-type="float" office:value="34.15" calcext:value-type="float">
            <text:p>34.15</text:p>
          </table:table-cell>
        </table:table-row>
        <table:table-row table:style-name="ro1">
          <table:table-cell office:value-type="float" office:value="67.2941176470588" calcext:value-type="float">
            <text:p>67.2941176470588</text:p>
          </table:table-cell>
          <table:table-cell/>
          <table:table-cell office:value-type="float" office:value="34.1621621621622" calcext:value-type="float">
            <text:p>34.1621621621622</text:p>
          </table:table-cell>
        </table:table-row>
        <table:table-row table:style-name="ro1">
          <table:table-cell office:value-type="float" office:value="53.6818181818182" calcext:value-type="float">
            <text:p>53.6818181818182</text:p>
          </table:table-cell>
          <table:table-cell/>
          <table:table-cell office:value-type="float" office:value="34.1794871794872" calcext:value-type="float">
            <text:p>34.1794871794872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/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/>
          <table:table-cell office:value-type="float" office:value="34.2417582417582" calcext:value-type="float">
            <text:p>34.2417582417582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/>
          <table:table-cell office:value-type="float" office:value="34.2631578947368" calcext:value-type="float">
            <text:p>34.2631578947368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/>
          <table:table-cell office:value-type="float" office:value="34.2794117647059" calcext:value-type="float">
            <text:p>34.279411764705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/>
          <table:table-cell office:value-type="float" office:value="34.2916666666667" calcext:value-type="float">
            <text:p>34.2916666666667</text:p>
          </table:table-cell>
        </table:table-row>
        <table:table-row table:style-name="ro1">
          <table:table-cell office:value-type="float" office:value="53.4594594594595" calcext:value-type="float">
            <text:p>53.4594594594595</text:p>
          </table:table-cell>
          <table:table-cell/>
          <table:table-cell office:value-type="float" office:value="34.3333333333333" calcext:value-type="float">
            <text:p>34.3333333333333</text:p>
          </table:table-cell>
        </table:table-row>
        <table:table-row table:style-name="ro1">
          <table:table-cell office:value-type="float" office:value="71.2777777777778" calcext:value-type="float">
            <text:p>71.2777777777778</text:p>
          </table:table-cell>
          <table:table-cell/>
          <table:table-cell office:value-type="float" office:value="34.3636363636364" calcext:value-type="float">
            <text:p>34.363636363636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/>
          <table:table-cell office:value-type="float" office:value="34.4375" calcext:value-type="float">
            <text:p>34.4375</text:p>
          </table:table-cell>
        </table:table-row>
        <table:table-row table:style-name="ro1">
          <table:table-cell office:value-type="float" office:value="66.3478260869565" calcext:value-type="float">
            <text:p>66.3478260869565</text:p>
          </table:table-cell>
          <table:table-cell/>
          <table:table-cell office:value-type="float" office:value="34.4479166666667" calcext:value-type="float">
            <text:p>34.4479166666667</text:p>
          </table:table-cell>
        </table:table-row>
        <table:table-row table:style-name="ro1">
          <table:table-cell office:value-type="float" office:value="38.3448275862069" calcext:value-type="float">
            <text:p>38.3448275862069</text:p>
          </table:table-cell>
          <table:table-cell/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float" office:value="55.7407407407407" calcext:value-type="float">
            <text:p>55.7407407407407</text:p>
          </table:table-cell>
          <table:table-cell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62.7333333333333" calcext:value-type="float">
            <text:p>62.7333333333333</text:p>
          </table:table-cell>
          <table:table-cell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50.3636363636364" calcext:value-type="float">
            <text:p>50.3636363636364</text:p>
          </table:table-cell>
          <table:table-cell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41.6595744680851" calcext:value-type="float">
            <text:p>41.6595744680851</text:p>
          </table:table-cell>
          <table:table-cell/>
          <table:table-cell office:value-type="float" office:value="34.5714285714286" calcext:value-type="float">
            <text:p>34.5714285714286</text:p>
          </table:table-cell>
        </table:table-row>
        <table:table-row table:style-name="ro1">
          <table:table-cell office:value-type="float" office:value="41.3426573426573" calcext:value-type="float">
            <text:p>41.3426573426573</text:p>
          </table:table-cell>
          <table:table-cell/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85.6666666666667" calcext:value-type="float">
            <text:p>85.6666666666667</text:p>
          </table:table-cell>
          <table:table-cell/>
          <table:table-cell office:value-type="float" office:value="34.6046511627907" calcext:value-type="float">
            <text:p>34.6046511627907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/>
          <table:table-cell office:value-type="float" office:value="34.6615384615385" calcext:value-type="float">
            <text:p>34.6615384615385</text:p>
          </table:table-cell>
        </table:table-row>
        <table:table-row table:style-name="ro1">
          <table:table-cell office:value-type="float" office:value="85.3333333333333" calcext:value-type="float">
            <text:p>85.3333333333333</text:p>
          </table:table-cell>
          <table:table-cell/>
          <table:table-cell office:value-type="float" office:value="34.7272727272727" calcext:value-type="float">
            <text:p>34.7272727272727</text:p>
          </table:table-cell>
        </table:table-row>
        <table:table-row table:style-name="ro1">
          <table:table-cell office:value-type="float" office:value="6.79047619047619" calcext:value-type="float">
            <text:p>6.79047619047619</text:p>
          </table:table-cell>
          <table:table-cell/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/>
          <table:table-cell office:value-type="float" office:value="34.7674418604651" calcext:value-type="float">
            <text:p>34.7674418604651</text:p>
          </table:table-cell>
        </table:table-row>
        <table:table-row table:style-name="ro1">
          <table:table-cell office:value-type="float" office:value="53.3333333333333" calcext:value-type="float">
            <text:p>53.3333333333333</text:p>
          </table:table-cell>
          <table:table-cell/>
          <table:table-cell office:value-type="float" office:value="34.775" calcext:value-type="float">
            <text:p>34.775</text:p>
          </table:table-cell>
        </table:table-row>
        <table:table-row table:style-name="ro1">
          <table:table-cell office:value-type="float" office:value="45.36" calcext:value-type="float">
            <text:p>45.36</text:p>
          </table:table-cell>
          <table:table-cell/>
          <table:table-cell office:value-type="float" office:value="34.7876712328767" calcext:value-type="float">
            <text:p>34.7876712328767</text:p>
          </table:table-cell>
        </table:table-row>
        <table:table-row table:style-name="ro1">
          <table:table-cell office:value-type="float" office:value="21.7878787878788" calcext:value-type="float">
            <text:p>21.7878787878788</text:p>
          </table:table-cell>
          <table:table-cell/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54.6363636363636" calcext:value-type="float">
            <text:p>54.6363636363636</text:p>
          </table:table-cell>
          <table:table-cell/>
          <table:table-cell office:value-type="float" office:value="34.8266666666667" calcext:value-type="float">
            <text:p>34.826666666666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/>
          <table:table-cell office:value-type="float" office:value="34.8333333333333" calcext:value-type="float">
            <text:p>34.8333333333333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/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53.1851851851852" calcext:value-type="float">
            <text:p>53.1851851851852</text:p>
          </table:table-cell>
          <table:table-cell/>
          <table:table-cell office:value-type="float" office:value="34.9649122807018" calcext:value-type="float">
            <text:p>34.9649122807018</text:p>
          </table:table-cell>
        </table:table-row>
        <table:table-row table:style-name="ro1">
          <table:table-cell office:value-type="float" office:value="52.448275862069" calcext:value-type="float">
            <text:p>52.448275862069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.2941176470588" calcext:value-type="float">
            <text:p>50.2941176470588</text:p>
          </table:table-cell>
          <table:table-cell/>
          <table:table-cell office:value-type="float" office:value="35.0281690140845" calcext:value-type="float">
            <text:p>35.0281690140845</text:p>
          </table:table-cell>
        </table:table-row>
        <table:table-row table:style-name="ro1">
          <table:table-cell office:value-type="float" office:value="48.9375" calcext:value-type="float">
            <text:p>48.9375</text:p>
          </table:table-cell>
          <table:table-cell/>
          <table:table-cell office:value-type="float" office:value="35.0434782608696" calcext:value-type="float">
            <text:p>35.0434782608696</text:p>
          </table:table-cell>
        </table:table-row>
        <table:table-row table:style-name="ro1">
          <table:table-cell office:value-type="float" office:value="35.6444444444444" calcext:value-type="float">
            <text:p>35.6444444444444</text:p>
          </table:table-cell>
          <table:table-cell/>
          <table:table-cell office:value-type="float" office:value="35.0434782608696" calcext:value-type="float">
            <text:p>35.0434782608696</text:p>
          </table:table-cell>
        </table:table-row>
        <table:table-row table:style-name="ro1">
          <table:table-cell office:value-type="float" office:value="72.7291666666667" calcext:value-type="float">
            <text:p>72.7291666666667</text:p>
          </table:table-cell>
          <table:table-cell/>
          <table:table-cell office:value-type="float" office:value="35.0481927710843" calcext:value-type="float">
            <text:p>35.0481927710843</text:p>
          </table:table-cell>
        </table:table-row>
        <table:table-row table:style-name="ro1">
          <table:table-cell office:value-type="float" office:value="27.6041666666667" calcext:value-type="float">
            <text:p>27.6041666666667</text:p>
          </table:table-cell>
          <table:table-cell/>
          <table:table-cell office:value-type="float" office:value="35.0689655172414" calcext:value-type="float">
            <text:p>35.0689655172414</text:p>
          </table:table-cell>
        </table:table-row>
        <table:table-row table:style-name="ro1">
          <table:table-cell office:value-type="float" office:value="59.85" calcext:value-type="float">
            <text:p>59.85</text:p>
          </table:table-cell>
          <table:table-cell/>
          <table:table-cell office:value-type="float" office:value="35.125" calcext:value-type="float">
            <text:p>35.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float" office:value="56.2285714285714" calcext:value-type="float">
            <text:p>56.2285714285714</text:p>
          </table:table-cell>
          <table:table-cell/>
          <table:table-cell office:value-type="float" office:value="35.1538461538462" calcext:value-type="float">
            <text:p>35.1538461538462</text:p>
          </table:table-cell>
        </table:table-row>
        <table:table-row table:style-name="ro1">
          <table:table-cell office:value-type="float" office:value="63.4716981132075" calcext:value-type="float">
            <text:p>63.4716981132075</text:p>
          </table:table-cell>
          <table:table-cell/>
          <table:table-cell office:value-type="float" office:value="35.2727272727273" calcext:value-type="float">
            <text:p>35.2727272727273</text:p>
          </table:table-cell>
        </table:table-row>
        <table:table-row table:style-name="ro1">
          <table:table-cell office:value-type="float" office:value="36.2857142857143" calcext:value-type="float">
            <text:p>36.2857142857143</text:p>
          </table:table-cell>
          <table:table-cell/>
          <table:table-cell office:value-type="float" office:value="35.2727272727273" calcext:value-type="float">
            <text:p>35.27272727272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35.3333333333333" calcext:value-type="float">
            <text:p>35.33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5.3333333333333" calcext:value-type="float">
            <text:p>35.3333333333333</text:p>
          </table:table-cell>
        </table:table-row>
        <table:table-row table:style-name="ro1">
          <table:table-cell office:value-type="float" office:value="57.9090909090909" calcext:value-type="float">
            <text:p>57.9090909090909</text:p>
          </table:table-cell>
          <table:table-cell/>
          <table:table-cell office:value-type="float" office:value="35.3636363636364" calcext:value-type="float">
            <text:p>35.36363636363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5.4464285714286" calcext:value-type="float">
            <text:p>35.4464285714286</text:p>
          </table:table-cell>
        </table:table-row>
        <table:table-row table:style-name="ro1">
          <table:table-cell office:value-type="float" office:value="63.6363636363636" calcext:value-type="float">
            <text:p>63.6363636363636</text:p>
          </table:table-cell>
          <table:table-cell/>
          <table:table-cell office:value-type="float" office:value="35.4803921568627" calcext:value-type="float">
            <text:p>35.4803921568627</text:p>
          </table:table-cell>
        </table:table-row>
        <table:table-row table:style-name="ro1">
          <table:table-cell office:value-type="float" office:value="58.2413793103448" calcext:value-type="float">
            <text:p>58.2413793103448</text:p>
          </table:table-cell>
          <table:table-cell/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7.78125" calcext:value-type="float">
            <text:p>37.78125</text:p>
          </table:table-cell>
          <table:table-cell/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58.0833333333333" calcext:value-type="float">
            <text:p>58.0833333333333</text:p>
          </table:table-cell>
          <table:table-cell/>
          <table:table-cell office:value-type="float" office:value="35.5245901639344" calcext:value-type="float">
            <text:p>35.5245901639344</text:p>
          </table:table-cell>
        </table:table-row>
        <table:table-row table:style-name="ro1">
          <table:table-cell office:value-type="float" office:value="67.5714285714286" calcext:value-type="float">
            <text:p>67.5714285714286</text:p>
          </table:table-cell>
          <table:table-cell/>
          <table:table-cell office:value-type="float" office:value="35.5384615384615" calcext:value-type="float">
            <text:p>35.5384615384615</text:p>
          </table:table-cell>
        </table:table-row>
        <table:table-row table:style-name="ro1">
          <table:table-cell office:value-type="float" office:value="70.5714285714286" calcext:value-type="float">
            <text:p>70.5714285714286</text:p>
          </table:table-cell>
          <table:table-cell/>
          <table:table-cell office:value-type="float" office:value="35.5384615384615" calcext:value-type="float">
            <text:p>35.538461538461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/>
          <table:table-cell office:value-type="float" office:value="35.5454545454545" calcext:value-type="float">
            <text:p>35.54545454545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5.625" calcext:value-type="float">
            <text:p>35.625</text:p>
          </table:table-cell>
        </table:table-row>
        <table:table-row table:style-name="ro1">
          <table:table-cell office:value-type="float" office:value="56.1818181818182" calcext:value-type="float">
            <text:p>56.1818181818182</text:p>
          </table:table-cell>
          <table:table-cell/>
          <table:table-cell office:value-type="float" office:value="35.6315789473684" calcext:value-type="float">
            <text:p>35.6315789473684</text:p>
          </table:table-cell>
        </table:table-row>
        <table:table-row table:style-name="ro1">
          <table:table-cell office:value-type="float" office:value="44.9803921568627" calcext:value-type="float">
            <text:p>44.9803921568627</text:p>
          </table:table-cell>
          <table:table-cell/>
          <table:table-cell office:value-type="float" office:value="35.6444444444444" calcext:value-type="float">
            <text:p>35.6444444444444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/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float" office:value="58.1071428571429" calcext:value-type="float">
            <text:p>58.1071428571429</text:p>
          </table:table-cell>
          <table:table-cell/>
          <table:table-cell office:value-type="float" office:value="35.6666666666667" calcext:value-type="float">
            <text:p>35.6666666666667</text:p>
          </table:table-cell>
        </table:table-row>
        <table:table-row table:style-name="ro1">
          <table:table-cell office:value-type="float" office:value="43.3333333333333" calcext:value-type="float">
            <text:p>43.3333333333333</text:p>
          </table:table-cell>
          <table:table-cell/>
          <table:table-cell office:value-type="float" office:value="35.7037037037037" calcext:value-type="float">
            <text:p>35.70370370370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35.7111111111111" calcext:value-type="float">
            <text:p>35.7111111111111</text:p>
          </table:table-cell>
        </table:table-row>
        <table:table-row table:style-name="ro1">
          <table:table-cell office:value-type="float" office:value="32.3181818181818" calcext:value-type="float">
            <text:p>32.3181818181818</text:p>
          </table:table-cell>
          <table:table-cell/>
          <table:table-cell office:value-type="float" office:value="35.7368421052632" calcext:value-type="float">
            <text:p>35.7368421052632</text:p>
          </table:table-cell>
        </table:table-row>
        <table:table-row table:style-name="ro1">
          <table:table-cell office:value-type="float" office:value="34.4479166666667" calcext:value-type="float">
            <text:p>34.4479166666667</text:p>
          </table:table-cell>
          <table:table-cell/>
          <table:table-cell office:value-type="float" office:value="35.7666666666667" calcext:value-type="float">
            <text:p>35.7666666666667</text:p>
          </table:table-cell>
        </table:table-row>
        <table:table-row table:style-name="ro1">
          <table:table-cell office:value-type="float" office:value="37.3478260869565" calcext:value-type="float">
            <text:p>37.3478260869565</text:p>
          </table:table-cell>
          <table:table-cell/>
          <table:table-cell office:value-type="float" office:value="35.7727272727273" calcext:value-type="float">
            <text:p>35.7727272727273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/>
          <table:table-cell office:value-type="float" office:value="35.7777777777778" calcext:value-type="float">
            <text:p>35.7777777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0.0185185185185185" calcext:value-type="float">
            <text:p>0.0185185185185185</text:p>
          </table:table-cell>
          <table:table-cell/>
          <table:table-cell office:value-type="float" office:value="35.8285714285714" calcext:value-type="float">
            <text:p>35.8285714285714</text:p>
          </table:table-cell>
        </table:table-row>
        <table:table-row table:style-name="ro1">
          <table:table-cell office:value-type="float" office:value="53.4545454545455" calcext:value-type="float">
            <text:p>53.4545454545455</text:p>
          </table:table-cell>
          <table:table-cell/>
          <table:table-cell office:value-type="float" office:value="35.8571428571429" calcext:value-type="float">
            <text:p>35.8571428571429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/>
          <table:table-cell office:value-type="float" office:value="35.8928571428571" calcext:value-type="float">
            <text:p>35.8928571428571</text:p>
          </table:table-cell>
        </table:table-row>
        <table:table-row table:style-name="ro1">
          <table:table-cell office:value-type="float" office:value="40.8666666666667" calcext:value-type="float">
            <text:p>40.8666666666667</text:p>
          </table:table-cell>
          <table:table-cell/>
          <table:table-cell office:value-type="float" office:value="35.9508196721311" calcext:value-type="float">
            <text:p>35.9508196721311</text:p>
          </table:table-cell>
        </table:table-row>
        <table:table-row table:style-name="ro1">
          <table:table-cell office:value-type="float" office:value="60.2727272727273" calcext:value-type="float">
            <text:p>60.2727272727273</text:p>
          </table:table-cell>
          <table:table-cell/>
          <table:table-cell office:value-type="float" office:value="35.9565217391304" calcext:value-type="float">
            <text:p>35.9565217391304</text:p>
          </table:table-cell>
        </table:table-row>
        <table:table-row table:style-name="ro1">
          <table:table-cell office:value-type="float" office:value="23.9056603773585" calcext:value-type="float">
            <text:p>23.9056603773585</text:p>
          </table:table-cell>
          <table:table-cell/>
          <table:table-cell office:value-type="float" office:value="35.9714285714286" calcext:value-type="float">
            <text:p>35.9714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5.9833333333333" calcext:value-type="float">
            <text:p>35.9833333333333</text:p>
          </table:table-cell>
        </table:table-row>
        <table:table-row table:style-name="ro1">
          <table:table-cell office:value-type="float" office:value="63.15625" calcext:value-type="float">
            <text:p>63.1562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.9583333333333" calcext:value-type="float">
            <text:p>17.9583333333333</text:p>
          </table:table-cell>
          <table:table-cell/>
          <table:table-cell office:value-type="float" office:value="36.0096153846154" calcext:value-type="float">
            <text:p>36.0096153846154</text:p>
          </table:table-cell>
        </table:table-row>
        <table:table-row table:style-name="ro1">
          <table:table-cell office:value-type="float" office:value="37.5454545454545" calcext:value-type="float">
            <text:p>37.5454545454545</text:p>
          </table:table-cell>
          <table:table-cell/>
          <table:table-cell office:value-type="float" office:value="36.0277777777778" calcext:value-type="float">
            <text:p>36.0277777777778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/>
          <table:table-cell office:value-type="float" office:value="36.037037037037" calcext:value-type="float">
            <text:p>36.037037037037</text:p>
          </table:table-cell>
        </table:table-row>
        <table:table-row table:style-name="ro1">
          <table:table-cell office:value-type="float" office:value="37.3953488372093" calcext:value-type="float">
            <text:p>37.3953488372093</text:p>
          </table:table-cell>
          <table:table-cell/>
          <table:table-cell office:value-type="float" office:value="36.0454545454545" calcext:value-type="float">
            <text:p>36.0454545454545</text:p>
          </table:table-cell>
        </table:table-row>
        <table:table-row table:style-name="ro1">
          <table:table-cell office:value-type="float" office:value="35.6666666666667" calcext:value-type="float">
            <text:p>35.6666666666667</text:p>
          </table:table-cell>
          <table:table-cell/>
          <table:table-cell office:value-type="float" office:value="36.0588235294118" calcext:value-type="float">
            <text:p>36.0588235294118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/>
          <table:table-cell office:value-type="float" office:value="36.0591715976331" calcext:value-type="float">
            <text:p>36.0591715976331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/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/>
          <table:table-cell office:value-type="float" office:value="36.0645161290323" calcext:value-type="float">
            <text:p>36.0645161290323</text:p>
          </table:table-cell>
        </table:table-row>
        <table:table-row table:style-name="ro1">
          <table:table-cell office:value-type="float" office:value="25.8636363636364" calcext:value-type="float">
            <text:p>25.8636363636364</text:p>
          </table:table-cell>
          <table:table-cell/>
          <table:table-cell office:value-type="float" office:value="36.0833333333333" calcext:value-type="float">
            <text:p>36.0833333333333</text:p>
          </table:table-cell>
        </table:table-row>
        <table:table-row table:style-name="ro1">
          <table:table-cell office:value-type="float" office:value="44.2222222222222" calcext:value-type="float">
            <text:p>44.2222222222222</text:p>
          </table:table-cell>
          <table:table-cell/>
          <table:table-cell office:value-type="float" office:value="36.0952380952381" calcext:value-type="float">
            <text:p>36.0952380952381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/>
          <table:table-cell office:value-type="float" office:value="36.1354166666667" calcext:value-type="float">
            <text:p>36.1354166666667</text:p>
          </table:table-cell>
        </table:table-row>
        <table:table-row table:style-name="ro1">
          <table:table-cell office:value-type="float" office:value="40.3333333333333" calcext:value-type="float">
            <text:p>40.3333333333333</text:p>
          </table:table-cell>
          <table:table-cell/>
          <table:table-cell office:value-type="float" office:value="36.1627906976744" calcext:value-type="float">
            <text:p>36.1627906976744</text:p>
          </table:table-cell>
        </table:table-row>
        <table:table-row table:style-name="ro1">
          <table:table-cell office:value-type="float" office:value="61.3333333333333" calcext:value-type="float">
            <text:p>61.3333333333333</text:p>
          </table:table-cell>
          <table:table-cell/>
          <table:table-cell office:value-type="float" office:value="36.1833333333333" calcext:value-type="float">
            <text:p>36.1833333333333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/>
          <table:table-cell office:value-type="float" office:value="36.2142857142857" calcext:value-type="float">
            <text:p>36.2142857142857</text:p>
          </table:table-cell>
        </table:table-row>
        <table:table-row table:style-name="ro1">
          <table:table-cell office:value-type="float" office:value="33.8947368421053" calcext:value-type="float">
            <text:p>33.8947368421053</text:p>
          </table:table-cell>
          <table:table-cell/>
          <table:table-cell office:value-type="float" office:value="36.2444444444444" calcext:value-type="float">
            <text:p>36.2444444444444</text:p>
          </table:table-cell>
        </table:table-row>
        <table:table-row table:style-name="ro1">
          <table:table-cell office:value-type="float" office:value="38.3181818181818" calcext:value-type="float">
            <text:p>38.3181818181818</text:p>
          </table:table-cell>
          <table:table-cell/>
          <table:table-cell office:value-type="float" office:value="36.2857142857143" calcext:value-type="float">
            <text:p>36.28571428571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6.2857142857143" calcext:value-type="float">
            <text:p>36.2857142857143</text:p>
          </table:table-cell>
        </table:table-row>
        <table:table-row table:style-name="ro1">
          <table:table-cell office:value-type="float" office:value="45.5217391304348" calcext:value-type="float">
            <text:p>45.5217391304348</text:p>
          </table:table-cell>
          <table:table-cell/>
          <table:table-cell office:value-type="float" office:value="36.2857142857143" calcext:value-type="float">
            <text:p>36.2857142857143</text:p>
          </table:table-cell>
        </table:table-row>
        <table:table-row table:style-name="ro1">
          <table:table-cell office:value-type="float" office:value="56.7857142857143" calcext:value-type="float">
            <text:p>56.7857142857143</text:p>
          </table:table-cell>
          <table:table-cell/>
          <table:table-cell office:value-type="float" office:value="36.2975460122699" calcext:value-type="float">
            <text:p>36.2975460122699</text:p>
          </table:table-cell>
        </table:table-row>
        <table:table-row table:style-name="ro1">
          <table:table-cell office:value-type="float" office:value="46.8333333333333" calcext:value-type="float">
            <text:p>46.8333333333333</text:p>
          </table:table-cell>
          <table:table-cell/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/>
          <table:table-cell office:value-type="float" office:value="36.3230769230769" calcext:value-type="float">
            <text:p>36.3230769230769</text:p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/>
          <table:table-cell office:value-type="float" office:value="36.3333333333333" calcext:value-type="float">
            <text:p>36.3333333333333</text:p>
          </table:table-cell>
        </table:table-row>
        <table:table-row table:style-name="ro1">
          <table:table-cell office:value-type="float" office:value="49.0169491525424" calcext:value-type="float">
            <text:p>49.0169491525424</text:p>
          </table:table-cell>
          <table:table-cell/>
          <table:table-cell office:value-type="float" office:value="36.3671875" calcext:value-type="float">
            <text:p>36.3671875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/>
          <table:table-cell office:value-type="float" office:value="36.3758865248227" calcext:value-type="float">
            <text:p>36.3758865248227</text:p>
          </table:table-cell>
        </table:table-row>
        <table:table-row table:style-name="ro1">
          <table:table-cell office:value-type="float" office:value="57.9090909090909" calcext:value-type="float">
            <text:p>57.9090909090909</text:p>
          </table:table-cell>
          <table:table-cell/>
          <table:table-cell office:value-type="float" office:value="36.4634146341463" calcext:value-type="float">
            <text:p>36.4634146341463</text:p>
          </table:table-cell>
        </table:table-row>
        <table:table-row table:style-name="ro1">
          <table:table-cell office:value-type="float" office:value="41.9444444444444" calcext:value-type="float">
            <text:p>41.9444444444444</text:p>
          </table:table-cell>
          <table:table-cell/>
          <table:table-cell office:value-type="float" office:value="36.46875" calcext:value-type="float">
            <text:p>36.46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6.4736842105263" calcext:value-type="float">
            <text:p>36.473684210526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/>
          <table:table-cell office:value-type="float" office:value="36.5625" calcext:value-type="float">
            <text:p>36.562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/>
          <table:table-cell office:value-type="float" office:value="36.5777777777778" calcext:value-type="float">
            <text:p>36.5777777777778</text:p>
          </table:table-cell>
        </table:table-row>
        <table:table-row table:style-name="ro1">
          <table:table-cell office:value-type="float" office:value="27.9285714285714" calcext:value-type="float">
            <text:p>27.9285714285714</text:p>
          </table:table-cell>
          <table:table-cell/>
          <table:table-cell office:value-type="float" office:value="36.5833333333333" calcext:value-type="float">
            <text:p>36.5833333333333</text:p>
          </table:table-cell>
        </table:table-row>
        <table:table-row table:style-name="ro1">
          <table:table-cell office:value-type="float" office:value="37.6086956521739" calcext:value-type="float">
            <text:p>37.6086956521739</text:p>
          </table:table-cell>
          <table:table-cell/>
          <table:table-cell office:value-type="float" office:value="36.6666666666667" calcext:value-type="float">
            <text:p>36.666666666666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/>
          <table:table-cell office:value-type="float" office:value="36.6666666666667" calcext:value-type="float">
            <text:p>36.666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6.6985074626866" calcext:value-type="float">
            <text:p>36.6985074626866</text:p>
          </table:table-cell>
        </table:table-row>
        <table:table-row table:style-name="ro1">
          <table:table-cell office:value-type="float" office:value="40.8333333333333" calcext:value-type="float">
            <text:p>40.8333333333333</text:p>
          </table:table-cell>
          <table:table-cell/>
          <table:table-cell office:value-type="float" office:value="36.7083333333333" calcext:value-type="float">
            <text:p>36.7083333333333</text:p>
          </table:table-cell>
        </table:table-row>
        <table:table-row table:style-name="ro1">
          <table:table-cell office:value-type="float" office:value="63.6190476190476" calcext:value-type="float">
            <text:p>63.6190476190476</text:p>
          </table:table-cell>
          <table:table-cell/>
          <table:table-cell office:value-type="float" office:value="36.7272727272727" calcext:value-type="float">
            <text:p>36.7272727272727</text:p>
          </table:table-cell>
        </table:table-row>
        <table:table-row table:style-name="ro1">
          <table:table-cell office:value-type="float" office:value="56.0909090909091" calcext:value-type="float">
            <text:p>56.0909090909091</text:p>
          </table:table-cell>
          <table:table-cell/>
          <table:table-cell office:value-type="float" office:value="36.7272727272727" calcext:value-type="float">
            <text:p>36.7272727272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6.746835443038" calcext:value-type="float">
            <text:p>36.746835443038</text:p>
          </table:table-cell>
        </table:table-row>
        <table:table-row table:style-name="ro1">
          <table:table-cell office:value-type="float" office:value="23.5714285714286" calcext:value-type="float">
            <text:p>23.5714285714286</text:p>
          </table:table-cell>
          <table:table-cell/>
          <table:table-cell office:value-type="float" office:value="36.7619047619048" calcext:value-type="float">
            <text:p>36.7619047619048</text:p>
          </table:table-cell>
        </table:table-row>
        <table:table-row table:style-name="ro1">
          <table:table-cell office:value-type="float" office:value="36.7619047619048" calcext:value-type="float">
            <text:p>36.7619047619048</text:p>
          </table:table-cell>
          <table:table-cell/>
          <table:table-cell office:value-type="float" office:value="36.7727272727273" calcext:value-type="float">
            <text:p>36.7727272727273</text:p>
          </table:table-cell>
        </table:table-row>
        <table:table-row table:style-name="ro1">
          <table:table-cell office:value-type="float" office:value="46.7777777777778" calcext:value-type="float">
            <text:p>46.7777777777778</text:p>
          </table:table-cell>
          <table:table-cell/>
          <table:table-cell office:value-type="float" office:value="36.7894736842105" calcext:value-type="float">
            <text:p>36.7894736842105</text:p>
          </table:table-cell>
        </table:table-row>
        <table:table-row table:style-name="ro1">
          <table:table-cell office:value-type="float" office:value="45.7142857142857" calcext:value-type="float">
            <text:p>45.7142857142857</text:p>
          </table:table-cell>
          <table:table-cell/>
          <table:table-cell office:value-type="float" office:value="36.7916666666667" calcext:value-type="float">
            <text:p>36.791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6.8181818181818" calcext:value-type="float">
            <text:p>36.8181818181818</text:p>
          </table:table-cell>
        </table:table-row>
        <table:table-row table:style-name="ro1">
          <table:table-cell office:value-type="float" office:value="41.2894736842105" calcext:value-type="float">
            <text:p>41.2894736842105</text:p>
          </table:table-cell>
          <table:table-cell/>
          <table:table-cell office:value-type="float" office:value="36.8421052631579" calcext:value-type="float">
            <text:p>36.8421052631579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/>
          <table:table-cell office:value-type="float" office:value="36.8636363636364" calcext:value-type="float">
            <text:p>36.8636363636364</text:p>
          </table:table-cell>
        </table:table-row>
        <table:table-row table:style-name="ro1">
          <table:table-cell office:value-type="float" office:value="44.0476190476191" calcext:value-type="float">
            <text:p>44.0476190476191</text:p>
          </table:table-cell>
          <table:table-cell/>
          <table:table-cell office:value-type="float" office:value="36.9032258064516" calcext:value-type="float">
            <text:p>36.9032258064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6.9166666666667" calcext:value-type="float">
            <text:p>36.91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6.9285714285714" calcext:value-type="float">
            <text:p>36.9285714285714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/>
          <table:table-cell office:value-type="float" office:value="36.9565217391304" calcext:value-type="float">
            <text:p>36.9565217391304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.7272727272727" calcext:value-type="float">
            <text:p>48.7272727272727</text:p>
          </table:table-cell>
          <table:table-cell/>
          <table:table-cell office:value-type="float" office:value="37.15" calcext:value-type="float">
            <text:p>37.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7.16" calcext:value-type="float">
            <text:p>37.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7.1666666666667" calcext:value-type="float">
            <text:p>37.166666666666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/>
          <table:table-cell office:value-type="float" office:value="37.1764705882353" calcext:value-type="float">
            <text:p>37.1764705882353</text:p>
          </table:table-cell>
        </table:table-row>
        <table:table-row table:style-name="ro1">
          <table:table-cell office:value-type="float" office:value="24.0384615384615" calcext:value-type="float">
            <text:p>24.0384615384615</text:p>
          </table:table-cell>
          <table:table-cell/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7.2058823529412" calcext:value-type="float">
            <text:p>37.2058823529412</text:p>
          </table:table-cell>
        </table:table-row>
        <table:table-row table:style-name="ro1">
          <table:table-cell office:value-type="float" office:value="23.4827586206897" calcext:value-type="float">
            <text:p>23.4827586206897</text:p>
          </table:table-cell>
          <table:table-cell/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/>
          <table:table-cell office:value-type="float" office:value="37.2727272727273" calcext:value-type="float">
            <text:p>37.2727272727273</text:p>
          </table:table-cell>
        </table:table-row>
        <table:table-row table:style-name="ro1">
          <table:table-cell office:value-type="float" office:value="36.8181818181818" calcext:value-type="float">
            <text:p>36.8181818181818</text:p>
          </table:table-cell>
          <table:table-cell/>
          <table:table-cell office:value-type="float" office:value="37.2857142857143" calcext:value-type="float">
            <text:p>37.2857142857143</text:p>
          </table:table-cell>
        </table:table-row>
        <table:table-row table:style-name="ro1">
          <table:table-cell office:value-type="float" office:value="41.1395348837209" calcext:value-type="float">
            <text:p>41.1395348837209</text:p>
          </table:table-cell>
          <table:table-cell/>
          <table:table-cell office:value-type="float" office:value="37.2916666666667" calcext:value-type="float">
            <text:p>37.291666666666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/>
          <table:table-cell office:value-type="float" office:value="37.3478260869565" calcext:value-type="float">
            <text:p>37.3478260869565</text:p>
          </table:table-cell>
        </table:table-row>
        <table:table-row table:style-name="ro1">
          <table:table-cell office:value-type="float" office:value="40.7619047619048" calcext:value-type="float">
            <text:p>40.7619047619048</text:p>
          </table:table-cell>
          <table:table-cell/>
          <table:table-cell office:value-type="float" office:value="37.3636363636364" calcext:value-type="float">
            <text:p>37.3636363636364</text:p>
          </table:table-cell>
        </table:table-row>
        <table:table-row table:style-name="ro1">
          <table:table-cell office:value-type="float" office:value="42.484375" calcext:value-type="float">
            <text:p>42.484375</text:p>
          </table:table-cell>
          <table:table-cell/>
          <table:table-cell office:value-type="float" office:value="37.3953488372093" calcext:value-type="float">
            <text:p>37.39534883720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57.9473684210526" calcext:value-type="float">
            <text:p>57.9473684210526</text:p>
          </table:table-cell>
          <table:table-cell/>
          <table:table-cell office:value-type="float" office:value="37.4137931034483" calcext:value-type="float">
            <text:p>37.4137931034483</text:p>
          </table:table-cell>
        </table:table-row>
        <table:table-row table:style-name="ro1">
          <table:table-cell office:value-type="float" office:value="24.1951219512195" calcext:value-type="float">
            <text:p>24.1951219512195</text:p>
          </table:table-cell>
          <table:table-cell/>
          <table:table-cell office:value-type="float" office:value="37.4166666666667" calcext:value-type="float">
            <text:p>37.4166666666667</text:p>
          </table:table-cell>
        </table:table-row>
        <table:table-row table:style-name="ro1">
          <table:table-cell office:value-type="float" office:value="61.6153846153846" calcext:value-type="float">
            <text:p>61.6153846153846</text:p>
          </table:table-cell>
          <table:table-cell/>
          <table:table-cell office:value-type="float" office:value="37.4571428571429" calcext:value-type="float">
            <text:p>37.4571428571429</text:p>
          </table:table-cell>
        </table:table-row>
        <table:table-row table:style-name="ro1">
          <table:table-cell office:value-type="float" office:value="39.1538461538462" calcext:value-type="float">
            <text:p>39.1538461538462</text:p>
          </table:table-cell>
          <table:table-cell/>
          <table:table-cell office:value-type="float" office:value="37.5178571428571" calcext:value-type="float">
            <text:p>37.5178571428571</text:p>
          </table:table-cell>
        </table:table-row>
        <table:table-row table:style-name="ro1">
          <table:table-cell office:value-type="float" office:value="53.0909090909091" calcext:value-type="float">
            <text:p>53.0909090909091</text:p>
          </table:table-cell>
          <table:table-cell/>
          <table:table-cell office:value-type="float" office:value="37.5454545454545" calcext:value-type="float">
            <text:p>37.5454545454545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/>
          <table:table-cell office:value-type="float" office:value="37.5666666666667" calcext:value-type="float">
            <text:p>37.5666666666667</text:p>
          </table:table-cell>
        </table:table-row>
        <table:table-row table:style-name="ro1">
          <table:table-cell office:value-type="float" office:value="44.2857142857143" calcext:value-type="float">
            <text:p>44.2857142857143</text:p>
          </table:table-cell>
          <table:table-cell/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44.36" calcext:value-type="float">
            <text:p>44.36</text:p>
          </table:table-cell>
          <table:table-cell/>
          <table:table-cell office:value-type="float" office:value="37.6086956521739" calcext:value-type="float">
            <text:p>37.6086956521739</text:p>
          </table:table-cell>
        </table:table-row>
        <table:table-row table:style-name="ro1">
          <table:table-cell office:value-type="float" office:value="34.1794871794872" calcext:value-type="float">
            <text:p>34.1794871794872</text:p>
          </table:table-cell>
          <table:table-cell/>
          <table:table-cell office:value-type="float" office:value="37.625" calcext:value-type="float">
            <text:p>37.625</text:p>
          </table:table-cell>
        </table:table-row>
        <table:table-row table:style-name="ro1">
          <table:table-cell office:value-type="float" office:value="59.1333333333333" calcext:value-type="float">
            <text:p>59.1333333333333</text:p>
          </table:table-cell>
          <table:table-cell/>
          <table:table-cell office:value-type="float" office:value="37.6333333333333" calcext:value-type="float">
            <text:p>37.633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7.6666666666667" calcext:value-type="float">
            <text:p>37.666666666666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/>
          <table:table-cell office:value-type="float" office:value="37.6923076923077" calcext:value-type="float">
            <text:p>37.6923076923077</text:p>
          </table:table-cell>
        </table:table-row>
        <table:table-row table:style-name="ro1">
          <table:table-cell office:value-type="float" office:value="53.0952380952381" calcext:value-type="float">
            <text:p>53.0952380952381</text:p>
          </table:table-cell>
          <table:table-cell/>
          <table:table-cell office:value-type="float" office:value="37.71" calcext:value-type="float">
            <text:p>37.71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/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7.7586206896552" calcext:value-type="float">
            <text:p>37.7586206896552</text:p>
          </table:table-cell>
        </table:table-row>
        <table:table-row table:style-name="ro1">
          <table:table-cell office:value-type="float" office:value="38.8461538461538" calcext:value-type="float">
            <text:p>38.8461538461538</text:p>
          </table:table-cell>
          <table:table-cell/>
          <table:table-cell office:value-type="float" office:value="37.7777777777778" calcext:value-type="float">
            <text:p>37.7777777777778</text:p>
          </table:table-cell>
        </table:table-row>
        <table:table-row table:style-name="ro1">
          <table:table-cell office:value-type="float" office:value="65.3333333333333" calcext:value-type="float">
            <text:p>65.3333333333333</text:p>
          </table:table-cell>
          <table:table-cell/>
          <table:table-cell office:value-type="float" office:value="37.78125" calcext:value-type="float">
            <text:p>37.78125</text:p>
          </table:table-cell>
        </table:table-row>
        <table:table-row table:style-name="ro1">
          <table:table-cell office:value-type="float" office:value="97.3333333333333" calcext:value-type="float">
            <text:p>97.3333333333333</text:p>
          </table:table-cell>
          <table:table-cell/>
          <table:table-cell office:value-type="float" office:value="37.78125" calcext:value-type="float">
            <text:p>37.78125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/>
          <table:table-cell office:value-type="float" office:value="37.7931034482759" calcext:value-type="float">
            <text:p>37.7931034482759</text:p>
          </table:table-cell>
        </table:table-row>
        <table:table-row table:style-name="ro1">
          <table:table-cell office:value-type="float" office:value="46.8846153846154" calcext:value-type="float">
            <text:p>46.8846153846154</text:p>
          </table:table-cell>
          <table:table-cell/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/>
          <table:table-cell office:value-type="float" office:value="37.8333333333333" calcext:value-type="float">
            <text:p>37.8333333333333</text:p>
          </table:table-cell>
        </table:table-row>
        <table:table-row table:style-name="ro1">
          <table:table-cell office:value-type="float" office:value="39.2413793103448" calcext:value-type="float">
            <text:p>39.2413793103448</text:p>
          </table:table-cell>
          <table:table-cell/>
          <table:table-cell office:value-type="float" office:value="37.8421052631579" calcext:value-type="float">
            <text:p>37.8421052631579</text:p>
          </table:table-cell>
        </table:table-row>
        <table:table-row table:style-name="ro1">
          <table:table-cell office:value-type="float" office:value="43.7916666666667" calcext:value-type="float">
            <text:p>43.7916666666667</text:p>
          </table:table-cell>
          <table:table-cell/>
          <table:table-cell office:value-type="float" office:value="37.8636363636364" calcext:value-type="float">
            <text:p>37.8636363636364</text:p>
          </table:table-cell>
        </table:table-row>
        <table:table-row table:style-name="ro1">
          <table:table-cell office:value-type="float" office:value="48.2173913043478" calcext:value-type="float">
            <text:p>48.2173913043478</text:p>
          </table:table-cell>
          <table:table-cell/>
          <table:table-cell office:value-type="float" office:value="37.8846153846154" calcext:value-type="float">
            <text:p>37.8846153846154</text:p>
          </table:table-cell>
        </table:table-row>
        <table:table-row table:style-name="ro1">
          <table:table-cell office:value-type="float" office:value="38.1363636363636" calcext:value-type="float">
            <text:p>38.1363636363636</text:p>
          </table:table-cell>
          <table:table-cell/>
          <table:table-cell office:value-type="float" office:value="37.8932384341637" calcext:value-type="float">
            <text:p>37.8932384341637</text:p>
          </table:table-cell>
        </table:table-row>
        <table:table-row table:style-name="ro1">
          <table:table-cell office:value-type="float" office:value="53.3548387096774" calcext:value-type="float">
            <text:p>53.3548387096774</text:p>
          </table:table-cell>
          <table:table-cell/>
          <table:table-cell office:value-type="float" office:value="37.9333333333333" calcext:value-type="float">
            <text:p>37.9333333333333</text:p>
          </table:table-cell>
        </table:table-row>
        <table:table-row table:style-name="ro1">
          <table:table-cell office:value-type="float" office:value="27.152" calcext:value-type="float">
            <text:p>27.15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.0222222222222" calcext:value-type="float">
            <text:p>53.022222222222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.3333333333333" calcext:value-type="float">
            <text:p>89.3333333333333</text:p>
          </table:table-cell>
          <table:table-cell/>
          <table:table-cell office:value-type="float" office:value="38.0189873417722" calcext:value-type="float">
            <text:p>38.01898734177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8.047619047619" calcext:value-type="float">
            <text:p>38.047619047619</text:p>
          </table:table-cell>
        </table:table-row>
        <table:table-row table:style-name="ro1">
          <table:table-cell office:value-type="float" office:value="49.0909090909091" calcext:value-type="float">
            <text:p>49.0909090909091</text:p>
          </table:table-cell>
          <table:table-cell/>
          <table:table-cell office:value-type="float" office:value="38.047619047619" calcext:value-type="float">
            <text:p>38.047619047619</text:p>
          </table:table-cell>
        </table:table-row>
        <table:table-row table:style-name="ro1">
          <table:table-cell office:value-type="float" office:value="83.4285714285714" calcext:value-type="float">
            <text:p>83.4285714285714</text:p>
          </table:table-cell>
          <table:table-cell/>
          <table:table-cell office:value-type="float" office:value="38.0925925925926" calcext:value-type="float">
            <text:p>38.0925925925926</text:p>
          </table:table-cell>
        </table:table-row>
        <table:table-row table:style-name="ro1">
          <table:table-cell office:value-type="float" office:value="39.2926829268293" calcext:value-type="float">
            <text:p>39.2926829268293</text:p>
          </table:table-cell>
          <table:table-cell/>
          <table:table-cell office:value-type="float" office:value="38.1071428571429" calcext:value-type="float">
            <text:p>38.1071428571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8.1363636363636" calcext:value-type="float">
            <text:p>38.1363636363636</text:p>
          </table:table-cell>
        </table:table-row>
        <table:table-row table:style-name="ro1">
          <table:table-cell office:value-type="float" office:value="33.741935483871" calcext:value-type="float">
            <text:p>33.741935483871</text:p>
          </table:table-cell>
          <table:table-cell/>
          <table:table-cell office:value-type="float" office:value="38.1609195402299" calcext:value-type="float">
            <text:p>38.1609195402299</text:p>
          </table:table-cell>
        </table:table-row>
        <table:table-row table:style-name="ro1">
          <table:table-cell office:value-type="float" office:value="46.4782608695652" calcext:value-type="float">
            <text:p>46.4782608695652</text:p>
          </table:table-cell>
          <table:table-cell/>
          <table:table-cell office:value-type="float" office:value="38.1714285714286" calcext:value-type="float">
            <text:p>38.1714285714286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/>
          <table:table-cell office:value-type="float" office:value="38.1724137931034" calcext:value-type="float">
            <text:p>38.1724137931034</text:p>
          </table:table-cell>
        </table:table-row>
        <table:table-row table:style-name="ro1">
          <table:table-cell office:value-type="float" office:value="47.7407407407407" calcext:value-type="float">
            <text:p>47.7407407407407</text:p>
          </table:table-cell>
          <table:table-cell/>
          <table:table-cell office:value-type="float" office:value="38.2578125" calcext:value-type="float">
            <text:p>38.2578125</text:p>
          </table:table-cell>
        </table:table-row>
        <table:table-row table:style-name="ro1">
          <table:table-cell office:value-type="float" office:value="87.3333333333333" calcext:value-type="float">
            <text:p>87.3333333333333</text:p>
          </table:table-cell>
          <table:table-cell/>
          <table:table-cell office:value-type="float" office:value="38.2592592592593" calcext:value-type="float">
            <text:p>38.2592592592593</text:p>
          </table:table-cell>
        </table:table-row>
        <table:table-row table:style-name="ro1">
          <table:table-cell office:value-type="float" office:value="52.2857142857143" calcext:value-type="float">
            <text:p>52.2857142857143</text:p>
          </table:table-cell>
          <table:table-cell/>
          <table:table-cell office:value-type="float" office:value="38.2790697674419" calcext:value-type="float">
            <text:p>38.2790697674419</text:p>
          </table:table-cell>
        </table:table-row>
        <table:table-row table:style-name="ro1">
          <table:table-cell office:value-type="float" office:value="35.0434782608696" calcext:value-type="float">
            <text:p>35.0434782608696</text:p>
          </table:table-cell>
          <table:table-cell/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69.9583333333333" calcext:value-type="float">
            <text:p>69.9583333333333</text:p>
          </table:table-cell>
          <table:table-cell/>
          <table:table-cell office:value-type="float" office:value="38.3181818181818" calcext:value-type="float">
            <text:p>38.3181818181818</text:p>
          </table:table-cell>
        </table:table-row>
        <table:table-row table:style-name="ro1">
          <table:table-cell office:value-type="float" office:value="16.2258064516129" calcext:value-type="float">
            <text:p>16.2258064516129</text:p>
          </table:table-cell>
          <table:table-cell/>
          <table:table-cell office:value-type="float" office:value="38.3448275862069" calcext:value-type="float">
            <text:p>38.3448275862069</text:p>
          </table:table-cell>
        </table:table-row>
        <table:table-row table:style-name="ro1">
          <table:table-cell office:value-type="float" office:value="59.4324324324324" calcext:value-type="float">
            <text:p>59.4324324324324</text:p>
          </table:table-cell>
          <table:table-cell/>
          <table:table-cell office:value-type="float" office:value="38.3888888888889" calcext:value-type="float">
            <text:p>38.3888888888889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/>
          <table:table-cell office:value-type="float" office:value="38.390243902439" calcext:value-type="float">
            <text:p>38.390243902439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/>
          <table:table-cell office:value-type="float" office:value="38.4137931034483" calcext:value-type="float">
            <text:p>38.4137931034483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/>
          <table:table-cell office:value-type="float" office:value="38.4166666666667" calcext:value-type="float">
            <text:p>38.4166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8.4677419354839" calcext:value-type="float">
            <text:p>38.4677419354839</text:p>
          </table:table-cell>
        </table:table-row>
        <table:table-row table:style-name="ro1">
          <table:table-cell office:value-type="float" office:value="35.3333333333333" calcext:value-type="float">
            <text:p>35.3333333333333</text:p>
          </table:table-cell>
          <table:table-cell/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48.1363636363636" calcext:value-type="float">
            <text:p>48.1363636363636</text:p>
          </table:table-cell>
          <table:table-cell/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90.6666666666667" calcext:value-type="float">
            <text:p>90.6666666666667</text:p>
          </table:table-cell>
          <table:table-cell/>
          <table:table-cell office:value-type="float" office:value="38.5294117647059" calcext:value-type="float">
            <text:p>38.5294117647059</text:p>
          </table:table-cell>
        </table:table-row>
        <table:table-row table:style-name="ro1">
          <table:table-cell office:value-type="float" office:value="51.4615384615385" calcext:value-type="float">
            <text:p>51.4615384615385</text:p>
          </table:table-cell>
          <table:table-cell/>
          <table:table-cell office:value-type="float" office:value="38.5573770491803" calcext:value-type="float">
            <text:p>38.5573770491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8.5789473684211" calcext:value-type="float">
            <text:p>38.5789473684211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/>
          <table:table-cell office:value-type="float" office:value="38.5828571428571" calcext:value-type="float">
            <text:p>38.5828571428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/>
          <table:table-cell office:value-type="float" office:value="38.6315789473684" calcext:value-type="float">
            <text:p>38.6315789473684</text:p>
          </table:table-cell>
        </table:table-row>
        <table:table-row table:style-name="ro1">
          <table:table-cell office:value-type="float" office:value="35.7037037037037" calcext:value-type="float">
            <text:p>35.7037037037037</text:p>
          </table:table-cell>
          <table:table-cell/>
          <table:table-cell office:value-type="float" office:value="38.6666666666667" calcext:value-type="float">
            <text:p>38.6666666666667</text:p>
          </table:table-cell>
        </table:table-row>
        <table:table-row table:style-name="ro1">
          <table:table-cell office:value-type="float" office:value="53.5555555555556" calcext:value-type="float">
            <text:p>53.5555555555556</text:p>
          </table:table-cell>
          <table:table-cell/>
          <table:table-cell office:value-type="float" office:value="38.7894736842105" calcext:value-type="float">
            <text:p>38.7894736842105</text:p>
          </table:table-cell>
        </table:table-row>
        <table:table-row table:style-name="ro1">
          <table:table-cell office:value-type="float" office:value="73.6666666666667" calcext:value-type="float">
            <text:p>73.6666666666667</text:p>
          </table:table-cell>
          <table:table-cell/>
          <table:table-cell office:value-type="float" office:value="38.8095238095238" calcext:value-type="float">
            <text:p>38.8095238095238</text:p>
          </table:table-cell>
        </table:table-row>
        <table:table-row table:style-name="ro1">
          <table:table-cell office:value-type="float" office:value="48.6666666666667" calcext:value-type="float">
            <text:p>48.6666666666667</text:p>
          </table:table-cell>
          <table:table-cell/>
          <table:table-cell office:value-type="float" office:value="38.8148148148148" calcext:value-type="float">
            <text:p>38.8148148148148</text:p>
          </table:table-cell>
        </table:table-row>
        <table:table-row table:style-name="ro1">
          <table:table-cell office:value-type="float" office:value="59.9090909090909" calcext:value-type="float">
            <text:p>59.9090909090909</text:p>
          </table:table-cell>
          <table:table-cell/>
          <table:table-cell office:value-type="float" office:value="38.8461538461538" calcext:value-type="float">
            <text:p>38.8461538461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38.8833333333333" calcext:value-type="float">
            <text:p>38.8833333333333</text:p>
          </table:table-cell>
        </table:table-row>
        <table:table-row table:style-name="ro1">
          <table:table-cell office:value-type="float" office:value="35.0481927710843" calcext:value-type="float">
            <text:p>35.0481927710843</text:p>
          </table:table-cell>
          <table:table-cell/>
          <table:table-cell office:value-type="float" office:value="38.9047619047619" calcext:value-type="float">
            <text:p>38.9047619047619</text:p>
          </table:table-cell>
        </table:table-row>
        <table:table-row table:style-name="ro1">
          <table:table-cell office:value-type="float" office:value="19.9545454545455" calcext:value-type="float">
            <text:p>19.9545454545455</text:p>
          </table:table-cell>
          <table:table-cell/>
          <table:table-cell office:value-type="float" office:value="38.9375" calcext:value-type="float">
            <text:p>38.9375</text:p>
          </table:table-cell>
        </table:table-row>
        <table:table-row table:style-name="ro1">
          <table:table-cell office:value-type="float" office:value="99.6666666666667" calcext:value-type="float">
            <text:p>99.6666666666667</text:p>
          </table:table-cell>
          <table:table-cell/>
          <table:table-cell office:value-type="float" office:value="38.9523809523809" calcext:value-type="float">
            <text:p>38.9523809523809</text:p>
          </table:table-cell>
        </table:table-row>
        <table:table-row table:style-name="ro1">
          <table:table-cell office:value-type="float" office:value="53.4230769230769" calcext:value-type="float">
            <text:p>53.4230769230769</text:p>
          </table:table-cell>
          <table:table-cell/>
          <table:table-cell office:value-type="float" office:value="38.9661016949153" calcext:value-type="float">
            <text:p>38.96610169491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39.0384615384615" calcext:value-type="float">
            <text:p>39.0384615384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9.0571428571429" calcext:value-type="float">
            <text:p>39.0571428571429</text:p>
          </table:table-cell>
        </table:table-row>
        <table:table-row table:style-name="ro1">
          <table:table-cell office:value-type="float" office:value="54.6666666666667" calcext:value-type="float">
            <text:p>54.6666666666667</text:p>
          </table:table-cell>
          <table:table-cell/>
          <table:table-cell office:value-type="float" office:value="39.0952380952381" calcext:value-type="float">
            <text:p>39.0952380952381</text:p>
          </table:table-cell>
        </table:table-row>
        <table:table-row table:style-name="ro1">
          <table:table-cell office:value-type="float" office:value="76.2272727272727" calcext:value-type="float">
            <text:p>76.2272727272727</text:p>
          </table:table-cell>
          <table:table-cell/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9.125" calcext:value-type="float">
            <text:p>39.125</text:p>
          </table:table-cell>
        </table:table-row>
        <table:table-row table:style-name="ro1">
          <table:table-cell office:value-type="float" office:value="16.9473684210526" calcext:value-type="float">
            <text:p>16.9473684210526</text:p>
          </table:table-cell>
          <table:table-cell/>
          <table:table-cell office:value-type="float" office:value="39.1428571428571" calcext:value-type="float">
            <text:p>39.1428571428571</text:p>
          </table:table-cell>
        </table:table-row>
        <table:table-row table:style-name="ro1">
          <table:table-cell office:value-type="float" office:value="48.9230769230769" calcext:value-type="float">
            <text:p>48.9230769230769</text:p>
          </table:table-cell>
          <table:table-cell/>
          <table:table-cell office:value-type="float" office:value="39.1538461538462" calcext:value-type="float">
            <text:p>39.1538461538462</text:p>
          </table:table-cell>
        </table:table-row>
        <table:table-row table:style-name="ro1">
          <table:table-cell office:value-type="float" office:value="48.3703703703704" calcext:value-type="float">
            <text:p>48.3703703703704</text:p>
          </table:table-cell>
          <table:table-cell/>
          <table:table-cell office:value-type="float" office:value="39.16" calcext:value-type="float">
            <text:p>39.16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/>
          <table:table-cell office:value-type="float" office:value="39.169014084507" calcext:value-type="float">
            <text:p>39.169014084507</text:p>
          </table:table-cell>
        </table:table-row>
        <table:table-row table:style-name="ro1">
          <table:table-cell office:value-type="float" office:value="46.8947368421053" calcext:value-type="float">
            <text:p>46.8947368421053</text:p>
          </table:table-cell>
          <table:table-cell/>
          <table:table-cell office:value-type="float" office:value="39.1785714285714" calcext:value-type="float">
            <text:p>39.178571428571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/>
          <table:table-cell office:value-type="float" office:value="39.1860465116279" calcext:value-type="float">
            <text:p>39.1860465116279</text:p>
          </table:table-cell>
        </table:table-row>
        <table:table-row table:style-name="ro1">
          <table:table-cell office:value-type="float" office:value="42.952380952381" calcext:value-type="float">
            <text:p>42.952380952381</text:p>
          </table:table-cell>
          <table:table-cell/>
          <table:table-cell office:value-type="float" office:value="39.2142857142857" calcext:value-type="float">
            <text:p>39.2142857142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9.2222222222222" calcext:value-type="float">
            <text:p>39.2222222222222</text:p>
          </table:table-cell>
        </table:table-row>
        <table:table-row table:style-name="ro1">
          <table:table-cell office:value-type="float" office:value="43.7692307692308" calcext:value-type="float">
            <text:p>43.7692307692308</text:p>
          </table:table-cell>
          <table:table-cell/>
          <table:table-cell office:value-type="float" office:value="39.2413793103448" calcext:value-type="float">
            <text:p>39.2413793103448</text:p>
          </table:table-cell>
        </table:table-row>
        <table:table-row table:style-name="ro1">
          <table:table-cell office:value-type="float" office:value="64.6190476190476" calcext:value-type="float">
            <text:p>64.6190476190476</text:p>
          </table:table-cell>
          <table:table-cell/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60.5555555555556" calcext:value-type="float">
            <text:p>60.5555555555556</text:p>
          </table:table-cell>
          <table:table-cell/>
          <table:table-cell office:value-type="float" office:value="39.2926829268293" calcext:value-type="float">
            <text:p>39.2926829268293</text:p>
          </table:table-cell>
        </table:table-row>
        <table:table-row table:style-name="ro1">
          <table:table-cell office:value-type="float" office:value="21.1041666666667" calcext:value-type="float">
            <text:p>21.1041666666667</text:p>
          </table:table-cell>
          <table:table-cell/>
          <table:table-cell office:value-type="float" office:value="39.3529411764706" calcext:value-type="float">
            <text:p>39.3529411764706</text:p>
          </table:table-cell>
        </table:table-row>
        <table:table-row table:style-name="ro1">
          <table:table-cell office:value-type="float" office:value="85.7777777777778" calcext:value-type="float">
            <text:p>85.7777777777778</text:p>
          </table:table-cell>
          <table:table-cell/>
          <table:table-cell office:value-type="float" office:value="39.36" calcext:value-type="float">
            <text:p>39.36</text:p>
          </table:table-cell>
        </table:table-row>
        <table:table-row table:style-name="ro1">
          <table:table-cell office:value-type="float" office:value="50.2272727272727" calcext:value-type="float">
            <text:p>50.2272727272727</text:p>
          </table:table-cell>
          <table:table-cell/>
          <table:table-cell office:value-type="float" office:value="39.3636363636364" calcext:value-type="float">
            <text:p>39.3636363636364</text:p>
          </table:table-cell>
        </table:table-row>
        <table:table-row table:style-name="ro1">
          <table:table-cell office:value-type="float" office:value="61.3478260869565" calcext:value-type="float">
            <text:p>61.3478260869565</text:p>
          </table:table-cell>
          <table:table-cell/>
          <table:table-cell office:value-type="float" office:value="39.4444444444444" calcext:value-type="float">
            <text:p>39.4444444444444</text:p>
          </table:table-cell>
        </table:table-row>
        <table:table-row table:style-name="ro1">
          <table:table-cell office:value-type="float" office:value="52.7619047619048" calcext:value-type="float">
            <text:p>52.7619047619048</text:p>
          </table:table-cell>
          <table:table-cell/>
          <table:table-cell office:value-type="float" office:value="39.4782608695652" calcext:value-type="float">
            <text:p>39.4782608695652</text:p>
          </table:table-cell>
        </table:table-row>
        <table:table-row table:style-name="ro1">
          <table:table-cell office:value-type="float" office:value="59.1764705882353" calcext:value-type="float">
            <text:p>59.1764705882353</text:p>
          </table:table-cell>
          <table:table-cell/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44.0416666666667" calcext:value-type="float">
            <text:p>44.0416666666667</text:p>
          </table:table-cell>
          <table:table-cell/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float" office:value="33.9852941176471" calcext:value-type="float">
            <text:p>33.9852941176471</text:p>
          </table:table-cell>
          <table:table-cell/>
          <table:table-cell office:value-type="float" office:value="39.5675675675676" calcext:value-type="float">
            <text:p>39.5675675675676</text:p>
          </table:table-cell>
        </table:table-row>
        <table:table-row table:style-name="ro1">
          <table:table-cell office:value-type="float" office:value="40.3846153846154" calcext:value-type="float">
            <text:p>40.3846153846154</text:p>
          </table:table-cell>
          <table:table-cell/>
          <table:table-cell office:value-type="float" office:value="39.5730337078652" calcext:value-type="float">
            <text:p>39.573033707865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/>
          <table:table-cell office:value-type="float" office:value="39.5988372093023" calcext:value-type="float">
            <text:p>39.5988372093023</text:p>
          </table:table-cell>
        </table:table-row>
        <table:table-row table:style-name="ro1">
          <table:table-cell office:value-type="float" office:value="73.4285714285714" calcext:value-type="float">
            <text:p>73.4285714285714</text:p>
          </table:table-cell>
          <table:table-cell/>
          <table:table-cell office:value-type="float" office:value="39.6153846153846" calcext:value-type="float">
            <text:p>39.6153846153846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/>
          <table:table-cell office:value-type="float" office:value="39.6428571428571" calcext:value-type="float">
            <text:p>39.6428571428571</text:p>
          </table:table-cell>
        </table:table-row>
        <table:table-row table:style-name="ro1">
          <table:table-cell office:value-type="float" office:value="34.2417582417582" calcext:value-type="float">
            <text:p>34.2417582417582</text:p>
          </table:table-cell>
          <table:table-cell/>
          <table:table-cell office:value-type="float" office:value="39.6470588235294" calcext:value-type="float">
            <text:p>39.6470588235294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/>
          <table:table-cell office:value-type="float" office:value="39.6741573033708" calcext:value-type="float">
            <text:p>39.6741573033708</text:p>
          </table:table-cell>
        </table:table-row>
        <table:table-row table:style-name="ro1">
          <table:table-cell office:value-type="float" office:value="52.9090909090909" calcext:value-type="float">
            <text:p>52.9090909090909</text:p>
          </table:table-cell>
          <table:table-cell/>
          <table:table-cell office:value-type="float" office:value="39.6857142857143" calcext:value-type="float">
            <text:p>39.6857142857143</text:p>
          </table:table-cell>
        </table:table-row>
        <table:table-row table:style-name="ro1">
          <table:table-cell office:value-type="float" office:value="32.5909090909091" calcext:value-type="float">
            <text:p>32.5909090909091</text:p>
          </table:table-cell>
          <table:table-cell/>
          <table:table-cell office:value-type="float" office:value="39.6923076923077" calcext:value-type="float">
            <text:p>39.6923076923077</text:p>
          </table:table-cell>
        </table:table-row>
        <table:table-row table:style-name="ro1">
          <table:table-cell office:value-type="float" office:value="63.6666666666667" calcext:value-type="float">
            <text:p>63.6666666666667</text:p>
          </table:table-cell>
          <table:table-cell/>
          <table:table-cell office:value-type="float" office:value="39.7222222222222" calcext:value-type="float">
            <text:p>39.7222222222222</text:p>
          </table:table-cell>
        </table:table-row>
        <table:table-row table:style-name="ro1">
          <table:table-cell office:value-type="float" office:value="49.9565217391304" calcext:value-type="float">
            <text:p>49.9565217391304</text:p>
          </table:table-cell>
          <table:table-cell/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49.1739130434783" calcext:value-type="float">
            <text:p>49.1739130434783</text:p>
          </table:table-cell>
          <table:table-cell/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45.7037037037037" calcext:value-type="float">
            <text:p>45.7037037037037</text:p>
          </table:table-cell>
          <table:table-cell/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34.2631578947368" calcext:value-type="float">
            <text:p>34.2631578947368</text:p>
          </table:table-cell>
          <table:table-cell/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60.6666666666667" calcext:value-type="float">
            <text:p>60.6666666666667</text:p>
          </table:table-cell>
          <table:table-cell/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float" office:value="31.0434782608696" calcext:value-type="float">
            <text:p>31.0434782608696</text:p>
          </table:table-cell>
          <table:table-cell/>
          <table:table-cell office:value-type="float" office:value="39.9090909090909" calcext:value-type="float">
            <text:p>39.9090909090909</text:p>
          </table:table-cell>
        </table:table-row>
        <table:table-row table:style-name="ro1">
          <table:table-cell office:value-type="float" office:value="40.2592592592593" calcext:value-type="float">
            <text:p>40.2592592592593</text:p>
          </table:table-cell>
          <table:table-cell/>
          <table:table-cell office:value-type="float" office:value="39.9230769230769" calcext:value-type="float">
            <text:p>39.9230769230769</text:p>
          </table:table-cell>
        </table:table-row>
        <table:table-row table:style-name="ro1">
          <table:table-cell office:value-type="float" office:value="23.8474576271186" calcext:value-type="float">
            <text:p>23.8474576271186</text:p>
          </table:table-cell>
          <table:table-cell/>
          <table:table-cell office:value-type="float" office:value="39.9375" calcext:value-type="float">
            <text:p>39.9375</text:p>
          </table:table-cell>
        </table:table-row>
        <table:table-row table:style-name="ro1">
          <table:table-cell office:value-type="float" office:value="28.9230769230769" calcext:value-type="float">
            <text:p>28.9230769230769</text:p>
          </table:table-cell>
          <table:table-cell/>
          <table:table-cell office:value-type="float" office:value="39.9387755102041" calcext:value-type="float">
            <text:p>39.9387755102041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/>
          <table:table-cell office:value-type="float" office:value="39.9444444444444" calcext:value-type="float">
            <text:p>39.9444444444444</text:p>
          </table:table-cell>
        </table:table-row>
        <table:table-row table:style-name="ro1">
          <table:table-cell office:value-type="float" office:value="64.5714285714286" calcext:value-type="float">
            <text:p>64.5714285714286</text:p>
          </table:table-cell>
          <table:table-cell/>
          <table:table-cell office:value-type="float" office:value="39.9487179487179" calcext:value-type="float">
            <text:p>39.94871794871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9.969696969697" calcext:value-type="float">
            <text:p>39.969696969697</text:p>
          </table:table-cell>
        </table:table-row>
        <table:table-row table:style-name="ro1">
          <table:table-cell office:value-type="float" office:value="48.3157894736842" calcext:value-type="float">
            <text:p>48.31578947368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.4545454545455" calcext:value-type="float">
            <text:p>40.454545454545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.3076923076923" calcext:value-type="float">
            <text:p>49.3076923076923</text:p>
          </table:table-cell>
          <table:table-cell/>
          <table:table-cell office:value-type="float" office:value="40.027027027027" calcext:value-type="float">
            <text:p>40.02702702702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/>
          <table:table-cell office:value-type="float" office:value="40.0833333333333" calcext:value-type="float">
            <text:p>40.08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40.1176470588235" calcext:value-type="float">
            <text:p>40.1176470588235</text:p>
          </table:table-cell>
        </table:table-row>
        <table:table-row table:style-name="ro1">
          <table:table-cell office:value-type="float" office:value="69.2424242424243" calcext:value-type="float">
            <text:p>69.2424242424243</text:p>
          </table:table-cell>
          <table:table-cell/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float" office:value="65.7058823529412" calcext:value-type="float">
            <text:p>65.7058823529412</text:p>
          </table:table-cell>
          <table:table-cell/>
          <table:table-cell office:value-type="float" office:value="40.1538461538462" calcext:value-type="float">
            <text:p>40.1538461538462</text:p>
          </table:table-cell>
        </table:table-row>
        <table:table-row table:style-name="ro1">
          <table:table-cell office:value-type="float" office:value="75.2142857142857" calcext:value-type="float">
            <text:p>75.2142857142857</text:p>
          </table:table-cell>
          <table:table-cell/>
          <table:table-cell office:value-type="float" office:value="40.168" calcext:value-type="float">
            <text:p>40.168</text:p>
          </table:table-cell>
        </table:table-row>
        <table:table-row table:style-name="ro1">
          <table:table-cell office:value-type="float" office:value="63.4285714285714" calcext:value-type="float">
            <text:p>63.4285714285714</text:p>
          </table:table-cell>
          <table:table-cell/>
          <table:table-cell office:value-type="float" office:value="40.1818181818182" calcext:value-type="float">
            <text:p>40.1818181818182</text:p>
          </table:table-cell>
        </table:table-row>
        <table:table-row table:style-name="ro1">
          <table:table-cell office:value-type="float" office:value="50.6363636363636" calcext:value-type="float">
            <text:p>50.6363636363636</text:p>
          </table:table-cell>
          <table:table-cell/>
          <table:table-cell office:value-type="float" office:value="40.1818181818182" calcext:value-type="float">
            <text:p>40.1818181818182</text:p>
          </table:table-cell>
        </table:table-row>
        <table:table-row table:style-name="ro1">
          <table:table-cell office:value-type="float" office:value="63.4634146341463" calcext:value-type="float">
            <text:p>63.4634146341463</text:p>
          </table:table-cell>
          <table:table-cell/>
          <table:table-cell office:value-type="float" office:value="40.1875" calcext:value-type="float">
            <text:p>40.1875</text:p>
          </table:table-cell>
        </table:table-row>
        <table:table-row table:style-name="ro1">
          <table:table-cell office:value-type="float" office:value="70.7777777777778" calcext:value-type="float">
            <text:p>70.7777777777778</text:p>
          </table:table-cell>
          <table:table-cell/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/>
          <table:table-cell office:value-type="float" office:value="40.2222222222222" calcext:value-type="float">
            <text:p>40.2222222222222</text:p>
          </table:table-cell>
        </table:table-row>
        <table:table-row table:style-name="ro1">
          <table:table-cell office:value-type="float" office:value="57.1538461538462" calcext:value-type="float">
            <text:p>57.1538461538462</text:p>
          </table:table-cell>
          <table:table-cell/>
          <table:table-cell office:value-type="float" office:value="40.24" calcext:value-type="float">
            <text:p>40.24</text:p>
          </table:table-cell>
        </table:table-row>
        <table:table-row table:style-name="ro1">
          <table:table-cell office:value-type="float" office:value="60.3181818181818" calcext:value-type="float">
            <text:p>60.3181818181818</text:p>
          </table:table-cell>
          <table:table-cell/>
          <table:table-cell office:value-type="float" office:value="40.2413793103448" calcext:value-type="float">
            <text:p>40.2413793103448</text:p>
          </table:table-cell>
        </table:table-row>
        <table:table-row table:style-name="ro1">
          <table:table-cell office:value-type="float" office:value="47.3414634146342" calcext:value-type="float">
            <text:p>47.3414634146342</text:p>
          </table:table-cell>
          <table:table-cell/>
          <table:table-cell office:value-type="float" office:value="40.2592592592593" calcext:value-type="float">
            <text:p>40.25925925925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40.3333333333333" calcext:value-type="float">
            <text:p>40.3333333333333</text:p>
          </table:table-cell>
        </table:table-row>
        <table:table-row table:style-name="ro1">
          <table:table-cell office:value-type="float" office:value="48.2123142250531" calcext:value-type="float">
            <text:p>48.2123142250531</text:p>
          </table:table-cell>
          <table:table-cell/>
          <table:table-cell office:value-type="float" office:value="40.3333333333333" calcext:value-type="float">
            <text:p>40.3333333333333</text:p>
          </table:table-cell>
        </table:table-row>
        <table:table-row table:style-name="ro1">
          <table:table-cell office:value-type="float" office:value="60.5833333333333" calcext:value-type="float">
            <text:p>60.5833333333333</text:p>
          </table:table-cell>
          <table:table-cell/>
          <table:table-cell office:value-type="float" office:value="40.3333333333333" calcext:value-type="float">
            <text:p>40.333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0.3333333333333" calcext:value-type="float">
            <text:p>40.3333333333333</text:p>
          </table:table-cell>
        </table:table-row>
        <table:table-row table:style-name="ro1">
          <table:table-cell office:value-type="float" office:value="45.0689655172414" calcext:value-type="float">
            <text:p>45.0689655172414</text:p>
          </table:table-cell>
          <table:table-cell/>
          <table:table-cell office:value-type="float" office:value="40.375" calcext:value-type="float">
            <text:p>40.375</text:p>
          </table:table-cell>
        </table:table-row>
        <table:table-row table:style-name="ro1">
          <table:table-cell office:value-type="float" office:value="73.125" calcext:value-type="float">
            <text:p>73.125</text:p>
          </table:table-cell>
          <table:table-cell/>
          <table:table-cell office:value-type="float" office:value="40.3777777777778" calcext:value-type="float">
            <text:p>40.3777777777778</text:p>
          </table:table-cell>
        </table:table-row>
        <table:table-row table:style-name="ro1">
          <table:table-cell office:value-type="float" office:value="53.5454545454545" calcext:value-type="float">
            <text:p>53.5454545454545</text:p>
          </table:table-cell>
          <table:table-cell/>
          <table:table-cell office:value-type="float" office:value="40.3793103448276" calcext:value-type="float">
            <text:p>40.3793103448276</text:p>
          </table:table-cell>
        </table:table-row>
        <table:table-row table:style-name="ro1">
          <table:table-cell office:value-type="float" office:value="63.3157894736842" calcext:value-type="float">
            <text:p>63.3157894736842</text:p>
          </table:table-cell>
          <table:table-cell/>
          <table:table-cell office:value-type="float" office:value="40.3846153846154" calcext:value-type="float">
            <text:p>40.3846153846154</text:p>
          </table:table-cell>
        </table:table-row>
        <table:table-row table:style-name="ro1">
          <table:table-cell office:value-type="float" office:value="57.6981132075472" calcext:value-type="float">
            <text:p>57.6981132075472</text:p>
          </table:table-cell>
          <table:table-cell/>
          <table:table-cell office:value-type="float" office:value="40.3888888888889" calcext:value-type="float">
            <text:p>40.3888888888889</text:p>
          </table:table-cell>
        </table:table-row>
        <table:table-row table:style-name="ro1">
          <table:table-cell office:value-type="float" office:value="63.9090909090909" calcext:value-type="float">
            <text:p>63.9090909090909</text:p>
          </table:table-cell>
          <table:table-cell/>
          <table:table-cell office:value-type="float" office:value="40.4545454545455" calcext:value-type="float">
            <text:p>40.4545454545455</text:p>
          </table:table-cell>
        </table:table-row>
        <table:table-row table:style-name="ro1">
          <table:table-cell office:value-type="float" office:value="55.1818181818182" calcext:value-type="float">
            <text:p>55.1818181818182</text:p>
          </table:table-cell>
          <table:table-cell/>
          <table:table-cell office:value-type="float" office:value="40.4705882352941" calcext:value-type="float">
            <text:p>40.4705882352941</text:p>
          </table:table-cell>
        </table:table-row>
        <table:table-row table:style-name="ro1">
          <table:table-cell office:value-type="float" office:value="46.35" calcext:value-type="float">
            <text:p>46.35</text:p>
          </table:table-cell>
          <table:table-cell/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57.0111111111111" calcext:value-type="float">
            <text:p>57.0111111111111</text:p>
          </table:table-cell>
          <table:table-cell/>
          <table:table-cell office:value-type="float" office:value="40.5185185185185" calcext:value-type="float">
            <text:p>40.5185185185185</text:p>
          </table:table-cell>
        </table:table-row>
        <table:table-row table:style-name="ro1">
          <table:table-cell office:value-type="float" office:value="53.1374045801527" calcext:value-type="float">
            <text:p>53.1374045801527</text:p>
          </table:table-cell>
          <table:table-cell/>
          <table:table-cell office:value-type="float" office:value="40.5434782608696" calcext:value-type="float">
            <text:p>40.543478260869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/>
          <table:table-cell office:value-type="float" office:value="40.55" calcext:value-type="float">
            <text:p>40.55</text:p>
          </table:table-cell>
        </table:table-row>
        <table:table-row table:style-name="ro1">
          <table:table-cell office:value-type="float" office:value="69.4761904761905" calcext:value-type="float">
            <text:p>69.4761904761905</text:p>
          </table:table-cell>
          <table:table-cell/>
          <table:table-cell office:value-type="float" office:value="40.5625" calcext:value-type="float">
            <text:p>40.5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.5692307692308" calcext:value-type="float">
            <text:p>40.5692307692308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/>
          <table:table-cell office:value-type="float" office:value="40.5714285714286" calcext:value-type="float">
            <text:p>40.5714285714286</text:p>
          </table:table-cell>
        </table:table-row>
        <table:table-row table:style-name="ro1">
          <table:table-cell office:value-type="float" office:value="69.75" calcext:value-type="float">
            <text:p>69.75</text:p>
          </table:table-cell>
          <table:table-cell/>
          <table:table-cell office:value-type="float" office:value="40.6071428571429" calcext:value-type="float">
            <text:p>40.6071428571429</text:p>
          </table:table-cell>
        </table:table-row>
        <table:table-row table:style-name="ro1">
          <table:table-cell office:value-type="float" office:value="36.06" calcext:value-type="float">
            <text:p>36.06</text:p>
          </table:table-cell>
          <table:table-cell/>
          <table:table-cell office:value-type="float" office:value="40.6101694915254" calcext:value-type="float">
            <text:p>40.6101694915254</text:p>
          </table:table-cell>
        </table:table-row>
        <table:table-row table:style-name="ro1">
          <table:table-cell office:value-type="float" office:value="48.8888888888889" calcext:value-type="float">
            <text:p>48.8888888888889</text:p>
          </table:table-cell>
          <table:table-cell/>
          <table:table-cell office:value-type="float" office:value="40.6336633663366" calcext:value-type="float">
            <text:p>40.6336633663366</text:p>
          </table:table-cell>
        </table:table-row>
        <table:table-row table:style-name="ro1">
          <table:table-cell office:value-type="float" office:value="60.1428571428571" calcext:value-type="float">
            <text:p>60.1428571428571</text:p>
          </table:table-cell>
          <table:table-cell/>
          <table:table-cell office:value-type="float" office:value="40.6410256410256" calcext:value-type="float">
            <text:p>40.6410256410256</text:p>
          </table:table-cell>
        </table:table-row>
        <table:table-row table:style-name="ro1">
          <table:table-cell office:value-type="float" office:value="76.3157894736842" calcext:value-type="float">
            <text:p>76.3157894736842</text:p>
          </table:table-cell>
          <table:table-cell/>
          <table:table-cell office:value-type="float" office:value="40.7380952380952" calcext:value-type="float">
            <text:p>40.7380952380952</text:p>
          </table:table-cell>
        </table:table-row>
        <table:table-row table:style-name="ro1">
          <table:table-cell office:value-type="float" office:value="48.03125" calcext:value-type="float">
            <text:p>48.03125</text:p>
          </table:table-cell>
          <table:table-cell/>
          <table:table-cell office:value-type="float" office:value="40.7619047619048" calcext:value-type="float">
            <text:p>40.7619047619048</text:p>
          </table:table-cell>
        </table:table-row>
        <table:table-row table:style-name="ro1">
          <table:table-cell office:value-type="float" office:value="51.828125" calcext:value-type="float">
            <text:p>51.828125</text:p>
          </table:table-cell>
          <table:table-cell/>
          <table:table-cell office:value-type="float" office:value="40.7692307692308" calcext:value-type="float">
            <text:p>40.7692307692308</text:p>
          </table:table-cell>
        </table:table-row>
        <table:table-row table:style-name="ro1">
          <table:table-cell office:value-type="float" office:value="71.4545454545455" calcext:value-type="float">
            <text:p>71.4545454545455</text:p>
          </table:table-cell>
          <table:table-cell/>
          <table:table-cell office:value-type="float" office:value="40.8157894736842" calcext:value-type="float">
            <text:p>40.8157894736842</text:p>
          </table:table-cell>
        </table:table-row>
        <table:table-row table:style-name="ro1">
          <table:table-cell office:value-type="float" office:value="50.9733333333333" calcext:value-type="float">
            <text:p>50.9733333333333</text:p>
          </table:table-cell>
          <table:table-cell/>
          <table:table-cell office:value-type="float" office:value="40.8333333333333" calcext:value-type="float">
            <text:p>40.8333333333333</text:p>
          </table:table-cell>
        </table:table-row>
        <table:table-row table:style-name="ro1">
          <table:table-cell office:value-type="float" office:value="46.8787878787879" calcext:value-type="float">
            <text:p>46.8787878787879</text:p>
          </table:table-cell>
          <table:table-cell/>
          <table:table-cell office:value-type="float" office:value="40.8571428571429" calcext:value-type="float">
            <text:p>40.8571428571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0.8666666666667" calcext:value-type="float">
            <text:p>40.8666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40.8666666666667" calcext:value-type="float">
            <text:p>40.8666666666667</text:p>
          </table:table-cell>
        </table:table-row>
        <table:table-row table:style-name="ro1">
          <table:table-cell office:value-type="float" office:value="42.109375" calcext:value-type="float">
            <text:p>42.109375</text:p>
          </table:table-cell>
          <table:table-cell/>
          <table:table-cell office:value-type="float" office:value="40.92" calcext:value-type="float">
            <text:p>40.92</text:p>
          </table:table-cell>
        </table:table-row>
        <table:table-row table:style-name="ro1">
          <table:table-cell office:value-type="float" office:value="67.9090909090909" calcext:value-type="float">
            <text:p>67.9090909090909</text:p>
          </table:table-cell>
          <table:table-cell/>
          <table:table-cell office:value-type="float" office:value="40.9272727272727" calcext:value-type="float">
            <text:p>40.9272727272727</text:p>
          </table:table-cell>
        </table:table-row>
        <table:table-row table:style-name="ro1">
          <table:table-cell office:value-type="float" office:value="55.4848484848485" calcext:value-type="float">
            <text:p>55.4848484848485</text:p>
          </table:table-cell>
          <table:table-cell/>
          <table:table-cell office:value-type="float" office:value="40.952380952381" calcext:value-type="float">
            <text:p>40.952380952381</text:p>
          </table:table-cell>
        </table:table-row>
        <table:table-row table:style-name="ro1">
          <table:table-cell office:value-type="float" office:value="79.2727272727273" calcext:value-type="float">
            <text:p>79.2727272727273</text:p>
          </table:table-cell>
          <table:table-cell/>
          <table:table-cell office:value-type="float" office:value="40.9545454545455" calcext:value-type="float">
            <text:p>40.9545454545455</text:p>
          </table:table-cell>
        </table:table-row>
        <table:table-row table:style-name="ro1">
          <table:table-cell office:value-type="float" office:value="25.8780487804878" calcext:value-type="float">
            <text:p>25.8780487804878</text:p>
          </table:table-cell>
          <table:table-cell/>
          <table:table-cell office:value-type="float" office:value="40.9666666666667" calcext:value-type="float">
            <text:p>40.9666666666667</text:p>
          </table:table-cell>
        </table:table-row>
        <table:table-row table:style-name="ro1">
          <table:table-cell office:value-type="float" office:value="66.7727272727273" calcext:value-type="float">
            <text:p>66.772727272727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.5161290322581" calcext:value-type="float">
            <text:p>55.516129032258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.2916666666667" calcext:value-type="float">
            <text:p>66.2916666666667</text:p>
          </table:table-cell>
          <table:table-cell/>
          <table:table-cell office:value-type="float" office:value="41.0212765957447" calcext:value-type="float">
            <text:p>41.021276595744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/>
          <table:table-cell office:value-type="float" office:value="41.0285714285714" calcext:value-type="float">
            <text:p>41.0285714285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1.0508474576271" calcext:value-type="float">
            <text:p>41.0508474576271</text:p>
          </table:table-cell>
        </table:table-row>
        <table:table-row table:style-name="ro1">
          <table:table-cell office:value-type="float" office:value="57.8076923076923" calcext:value-type="float">
            <text:p>57.8076923076923</text:p>
          </table:table-cell>
          <table:table-cell/>
          <table:table-cell office:value-type="float" office:value="41.0666666666667" calcext:value-type="float">
            <text:p>41.066666666666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/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float" office:value="61.2903225806452" calcext:value-type="float">
            <text:p>61.2903225806452</text:p>
          </table:table-cell>
          <table:table-cell/>
          <table:table-cell office:value-type="float" office:value="41.0882352941176" calcext:value-type="float">
            <text:p>41.0882352941176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/>
          <table:table-cell office:value-type="float" office:value="41.1066666666667" calcext:value-type="float">
            <text:p>41.1066666666667</text:p>
          </table:table-cell>
        </table:table-row>
        <table:table-row table:style-name="ro1">
          <table:table-cell office:value-type="float" office:value="66.6666666666667" calcext:value-type="float">
            <text:p>66.6666666666667</text:p>
          </table:table-cell>
          <table:table-cell/>
          <table:table-cell office:value-type="float" office:value="41.125" calcext:value-type="float">
            <text:p>41.125</text:p>
          </table:table-cell>
        </table:table-row>
        <table:table-row table:style-name="ro1">
          <table:table-cell office:value-type="float" office:value="56.1830985915493" calcext:value-type="float">
            <text:p>56.1830985915493</text:p>
          </table:table-cell>
          <table:table-cell/>
          <table:table-cell office:value-type="float" office:value="41.1395348837209" calcext:value-type="float">
            <text:p>41.1395348837209</text:p>
          </table:table-cell>
        </table:table-row>
        <table:table-row table:style-name="ro1">
          <table:table-cell office:value-type="float" office:value="71.9487179487179" calcext:value-type="float">
            <text:p>71.9487179487179</text:p>
          </table:table-cell>
          <table:table-cell/>
          <table:table-cell office:value-type="float" office:value="41.1785714285714" calcext:value-type="float">
            <text:p>41.1785714285714</text:p>
          </table:table-cell>
        </table:table-row>
        <table:table-row table:style-name="ro1">
          <table:table-cell office:value-type="float" office:value="93.3333333333333" calcext:value-type="float">
            <text:p>93.3333333333333</text:p>
          </table:table-cell>
          <table:table-cell/>
          <table:table-cell office:value-type="float" office:value="41.1842105263158" calcext:value-type="float">
            <text:p>41.1842105263158</text:p>
          </table:table-cell>
        </table:table-row>
        <table:table-row table:style-name="ro1">
          <table:table-cell office:value-type="float" office:value="56.9047619047619" calcext:value-type="float">
            <text:p>56.9047619047619</text:p>
          </table:table-cell>
          <table:table-cell/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59.0454545454545" calcext:value-type="float">
            <text:p>59.0454545454545</text:p>
          </table:table-cell>
          <table:table-cell/>
          <table:table-cell office:value-type="float" office:value="41.2631578947368" calcext:value-type="float">
            <text:p>41.2631578947368</text:p>
          </table:table-cell>
        </table:table-row>
        <table:table-row table:style-name="ro1">
          <table:table-cell office:value-type="float" office:value="53.2222222222222" calcext:value-type="float">
            <text:p>53.2222222222222</text:p>
          </table:table-cell>
          <table:table-cell/>
          <table:table-cell office:value-type="float" office:value="41.2631578947368" calcext:value-type="float">
            <text:p>41.2631578947368</text:p>
          </table:table-cell>
        </table:table-row>
        <table:table-row table:style-name="ro1">
          <table:table-cell office:value-type="float" office:value="57.3181818181818" calcext:value-type="float">
            <text:p>57.3181818181818</text:p>
          </table:table-cell>
          <table:table-cell/>
          <table:table-cell office:value-type="float" office:value="41.2727272727273" calcext:value-type="float">
            <text:p>41.2727272727273</text:p>
          </table:table-cell>
        </table:table-row>
        <table:table-row table:style-name="ro1">
          <table:table-cell office:value-type="float" office:value="51.906976744186" calcext:value-type="float">
            <text:p>51.906976744186</text:p>
          </table:table-cell>
          <table:table-cell/>
          <table:table-cell office:value-type="float" office:value="41.2894736842105" calcext:value-type="float">
            <text:p>41.2894736842105</text:p>
          </table:table-cell>
        </table:table-row>
        <table:table-row table:style-name="ro1">
          <table:table-cell office:value-type="float" office:value="56.32" calcext:value-type="float">
            <text:p>56.32</text:p>
          </table:table-cell>
          <table:table-cell/>
          <table:table-cell office:value-type="float" office:value="41.2941176470588" calcext:value-type="float">
            <text:p>41.29411764705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1.3125" calcext:value-type="float">
            <text:p>41.3125</text:p>
          </table:table-cell>
        </table:table-row>
        <table:table-row table:style-name="ro1">
          <table:table-cell office:value-type="float" office:value="62.984375" calcext:value-type="float">
            <text:p>62.984375</text:p>
          </table:table-cell>
          <table:table-cell/>
          <table:table-cell office:value-type="float" office:value="41.3426573426573" calcext:value-type="float">
            <text:p>41.3426573426573</text:p>
          </table:table-cell>
        </table:table-row>
        <table:table-row table:style-name="ro1">
          <table:table-cell office:value-type="float" office:value="62.1904761904762" calcext:value-type="float">
            <text:p>62.1904761904762</text:p>
          </table:table-cell>
          <table:table-cell/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float" office:value="60.4545454545455" calcext:value-type="float">
            <text:p>60.4545454545455</text:p>
          </table:table-cell>
          <table:table-cell/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float" office:value="42.3846153846154" calcext:value-type="float">
            <text:p>42.3846153846154</text:p>
          </table:table-cell>
          <table:table-cell/>
          <table:table-cell office:value-type="float" office:value="41.3564356435644" calcext:value-type="float">
            <text:p>41.3564356435644</text:p>
          </table:table-cell>
        </table:table-row>
        <table:table-row table:style-name="ro1">
          <table:table-cell office:value-type="float" office:value="56.9375" calcext:value-type="float">
            <text:p>56.9375</text:p>
          </table:table-cell>
          <table:table-cell/>
          <table:table-cell office:value-type="float" office:value="41.3695652173913" calcext:value-type="float">
            <text:p>41.36956521739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1.3725490196079" calcext:value-type="float">
            <text:p>41.3725490196079</text:p>
          </table:table-cell>
        </table:table-row>
        <table:table-row table:style-name="ro1">
          <table:table-cell office:value-type="float" office:value="61.4347826086957" calcext:value-type="float">
            <text:p>61.4347826086957</text:p>
          </table:table-cell>
          <table:table-cell/>
          <table:table-cell office:value-type="float" office:value="41.4166666666667" calcext:value-type="float">
            <text:p>41.416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41.4166666666667" calcext:value-type="float">
            <text:p>41.4166666666667</text:p>
          </table:table-cell>
        </table:table-row>
        <table:table-row table:style-name="ro1">
          <table:table-cell office:value-type="float" office:value="47.4464285714286" calcext:value-type="float">
            <text:p>47.4464285714286</text:p>
          </table:table-cell>
          <table:table-cell/>
          <table:table-cell office:value-type="float" office:value="41.4179104477612" calcext:value-type="float">
            <text:p>41.4179104477612</text:p>
          </table:table-cell>
        </table:table-row>
        <table:table-row table:style-name="ro1">
          <table:table-cell office:value-type="float" office:value="58.7333333333333" calcext:value-type="float">
            <text:p>58.7333333333333</text:p>
          </table:table-cell>
          <table:table-cell/>
          <table:table-cell office:value-type="float" office:value="41.4594594594595" calcext:value-type="float">
            <text:p>41.4594594594595</text:p>
          </table:table-cell>
        </table:table-row>
        <table:table-row table:style-name="ro1">
          <table:table-cell office:value-type="float" office:value="46.9772727272727" calcext:value-type="float">
            <text:p>46.9772727272727</text:p>
          </table:table-cell>
          <table:table-cell/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61.8538461538462" calcext:value-type="float">
            <text:p>61.8538461538462</text:p>
          </table:table-cell>
          <table:table-cell/>
          <table:table-cell office:value-type="float" office:value="41.5238095238095" calcext:value-type="float">
            <text:p>41.5238095238095</text:p>
          </table:table-cell>
        </table:table-row>
        <table:table-row table:style-name="ro1">
          <table:table-cell office:value-type="float" office:value="71.1111111111111" calcext:value-type="float">
            <text:p>71.1111111111111</text:p>
          </table:table-cell>
          <table:table-cell/>
          <table:table-cell office:value-type="float" office:value="41.5365853658537" calcext:value-type="float">
            <text:p>41.5365853658537</text:p>
          </table:table-cell>
        </table:table-row>
        <table:table-row table:style-name="ro1">
          <table:table-cell office:value-type="float" office:value="70.1851851851852" calcext:value-type="float">
            <text:p>70.1851851851852</text:p>
          </table:table-cell>
          <table:table-cell/>
          <table:table-cell office:value-type="float" office:value="41.5476190476191" calcext:value-type="float">
            <text:p>41.5476190476191</text:p>
          </table:table-cell>
        </table:table-row>
        <table:table-row table:style-name="ro1">
          <table:table-cell office:value-type="float" office:value="49.0657894736842" calcext:value-type="float">
            <text:p>49.0657894736842</text:p>
          </table:table-cell>
          <table:table-cell/>
          <table:table-cell office:value-type="float" office:value="41.6052631578947" calcext:value-type="float">
            <text:p>41.6052631578947</text:p>
          </table:table-cell>
        </table:table-row>
        <table:table-row table:style-name="ro1">
          <table:table-cell office:value-type="float" office:value="71.2857142857143" calcext:value-type="float">
            <text:p>71.2857142857143</text:p>
          </table:table-cell>
          <table:table-cell/>
          <table:table-cell office:value-type="float" office:value="41.6595744680851" calcext:value-type="float">
            <text:p>41.659574468085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/>
          <table:table-cell office:value-type="float" office:value="41.6619718309859" calcext:value-type="float">
            <text:p>41.6619718309859</text:p>
          </table:table-cell>
        </table:table-row>
        <table:table-row table:style-name="ro1">
          <table:table-cell office:value-type="float" office:value="69.25" calcext:value-type="float">
            <text:p>69.25</text:p>
          </table:table-cell>
          <table:table-cell/>
          <table:table-cell office:value-type="float" office:value="41.6666666666667" calcext:value-type="float">
            <text:p>41.6666666666667</text:p>
          </table:table-cell>
        </table:table-row>
        <table:table-row table:style-name="ro1">
          <table:table-cell office:value-type="float" office:value="46.5263157894737" calcext:value-type="float">
            <text:p>46.5263157894737</text:p>
          </table:table-cell>
          <table:table-cell/>
          <table:table-cell office:value-type="float" office:value="41.6842105263158" calcext:value-type="float">
            <text:p>41.6842105263158</text:p>
          </table:table-cell>
        </table:table-row>
        <table:table-row table:style-name="ro1">
          <table:table-cell office:value-type="float" office:value="36.746835443038" calcext:value-type="float">
            <text:p>36.746835443038</text:p>
          </table:table-cell>
          <table:table-cell/>
          <table:table-cell office:value-type="float" office:value="41.6923076923077" calcext:value-type="float">
            <text:p>41.6923076923077</text:p>
          </table:table-cell>
        </table:table-row>
        <table:table-row table:style-name="ro1">
          <table:table-cell office:value-type="float" office:value="60.085201793722" calcext:value-type="float">
            <text:p>60.085201793722</text:p>
          </table:table-cell>
          <table:table-cell/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53.0909090909091" calcext:value-type="float">
            <text:p>53.0909090909091</text:p>
          </table:table-cell>
          <table:table-cell/>
          <table:table-cell office:value-type="float" office:value="41.7272727272727" calcext:value-type="float">
            <text:p>41.7272727272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1.728813559322" calcext:value-type="float">
            <text:p>41.728813559322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/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49.2608695652174" calcext:value-type="float">
            <text:p>49.2608695652174</text:p>
          </table:table-cell>
          <table:table-cell/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/>
          <table:table-cell office:value-type="float" office:value="41.8125" calcext:value-type="float">
            <text:p>41.8125</text:p>
          </table:table-cell>
        </table:table-row>
        <table:table-row table:style-name="ro1">
          <table:table-cell office:value-type="float" office:value="47.4912280701754" calcext:value-type="float">
            <text:p>47.4912280701754</text:p>
          </table:table-cell>
          <table:table-cell/>
          <table:table-cell office:value-type="float" office:value="41.8333333333333" calcext:value-type="float">
            <text:p>41.8333333333333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/>
          <table:table-cell office:value-type="float" office:value="41.8333333333333" calcext:value-type="float">
            <text:p>41.8333333333333</text:p>
          </table:table-cell>
        </table:table-row>
        <table:table-row table:style-name="ro1">
          <table:table-cell office:value-type="float" office:value="47.9310344827586" calcext:value-type="float">
            <text:p>47.9310344827586</text:p>
          </table:table-cell>
          <table:table-cell/>
          <table:table-cell office:value-type="float" office:value="41.8823529411765" calcext:value-type="float">
            <text:p>41.8823529411765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/>
          <table:table-cell office:value-type="float" office:value="41.8918918918919" calcext:value-type="float">
            <text:p>41.8918918918919</text:p>
          </table:table-cell>
        </table:table-row>
        <table:table-row table:style-name="ro1">
          <table:table-cell office:value-type="float" office:value="36.7272727272727" calcext:value-type="float">
            <text:p>36.7272727272727</text:p>
          </table:table-cell>
          <table:table-cell/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65.4444444444444" calcext:value-type="float">
            <text:p>65.4444444444444</text:p>
          </table:table-cell>
          <table:table-cell/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72.7142857142857" calcext:value-type="float">
            <text:p>72.7142857142857</text:p>
          </table:table-cell>
          <table:table-cell/>
          <table:table-cell office:value-type="float" office:value="41.9444444444444" calcext:value-type="float">
            <text:p>41.9444444444444</text:p>
          </table:table-cell>
        </table:table-row>
        <table:table-row table:style-name="ro1">
          <table:table-cell office:value-type="float" office:value="48.1666666666667" calcext:value-type="float">
            <text:p>48.1666666666667</text:p>
          </table:table-cell>
          <table:table-cell/>
          <table:table-cell office:value-type="float" office:value="41.9545454545455" calcext:value-type="float">
            <text:p>41.95454545454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/>
          <table:table-cell office:value-type="float" office:value="42.0057803468208" calcext:value-type="float">
            <text:p>42.0057803468208</text:p>
          </table:table-cell>
        </table:table-row>
        <table:table-row table:style-name="ro1">
          <table:table-cell office:value-type="float" office:value="55.9047619047619" calcext:value-type="float">
            <text:p>55.9047619047619</text:p>
          </table:table-cell>
          <table:table-cell/>
          <table:table-cell office:value-type="float" office:value="42.0243902439024" calcext:value-type="float">
            <text:p>42.02439024390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42.0294117647059" calcext:value-type="float">
            <text:p>42.0294117647059</text:p>
          </table:table-cell>
        </table:table-row>
        <table:table-row table:style-name="ro1">
          <table:table-cell office:value-type="float" office:value="49.4117647058824" calcext:value-type="float">
            <text:p>49.4117647058824</text:p>
          </table:table-cell>
          <table:table-cell/>
          <table:table-cell office:value-type="float" office:value="42.0384615384615" calcext:value-type="float">
            <text:p>42.0384615384615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/>
          <table:table-cell office:value-type="float" office:value="42.0384615384615" calcext:value-type="float">
            <text:p>42.0384615384615</text:p>
          </table:table-cell>
        </table:table-row>
        <table:table-row table:style-name="ro1">
          <table:table-cell office:value-type="float" office:value="48.859649122807" calcext:value-type="float">
            <text:p>48.859649122807</text:p>
          </table:table-cell>
          <table:table-cell/>
          <table:table-cell office:value-type="float" office:value="42.04" calcext:value-type="float">
            <text:p>42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0909090909091" calcext:value-type="float">
            <text:p>42.09090909090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2.0983606557377" calcext:value-type="float">
            <text:p>42.0983606557377</text:p>
          </table:table-cell>
        </table:table-row>
        <table:table-row table:style-name="ro1">
          <table:table-cell office:value-type="float" office:value="56.6129032258065" calcext:value-type="float">
            <text:p>56.6129032258065</text:p>
          </table:table-cell>
          <table:table-cell/>
          <table:table-cell office:value-type="float" office:value="42.109375" calcext:value-type="float">
            <text:p>42.109375</text:p>
          </table:table-cell>
        </table:table-row>
        <table:table-row table:style-name="ro1">
          <table:table-cell office:value-type="float" office:value="52.9024390243903" calcext:value-type="float">
            <text:p>52.9024390243903</text:p>
          </table:table-cell>
          <table:table-cell/>
          <table:table-cell office:value-type="float" office:value="42.1415094339623" calcext:value-type="float">
            <text:p>42.14150943396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1785714285714" calcext:value-type="float">
            <text:p>42.1785714285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1846153846154" calcext:value-type="float">
            <text:p>42.18461538461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2.1923076923077" calcext:value-type="float">
            <text:p>42.1923076923077</text:p>
          </table:table-cell>
        </table:table-row>
        <table:table-row table:style-name="ro1">
          <table:table-cell office:value-type="float" office:value="56.7088607594937" calcext:value-type="float">
            <text:p>56.7088607594937</text:p>
          </table:table-cell>
          <table:table-cell/>
          <table:table-cell office:value-type="float" office:value="42.2162162162162" calcext:value-type="float">
            <text:p>42.2162162162162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/>
          <table:table-cell office:value-type="float" office:value="42.2380952380952" calcext:value-type="float">
            <text:p>42.2380952380952</text:p>
          </table:table-cell>
        </table:table-row>
        <table:table-row table:style-name="ro1">
          <table:table-cell office:value-type="float" office:value="38.6315789473684" calcext:value-type="float">
            <text:p>38.6315789473684</text:p>
          </table:table-cell>
          <table:table-cell/>
          <table:table-cell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47.4444444444444" calcext:value-type="float">
            <text:p>47.4444444444444</text:p>
          </table:table-cell>
          <table:table-cell/>
          <table:table-cell office:value-type="float" office:value="42.2564102564103" calcext:value-type="float">
            <text:p>42.2564102564103</text:p>
          </table:table-cell>
        </table:table-row>
        <table:table-row table:style-name="ro1">
          <table:table-cell office:value-type="float" office:value="58.5882352941176" calcext:value-type="float">
            <text:p>58.5882352941176</text:p>
          </table:table-cell>
          <table:table-cell/>
          <table:table-cell office:value-type="float" office:value="42.2727272727273" calcext:value-type="float">
            <text:p>42.27272727272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42.3333333333333" calcext:value-type="float">
            <text:p>42.3333333333333</text:p>
          </table:table-cell>
        </table:table-row>
        <table:table-row table:style-name="ro1">
          <table:table-cell office:value-type="float" office:value="28.9365079365079" calcext:value-type="float">
            <text:p>28.9365079365079</text:p>
          </table:table-cell>
          <table:table-cell/>
          <table:table-cell office:value-type="float" office:value="42.3636363636364" calcext:value-type="float">
            <text:p>42.363636363636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/>
          <table:table-cell office:value-type="float" office:value="42.3684210526316" calcext:value-type="float">
            <text:p>42.3684210526316</text:p>
          </table:table-cell>
        </table:table-row>
        <table:table-row table:style-name="ro1">
          <table:table-cell office:value-type="float" office:value="83.1666666666667" calcext:value-type="float">
            <text:p>83.1666666666667</text:p>
          </table:table-cell>
          <table:table-cell/>
          <table:table-cell office:value-type="float" office:value="42.3777777777778" calcext:value-type="float">
            <text:p>42.3777777777778</text:p>
          </table:table-cell>
        </table:table-row>
        <table:table-row table:style-name="ro1">
          <table:table-cell office:value-type="float" office:value="48.8978102189781" calcext:value-type="float">
            <text:p>48.8978102189781</text:p>
          </table:table-cell>
          <table:table-cell/>
          <table:table-cell office:value-type="float" office:value="42.3809523809524" calcext:value-type="float">
            <text:p>42.3809523809524</text:p>
          </table:table-cell>
        </table:table-row>
        <table:table-row table:style-name="ro1">
          <table:table-cell office:value-type="float" office:value="57.3333333333333" calcext:value-type="float">
            <text:p>57.3333333333333</text:p>
          </table:table-cell>
          <table:table-cell/>
          <table:table-cell office:value-type="float" office:value="42.3846153846154" calcext:value-type="float">
            <text:p>42.38461538461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34.8266666666667" calcext:value-type="float">
            <text:p>34.8266666666667</text:p>
          </table:table-cell>
          <table:table-cell/>
          <table:table-cell office:value-type="float" office:value="42.4117647058824" calcext:value-type="float">
            <text:p>42.4117647058824</text:p>
          </table:table-cell>
        </table:table-row>
        <table:table-row table:style-name="ro1">
          <table:table-cell office:value-type="float" office:value="53.1304347826087" calcext:value-type="float">
            <text:p>53.1304347826087</text:p>
          </table:table-cell>
          <table:table-cell/>
          <table:table-cell office:value-type="float" office:value="42.4615384615385" calcext:value-type="float">
            <text:p>42.4615384615385</text:p>
          </table:table-cell>
        </table:table-row>
        <table:table-row table:style-name="ro1">
          <table:table-cell office:value-type="float" office:value="73.3333333333333" calcext:value-type="float">
            <text:p>73.3333333333333</text:p>
          </table:table-cell>
          <table:table-cell/>
          <table:table-cell office:value-type="float" office:value="42.484375" calcext:value-type="float">
            <text:p>42.484375</text:p>
          </table:table-cell>
        </table:table-row>
        <table:table-row table:style-name="ro1">
          <table:table-cell office:value-type="float" office:value="41.8823529411765" calcext:value-type="float">
            <text:p>41.8823529411765</text:p>
          </table:table-cell>
          <table:table-cell/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/>
          <table:table-cell office:value-type="float" office:value="42.52" calcext:value-type="float">
            <text:p>42.52</text:p>
          </table:table-cell>
        </table:table-row>
        <table:table-row table:style-name="ro1">
          <table:table-cell office:value-type="float" office:value="43.6666666666667" calcext:value-type="float">
            <text:p>43.6666666666667</text:p>
          </table:table-cell>
          <table:table-cell/>
          <table:table-cell office:value-type="float" office:value="42.5217391304348" calcext:value-type="float">
            <text:p>42.5217391304348</text:p>
          </table:table-cell>
        </table:table-row>
        <table:table-row table:style-name="ro1">
          <table:table-cell office:value-type="float" office:value="37.6666666666667" calcext:value-type="float">
            <text:p>37.6666666666667</text:p>
          </table:table-cell>
          <table:table-cell/>
          <table:table-cell office:value-type="float" office:value="42.5238095238095" calcext:value-type="float">
            <text:p>42.5238095238095</text:p>
          </table:table-cell>
        </table:table-row>
        <table:table-row table:style-name="ro1">
          <table:table-cell office:value-type="float" office:value="55.875" calcext:value-type="float">
            <text:p>55.875</text:p>
          </table:table-cell>
          <table:table-cell/>
          <table:table-cell office:value-type="float" office:value="42.5294117647059" calcext:value-type="float">
            <text:p>42.5294117647059</text:p>
          </table:table-cell>
        </table:table-row>
        <table:table-row table:style-name="ro1">
          <table:table-cell office:value-type="float" office:value="45.421052631579" calcext:value-type="float">
            <text:p>45.421052631579</text:p>
          </table:table-cell>
          <table:table-cell/>
          <table:table-cell office:value-type="float" office:value="42.551724137931" calcext:value-type="float">
            <text:p>42.551724137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2.5952380952381" calcext:value-type="float">
            <text:p>42.5952380952381</text:p>
          </table:table-cell>
        </table:table-row>
        <table:table-row table:style-name="ro1">
          <table:table-cell office:value-type="float" office:value="42.953488372093" calcext:value-type="float">
            <text:p>42.953488372093</text:p>
          </table:table-cell>
          <table:table-cell/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72.5945945945946" calcext:value-type="float">
            <text:p>72.5945945945946</text:p>
          </table:table-cell>
          <table:table-cell/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/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52.2040816326531" calcext:value-type="float">
            <text:p>52.2040816326531</text:p>
          </table:table-cell>
          <table:table-cell/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47.1666666666667" calcext:value-type="float">
            <text:p>47.1666666666667</text:p>
          </table:table-cell>
          <table:table-cell/>
          <table:table-cell office:value-type="float" office:value="42.66" calcext:value-type="float">
            <text:p>42.66</text:p>
          </table:table-cell>
        </table:table-row>
        <table:table-row table:style-name="ro1">
          <table:table-cell office:value-type="float" office:value="46.3953488372093" calcext:value-type="float">
            <text:p>46.3953488372093</text:p>
          </table:table-cell>
          <table:table-cell/>
          <table:table-cell office:value-type="float" office:value="42.7272727272727" calcext:value-type="float">
            <text:p>42.72727272727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7368421052632" calcext:value-type="float">
            <text:p>42.7368421052632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/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/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46.8108108108108" calcext:value-type="float">
            <text:p>46.8108108108108</text:p>
          </table:table-cell>
          <table:table-cell/>
          <table:table-cell office:value-type="float" office:value="42.7727272727273" calcext:value-type="float">
            <text:p>42.7727272727273</text:p>
          </table:table-cell>
        </table:table-row>
        <table:table-row table:style-name="ro1">
          <table:table-cell office:value-type="float" office:value="58.5454545454545" calcext:value-type="float">
            <text:p>58.5454545454545</text:p>
          </table:table-cell>
          <table:table-cell/>
          <table:table-cell office:value-type="float" office:value="42.7777777777778" calcext:value-type="float">
            <text:p>42.7777777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2.7804878048781" calcext:value-type="float">
            <text:p>42.7804878048781</text:p>
          </table:table-cell>
        </table:table-row>
        <table:table-row table:style-name="ro1">
          <table:table-cell office:value-type="float" office:value="53.2258064516129" calcext:value-type="float">
            <text:p>53.2258064516129</text:p>
          </table:table-cell>
          <table:table-cell/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36.9565217391304" calcext:value-type="float">
            <text:p>36.9565217391304</text:p>
          </table:table-cell>
          <table:table-cell/>
          <table:table-cell office:value-type="float" office:value="42.8095238095238" calcext:value-type="float">
            <text:p>42.8095238095238</text:p>
          </table:table-cell>
        </table:table-row>
        <table:table-row table:style-name="ro1">
          <table:table-cell office:value-type="float" office:value="59.6428571428571" calcext:value-type="float">
            <text:p>59.6428571428571</text:p>
          </table:table-cell>
          <table:table-cell/>
          <table:table-cell office:value-type="float" office:value="42.8125" calcext:value-type="float">
            <text:p>42.8125</text:p>
          </table:table-cell>
        </table:table-row>
        <table:table-row table:style-name="ro1">
          <table:table-cell office:value-type="float" office:value="64.1935483870968" calcext:value-type="float">
            <text:p>64.1935483870968</text:p>
          </table:table-cell>
          <table:table-cell/>
          <table:table-cell office:value-type="float" office:value="42.8181818181818" calcext:value-type="float">
            <text:p>42.8181818181818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/>
          <table:table-cell office:value-type="float" office:value="42.8481012658228" calcext:value-type="float">
            <text:p>42.8481012658228</text:p>
          </table:table-cell>
        </table:table-row>
        <table:table-row table:style-name="ro1">
          <table:table-cell office:value-type="float" office:value="52.6333333333333" calcext:value-type="float">
            <text:p>52.6333333333333</text:p>
          </table:table-cell>
          <table:table-cell/>
          <table:table-cell office:value-type="float" office:value="42.8518518518519" calcext:value-type="float">
            <text:p>42.8518518518519</text:p>
          </table:table-cell>
        </table:table-row>
        <table:table-row table:style-name="ro1">
          <table:table-cell office:value-type="float" office:value="73.7857142857143" calcext:value-type="float">
            <text:p>73.7857142857143</text:p>
          </table:table-cell>
          <table:table-cell/>
          <table:table-cell office:value-type="float" office:value="42.8653846153846" calcext:value-type="float">
            <text:p>42.8653846153846</text:p>
          </table:table-cell>
        </table:table-row>
        <table:table-row table:style-name="ro1">
          <table:table-cell office:value-type="float" office:value="53.9090909090909" calcext:value-type="float">
            <text:p>53.9090909090909</text:p>
          </table:table-cell>
          <table:table-cell/>
          <table:table-cell office:value-type="float" office:value="42.9047619047619" calcext:value-type="float">
            <text:p>42.9047619047619</text:p>
          </table:table-cell>
        </table:table-row>
        <table:table-row table:style-name="ro1">
          <table:table-cell office:value-type="float" office:value="61.28" calcext:value-type="float">
            <text:p>61.28</text:p>
          </table:table-cell>
          <table:table-cell/>
          <table:table-cell office:value-type="float" office:value="42.9130434782609" calcext:value-type="float">
            <text:p>42.9130434782609</text:p>
          </table:table-cell>
        </table:table-row>
        <table:table-row table:style-name="ro1">
          <table:table-cell office:value-type="float" office:value="58.8947368421053" calcext:value-type="float">
            <text:p>58.8947368421053</text:p>
          </table:table-cell>
          <table:table-cell/>
          <table:table-cell office:value-type="float" office:value="42.925" calcext:value-type="float">
            <text:p>42.925</text:p>
          </table:table-cell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/>
          <table:table-cell office:value-type="float" office:value="42.9259259259259" calcext:value-type="float">
            <text:p>42.9259259259259</text:p>
          </table:table-cell>
        </table:table-row>
        <table:table-row table:style-name="ro1">
          <table:table-cell office:value-type="float" office:value="48.765306122449" calcext:value-type="float">
            <text:p>48.765306122449</text:p>
          </table:table-cell>
          <table:table-cell/>
          <table:table-cell office:value-type="float" office:value="42.952380952381" calcext:value-type="float">
            <text:p>42.952380952381</text:p>
          </table:table-cell>
        </table:table-row>
        <table:table-row table:style-name="ro1">
          <table:table-cell office:value-type="float" office:value="59.3684210526316" calcext:value-type="float">
            <text:p>59.3684210526316</text:p>
          </table:table-cell>
          <table:table-cell/>
          <table:table-cell office:value-type="float" office:value="42.953488372093" calcext:value-type="float">
            <text:p>42.95348837209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.8510638297872" calcext:value-type="float">
            <text:p>67.851063829787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.6610169491525" calcext:value-type="float">
            <text:p>24.6610169491525</text:p>
          </table:table-cell>
          <table:table-cell/>
          <table:table-cell office:value-type="float" office:value="43.0718232044199" calcext:value-type="float">
            <text:p>43.0718232044199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/>
          <table:table-cell office:value-type="float" office:value="43.0769230769231" calcext:value-type="float">
            <text:p>43.0769230769231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/>
          <table:table-cell office:value-type="float" office:value="43.0952380952381" calcext:value-type="float">
            <text:p>43.0952380952381</text:p>
          </table:table-cell>
        </table:table-row>
        <table:table-row table:style-name="ro1">
          <table:table-cell office:value-type="float" office:value="50.5151515151515" calcext:value-type="float">
            <text:p>50.5151515151515</text:p>
          </table:table-cell>
          <table:table-cell/>
          <table:table-cell office:value-type="float" office:value="43.1071428571429" calcext:value-type="float">
            <text:p>43.1071428571429</text:p>
          </table:table-cell>
        </table:table-row>
        <table:table-row table:style-name="ro1">
          <table:table-cell office:value-type="float" office:value="68.4285714285714" calcext:value-type="float">
            <text:p>68.4285714285714</text:p>
          </table:table-cell>
          <table:table-cell/>
          <table:table-cell office:value-type="float" office:value="43.1428571428572" calcext:value-type="float">
            <text:p>43.1428571428572</text:p>
          </table:table-cell>
        </table:table-row>
        <table:table-row table:style-name="ro1">
          <table:table-cell office:value-type="float" office:value="48.1258278145695" calcext:value-type="float">
            <text:p>48.1258278145695</text:p>
          </table:table-cell>
          <table:table-cell/>
          <table:table-cell office:value-type="float" office:value="43.1666666666667" calcext:value-type="float">
            <text:p>43.1666666666667</text:p>
          </table:table-cell>
        </table:table-row>
        <table:table-row table:style-name="ro1">
          <table:table-cell office:value-type="float" office:value="43.7254901960784" calcext:value-type="float">
            <text:p>43.7254901960784</text:p>
          </table:table-cell>
          <table:table-cell/>
          <table:table-cell office:value-type="float" office:value="43.2105263157895" calcext:value-type="float">
            <text:p>43.2105263157895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/>
          <table:table-cell office:value-type="float" office:value="43.2222222222222" calcext:value-type="float">
            <text:p>43.2222222222222</text:p>
          </table:table-cell>
        </table:table-row>
        <table:table-row table:style-name="ro1">
          <table:table-cell office:value-type="float" office:value="28.4090909090909" calcext:value-type="float">
            <text:p>28.4090909090909</text:p>
          </table:table-cell>
          <table:table-cell/>
          <table:table-cell office:value-type="float" office:value="43.2222222222222" calcext:value-type="float">
            <text:p>43.2222222222222</text:p>
          </table:table-cell>
        </table:table-row>
        <table:table-row table:style-name="ro1">
          <table:table-cell office:value-type="float" office:value="51.7222222222222" calcext:value-type="float">
            <text:p>51.7222222222222</text:p>
          </table:table-cell>
          <table:table-cell/>
          <table:table-cell office:value-type="float" office:value="43.2222222222222" calcext:value-type="float">
            <text:p>43.2222222222222</text:p>
          </table:table-cell>
        </table:table-row>
        <table:table-row table:style-name="ro1">
          <table:table-cell office:value-type="float" office:value="67.5625" calcext:value-type="float">
            <text:p>67.5625</text:p>
          </table:table-cell>
          <table:table-cell/>
          <table:table-cell office:value-type="float" office:value="43.225" calcext:value-type="float">
            <text:p>43.225</text:p>
          </table:table-cell>
        </table:table-row>
        <table:table-row table:style-name="ro1">
          <table:table-cell office:value-type="float" office:value="52.025" calcext:value-type="float">
            <text:p>52.025</text:p>
          </table:table-cell>
          <table:table-cell/>
          <table:table-cell office:value-type="float" office:value="43.2666666666667" calcext:value-type="float">
            <text:p>43.2666666666667</text:p>
          </table:table-cell>
        </table:table-row>
        <table:table-row table:style-name="ro1">
          <table:table-cell office:value-type="float" office:value="46.2222222222222" calcext:value-type="float">
            <text:p>46.2222222222222</text:p>
          </table:table-cell>
          <table:table-cell/>
          <table:table-cell office:value-type="float" office:value="43.3076923076923" calcext:value-type="float">
            <text:p>43.3076923076923</text:p>
          </table:table-cell>
        </table:table-row>
        <table:table-row table:style-name="ro1">
          <table:table-cell office:value-type="float" office:value="36.3758865248227" calcext:value-type="float">
            <text:p>36.3758865248227</text:p>
          </table:table-cell>
          <table:table-cell/>
          <table:table-cell office:value-type="float" office:value="43.3333333333333" calcext:value-type="float">
            <text:p>43.3333333333333</text:p>
          </table:table-cell>
        </table:table-row>
        <table:table-row table:style-name="ro1">
          <table:table-cell office:value-type="float" office:value="54.3035714285714" calcext:value-type="float">
            <text:p>54.3035714285714</text:p>
          </table:table-cell>
          <table:table-cell/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38.4166666666667" calcext:value-type="float">
            <text:p>38.4166666666667</text:p>
          </table:table-cell>
          <table:table-cell/>
          <table:table-cell office:value-type="float" office:value="43.3913043478261" calcext:value-type="float">
            <text:p>43.391304347826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/>
          <table:table-cell office:value-type="float" office:value="43.4186046511628" calcext:value-type="float">
            <text:p>43.4186046511628</text:p>
          </table:table-cell>
        </table:table-row>
        <table:table-row table:style-name="ro1">
          <table:table-cell office:value-type="float" office:value="55.4897959183674" calcext:value-type="float">
            <text:p>55.4897959183674</text:p>
          </table:table-cell>
          <table:table-cell/>
          <table:table-cell office:value-type="float" office:value="43.4615384615385" calcext:value-type="float">
            <text:p>43.4615384615385</text:p>
          </table:table-cell>
        </table:table-row>
        <table:table-row table:style-name="ro1">
          <table:table-cell office:value-type="float" office:value="42.0384615384615" calcext:value-type="float">
            <text:p>42.0384615384615</text:p>
          </table:table-cell>
          <table:table-cell/>
          <table:table-cell office:value-type="float" office:value="43.4736842105263" calcext:value-type="float">
            <text:p>43.4736842105263</text:p>
          </table:table-cell>
        </table:table-row>
        <table:table-row table:style-name="ro1">
          <table:table-cell office:value-type="float" office:value="50.0384615384615" calcext:value-type="float">
            <text:p>50.0384615384615</text:p>
          </table:table-cell>
          <table:table-cell/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43.6818181818182" calcext:value-type="float">
            <text:p>43.6818181818182</text:p>
          </table:table-cell>
          <table:table-cell/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33.9252577319588" calcext:value-type="float">
            <text:p>33.9252577319588</text:p>
          </table:table-cell>
          <table:table-cell/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70.5555555555556" calcext:value-type="float">
            <text:p>70.5555555555556</text:p>
          </table:table-cell>
          <table:table-cell/>
          <table:table-cell office:value-type="float" office:value="43.5220125786164" calcext:value-type="float">
            <text:p>43.5220125786164</text:p>
          </table:table-cell>
        </table:table-row>
        <table:table-row table:style-name="ro1">
          <table:table-cell office:value-type="float" office:value="34.1116504854369" calcext:value-type="float">
            <text:p>34.1116504854369</text:p>
          </table:table-cell>
          <table:table-cell/>
          <table:table-cell office:value-type="float" office:value="43.5531914893617" calcext:value-type="float">
            <text:p>43.5531914893617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/>
          <table:table-cell office:value-type="float" office:value="43.5652173913044" calcext:value-type="float">
            <text:p>43.5652173913044</text:p>
          </table:table-cell>
        </table:table-row>
        <table:table-row table:style-name="ro1">
          <table:table-cell office:value-type="float" office:value="68.8888888888889" calcext:value-type="float">
            <text:p>68.8888888888889</text:p>
          </table:table-cell>
          <table:table-cell/>
          <table:table-cell office:value-type="float" office:value="43.5686274509804" calcext:value-type="float">
            <text:p>43.56862745098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43.5714285714286" calcext:value-type="float">
            <text:p>43.5714285714286</text:p>
          </table:table-cell>
        </table:table-row>
        <table:table-row table:style-name="ro1">
          <table:table-cell office:value-type="float" office:value="53.1388888888889" calcext:value-type="float">
            <text:p>53.1388888888889</text:p>
          </table:table-cell>
          <table:table-cell/>
          <table:table-cell office:value-type="float" office:value="43.5882352941176" calcext:value-type="float">
            <text:p>43.5882352941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3.5909090909091" calcext:value-type="float">
            <text:p>43.5909090909091</text:p>
          </table:table-cell>
        </table:table-row>
        <table:table-row table:style-name="ro1">
          <table:table-cell office:value-type="float" office:value="57.1428571428571" calcext:value-type="float">
            <text:p>57.1428571428571</text:p>
          </table:table-cell>
          <table:table-cell/>
          <table:table-cell office:value-type="float" office:value="43.5952380952381" calcext:value-type="float">
            <text:p>43.595238095238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/>
          <table:table-cell office:value-type="float" office:value="43.6206896551724" calcext:value-type="float">
            <text:p>43.62068965517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43.625" calcext:value-type="float">
            <text:p>43.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3.6279069767442" calcext:value-type="float">
            <text:p>43.6279069767442</text:p>
          </table:table-cell>
        </table:table-row>
        <table:table-row table:style-name="ro1">
          <table:table-cell office:value-type="float" office:value="59.2307692307692" calcext:value-type="float">
            <text:p>59.2307692307692</text:p>
          </table:table-cell>
          <table:table-cell/>
          <table:table-cell office:value-type="float" office:value="43.6666666666667" calcext:value-type="float">
            <text:p>43.666666666666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/>
          <table:table-cell office:value-type="float" office:value="43.6818181818182" calcext:value-type="float">
            <text:p>43.6818181818182</text:p>
          </table:table-cell>
        </table:table-row>
        <table:table-row table:style-name="ro1">
          <table:table-cell office:value-type="float" office:value="53.9622641509434" calcext:value-type="float">
            <text:p>53.9622641509434</text:p>
          </table:table-cell>
          <table:table-cell/>
          <table:table-cell office:value-type="float" office:value="43.6923076923077" calcext:value-type="float">
            <text:p>43.6923076923077</text:p>
          </table:table-cell>
        </table:table-row>
        <table:table-row table:style-name="ro1">
          <table:table-cell office:value-type="float" office:value="44.5789473684211" calcext:value-type="float">
            <text:p>44.5789473684211</text:p>
          </table:table-cell>
          <table:table-cell/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56.4444444444444" calcext:value-type="float">
            <text:p>56.4444444444444</text:p>
          </table:table-cell>
          <table:table-cell/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53.1363636363636" calcext:value-type="float">
            <text:p>53.1363636363636</text:p>
          </table:table-cell>
          <table:table-cell/>
          <table:table-cell office:value-type="float" office:value="43.7254901960784" calcext:value-type="float">
            <text:p>43.7254901960784</text:p>
          </table:table-cell>
        </table:table-row>
        <table:table-row table:style-name="ro1">
          <table:table-cell office:value-type="float" office:value="26.9565217391304" calcext:value-type="float">
            <text:p>26.9565217391304</text:p>
          </table:table-cell>
          <table:table-cell/>
          <table:table-cell office:value-type="float" office:value="43.7692307692308" calcext:value-type="float">
            <text:p>43.7692307692308</text:p>
          </table:table-cell>
        </table:table-row>
        <table:table-row table:style-name="ro1">
          <table:table-cell office:value-type="float" office:value="47.8181818181818" calcext:value-type="float">
            <text:p>47.8181818181818</text:p>
          </table:table-cell>
          <table:table-cell/>
          <table:table-cell office:value-type="float" office:value="43.7727272727273" calcext:value-type="float">
            <text:p>43.7727272727273</text:p>
          </table:table-cell>
        </table:table-row>
        <table:table-row table:style-name="ro1">
          <table:table-cell office:value-type="float" office:value="60.8064516129032" calcext:value-type="float">
            <text:p>60.8064516129032</text:p>
          </table:table-cell>
          <table:table-cell/>
          <table:table-cell office:value-type="float" office:value="43.7865168539326" calcext:value-type="float">
            <text:p>43.7865168539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3.7894736842105" calcext:value-type="float">
            <text:p>43.7894736842105</text:p>
          </table:table-cell>
        </table:table-row>
        <table:table-row table:style-name="ro1">
          <table:table-cell office:value-type="float" office:value="43.5220125786164" calcext:value-type="float">
            <text:p>43.5220125786164</text:p>
          </table:table-cell>
          <table:table-cell/>
          <table:table-cell office:value-type="float" office:value="43.7916666666667" calcext:value-type="float">
            <text:p>43.7916666666667</text:p>
          </table:table-cell>
        </table:table-row>
        <table:table-row table:style-name="ro1">
          <table:table-cell office:value-type="float" office:value="89.2857142857143" calcext:value-type="float">
            <text:p>89.2857142857143</text:p>
          </table:table-cell>
          <table:table-cell/>
          <table:table-cell office:value-type="float" office:value="43.8305084745763" calcext:value-type="float">
            <text:p>43.8305084745763</text:p>
          </table:table-cell>
        </table:table-row>
        <table:table-row table:style-name="ro1">
          <table:table-cell office:value-type="float" office:value="31.7272727272727" calcext:value-type="float">
            <text:p>31.7272727272727</text:p>
          </table:table-cell>
          <table:table-cell/>
          <table:table-cell office:value-type="float" office:value="43.8823529411765" calcext:value-type="float">
            <text:p>43.8823529411765</text:p>
          </table:table-cell>
        </table:table-row>
        <table:table-row table:style-name="ro1">
          <table:table-cell office:value-type="float" office:value="52.5227272727273" calcext:value-type="float">
            <text:p>52.5227272727273</text:p>
          </table:table-cell>
          <table:table-cell/>
          <table:table-cell office:value-type="float" office:value="43.9090909090909" calcext:value-type="float">
            <text:p>43.9090909090909</text:p>
          </table:table-cell>
        </table:table-row>
        <table:table-row table:style-name="ro1">
          <table:table-cell office:value-type="float" office:value="59.7254901960784" calcext:value-type="float">
            <text:p>59.7254901960784</text:p>
          </table:table-cell>
          <table:table-cell/>
          <table:table-cell office:value-type="float" office:value="43.9365079365079" calcext:value-type="float">
            <text:p>43.9365079365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.5728155339806" calcext:value-type="float">
            <text:p>48.572815533980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.5454545454546" calcext:value-type="float">
            <text:p>52.545454545454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.962962962963" calcext:value-type="float">
            <text:p>47.962962962963</text:p>
          </table:table-cell>
          <table:table-cell/>
          <table:table-cell office:value-type="float" office:value="44.0416666666667" calcext:value-type="float">
            <text:p>44.0416666666667</text:p>
          </table:table-cell>
        </table:table-row>
        <table:table-row table:style-name="ro1">
          <table:table-cell office:value-type="float" office:value="27.8571428571429" calcext:value-type="float">
            <text:p>27.8571428571429</text:p>
          </table:table-cell>
          <table:table-cell/>
          <table:table-cell office:value-type="float" office:value="44.0476190476191" calcext:value-type="float">
            <text:p>44.047619047619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/>
          <table:table-cell office:value-type="float" office:value="44.0952380952381" calcext:value-type="float">
            <text:p>44.0952380952381</text:p>
          </table:table-cell>
        </table:table-row>
        <table:table-row table:style-name="ro1">
          <table:table-cell office:value-type="float" office:value="48.8095238095238" calcext:value-type="float">
            <text:p>48.8095238095238</text:p>
          </table:table-cell>
          <table:table-cell/>
          <table:table-cell office:value-type="float" office:value="44.0952380952381" calcext:value-type="float">
            <text:p>44.0952380952381</text:p>
          </table:table-cell>
        </table:table-row>
        <table:table-row table:style-name="ro1">
          <table:table-cell office:value-type="float" office:value="44.9107142857143" calcext:value-type="float">
            <text:p>44.9107142857143</text:p>
          </table:table-cell>
          <table:table-cell/>
          <table:table-cell office:value-type="float" office:value="44.1219512195122" calcext:value-type="float">
            <text:p>44.1219512195122</text:p>
          </table:table-cell>
        </table:table-row>
        <table:table-row table:style-name="ro1">
          <table:table-cell office:value-type="float" office:value="54.7727272727273" calcext:value-type="float">
            <text:p>54.7727272727273</text:p>
          </table:table-cell>
          <table:table-cell/>
          <table:table-cell office:value-type="float" office:value="44.1611374407583" calcext:value-type="float">
            <text:p>44.16113744075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44.2222222222222" calcext:value-type="float">
            <text:p>44.2222222222222</text:p>
          </table:table-cell>
        </table:table-row>
        <table:table-row table:style-name="ro1">
          <table:table-cell office:value-type="float" office:value="31.4273504273504" calcext:value-type="float">
            <text:p>31.4273504273504</text:p>
          </table:table-cell>
          <table:table-cell/>
          <table:table-cell office:value-type="float" office:value="44.2222222222222" calcext:value-type="float">
            <text:p>44.22222222222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21.4444444444444" calcext:value-type="float">
            <text:p>21.4444444444444</text:p>
          </table:table-cell>
          <table:table-cell/>
          <table:table-cell office:value-type="float" office:value="44.2666666666667" calcext:value-type="float">
            <text:p>44.266666666666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/>
          <table:table-cell office:value-type="float" office:value="44.2727272727273" calcext:value-type="float">
            <text:p>44.2727272727273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/>
          <table:table-cell office:value-type="float" office:value="44.2857142857143" calcext:value-type="float">
            <text:p>44.2857142857143</text:p>
          </table:table-cell>
        </table:table-row>
        <table:table-row table:style-name="ro1">
          <table:table-cell office:value-type="float" office:value="35.5454545454545" calcext:value-type="float">
            <text:p>35.5454545454545</text:p>
          </table:table-cell>
          <table:table-cell/>
          <table:table-cell office:value-type="float" office:value="44.2857142857143" calcext:value-type="float">
            <text:p>44.2857142857143</text:p>
          </table:table-cell>
        </table:table-row>
        <table:table-row table:style-name="ro1">
          <table:table-cell office:value-type="float" office:value="18.6896551724138" calcext:value-type="float">
            <text:p>18.6896551724138</text:p>
          </table:table-cell>
          <table:table-cell/>
          <table:table-cell office:value-type="float" office:value="44.3333333333333" calcext:value-type="float">
            <text:p>44.3333333333333</text:p>
          </table:table-cell>
        </table:table-row>
        <table:table-row table:style-name="ro1">
          <table:table-cell office:value-type="float" office:value="33.08" calcext:value-type="float">
            <text:p>33.08</text:p>
          </table:table-cell>
          <table:table-cell/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float" office:value="58.8148148148148" calcext:value-type="float">
            <text:p>58.8148148148148</text:p>
          </table:table-cell>
          <table:table-cell/>
          <table:table-cell office:value-type="float" office:value="44.377358490566" calcext:value-type="float">
            <text:p>44.377358490566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/>
          <table:table-cell office:value-type="float" office:value="44.4333333333333" calcext:value-type="float">
            <text:p>44.4333333333333</text:p>
          </table:table-cell>
        </table:table-row>
        <table:table-row table:style-name="ro1">
          <table:table-cell office:value-type="float" office:value="95.6666666666667" calcext:value-type="float">
            <text:p>95.6666666666667</text:p>
          </table:table-cell>
          <table:table-cell/>
          <table:table-cell office:value-type="float" office:value="44.4523809523809" calcext:value-type="float">
            <text:p>44.45238095238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4.46875" calcext:value-type="float">
            <text:p>44.46875</text:p>
          </table:table-cell>
        </table:table-row>
        <table:table-row table:style-name="ro1">
          <table:table-cell office:value-type="float" office:value="45.44" calcext:value-type="float">
            <text:p>45.44</text:p>
          </table:table-cell>
          <table:table-cell/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55.3333333333333" calcext:value-type="float">
            <text:p>55.3333333333333</text:p>
          </table:table-cell>
          <table:table-cell/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63.1304347826087" calcext:value-type="float">
            <text:p>63.1304347826087</text:p>
          </table:table-cell>
          <table:table-cell/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/>
          <table:table-cell office:value-type="float" office:value="44.5789473684211" calcext:value-type="float">
            <text:p>44.57894736842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44.5833333333333" calcext:value-type="float">
            <text:p>44.5833333333333</text:p>
          </table:table-cell>
        </table:table-row>
        <table:table-row table:style-name="ro1">
          <table:table-cell office:value-type="float" office:value="58.8260869565217" calcext:value-type="float">
            <text:p>58.8260869565217</text:p>
          </table:table-cell>
          <table:table-cell/>
          <table:table-cell office:value-type="float" office:value="44.5862068965517" calcext:value-type="float">
            <text:p>44.5862068965517</text:p>
          </table:table-cell>
        </table:table-row>
        <table:table-row table:style-name="ro1">
          <table:table-cell office:value-type="float" office:value="35.7111111111111" calcext:value-type="float">
            <text:p>35.7111111111111</text:p>
          </table:table-cell>
          <table:table-cell/>
          <table:table-cell office:value-type="float" office:value="44.5925925925926" calcext:value-type="float">
            <text:p>44.5925925925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44.6363636363636" calcext:value-type="float">
            <text:p>44.6363636363636</text:p>
          </table:table-cell>
        </table:table-row>
        <table:table-row table:style-name="ro1">
          <table:table-cell office:value-type="float" office:value="53.0555555555556" calcext:value-type="float">
            <text:p>53.0555555555556</text:p>
          </table:table-cell>
          <table:table-cell/>
          <table:table-cell office:value-type="float" office:value="44.6428571428571" calcext:value-type="float">
            <text:p>44.6428571428571</text:p>
          </table:table-cell>
        </table:table-row>
        <table:table-row table:style-name="ro1">
          <table:table-cell office:value-type="float" office:value="63.88" calcext:value-type="float">
            <text:p>63.88</text:p>
          </table:table-cell>
          <table:table-cell/>
          <table:table-cell office:value-type="float" office:value="44.6666666666667" calcext:value-type="float">
            <text:p>44.6666666666667</text:p>
          </table:table-cell>
        </table:table-row>
        <table:table-row table:style-name="ro1">
          <table:table-cell office:value-type="float" office:value="44.8653846153846" calcext:value-type="float">
            <text:p>44.8653846153846</text:p>
          </table:table-cell>
          <table:table-cell/>
          <table:table-cell office:value-type="float" office:value="44.6818181818182" calcext:value-type="float">
            <text:p>44.6818181818182</text:p>
          </table:table-cell>
        </table:table-row>
        <table:table-row table:style-name="ro1">
          <table:table-cell office:value-type="float" office:value="60.3333333333333" calcext:value-type="float">
            <text:p>60.3333333333333</text:p>
          </table:table-cell>
          <table:table-cell/>
          <table:table-cell office:value-type="float" office:value="44.6947368421053" calcext:value-type="float">
            <text:p>44.6947368421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40.3888888888889" calcext:value-type="float">
            <text:p>40.3888888888889</text:p>
          </table:table-cell>
          <table:table-cell/>
          <table:table-cell office:value-type="float" office:value="44.72" calcext:value-type="float">
            <text:p>44.72</text:p>
          </table:table-cell>
        </table:table-row>
        <table:table-row table:style-name="ro1">
          <table:table-cell office:value-type="float" office:value="49.7692307692308" calcext:value-type="float">
            <text:p>49.7692307692308</text:p>
          </table:table-cell>
          <table:table-cell/>
          <table:table-cell office:value-type="float" office:value="44.7307692307692" calcext:value-type="float">
            <text:p>44.7307692307692</text:p>
          </table:table-cell>
        </table:table-row>
        <table:table-row table:style-name="ro1">
          <table:table-cell office:value-type="float" office:value="61.875" calcext:value-type="float">
            <text:p>61.875</text:p>
          </table:table-cell>
          <table:table-cell/>
          <table:table-cell office:value-type="float" office:value="44.7391304347826" calcext:value-type="float">
            <text:p>44.7391304347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4.775" calcext:value-type="float">
            <text:p>44.775</text:p>
          </table:table-cell>
        </table:table-row>
        <table:table-row table:style-name="ro1">
          <table:table-cell office:value-type="float" office:value="50.6122448979592" calcext:value-type="float">
            <text:p>50.6122448979592</text:p>
          </table:table-cell>
          <table:table-cell/>
          <table:table-cell office:value-type="float" office:value="44.7857142857143" calcext:value-type="float">
            <text:p>44.7857142857143</text:p>
          </table:table-cell>
        </table:table-row>
        <table:table-row table:style-name="ro1">
          <table:table-cell office:value-type="float" office:value="58.3333333333333" calcext:value-type="float">
            <text:p>58.3333333333333</text:p>
          </table:table-cell>
          <table:table-cell/>
          <table:table-cell office:value-type="float" office:value="44.7916666666667" calcext:value-type="float">
            <text:p>44.7916666666667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/>
          <table:table-cell office:value-type="float" office:value="44.8461538461538" calcext:value-type="float">
            <text:p>44.8461538461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4.8653846153846" calcext:value-type="float">
            <text:p>44.8653846153846</text:p>
          </table:table-cell>
        </table:table-row>
        <table:table-row table:style-name="ro1">
          <table:table-cell office:value-type="float" office:value="70.04" calcext:value-type="float">
            <text:p>70.04</text:p>
          </table:table-cell>
          <table:table-cell/>
          <table:table-cell office:value-type="float" office:value="44.8660714285714" calcext:value-type="float">
            <text:p>44.8660714285714</text:p>
          </table:table-cell>
        </table:table-row>
        <table:table-row table:style-name="ro1">
          <table:table-cell office:value-type="float" office:value="48.53125" calcext:value-type="float">
            <text:p>48.53125</text:p>
          </table:table-cell>
          <table:table-cell/>
          <table:table-cell office:value-type="float" office:value="44.9047619047619" calcext:value-type="float">
            <text:p>44.9047619047619</text:p>
          </table:table-cell>
        </table:table-row>
        <table:table-row table:style-name="ro1">
          <table:table-cell office:value-type="float" office:value="26.6969696969697" calcext:value-type="float">
            <text:p>26.6969696969697</text:p>
          </table:table-cell>
          <table:table-cell/>
          <table:table-cell office:value-type="float" office:value="44.9107142857143" calcext:value-type="float">
            <text:p>44.9107142857143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44.9166666666667" calcext:value-type="float">
            <text:p>44.9166666666667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/>
          <table:table-cell office:value-type="float" office:value="44.9375" calcext:value-type="float">
            <text:p>44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4.9375" calcext:value-type="float">
            <text:p>44.9375</text:p>
          </table:table-cell>
        </table:table-row>
        <table:table-row table:style-name="ro1">
          <table:table-cell office:value-type="float" office:value="69.6666666666667" calcext:value-type="float">
            <text:p>69.6666666666667</text:p>
          </table:table-cell>
          <table:table-cell/>
          <table:table-cell office:value-type="float" office:value="44.9508196721312" calcext:value-type="float">
            <text:p>44.9508196721312</text:p>
          </table:table-cell>
        </table:table-row>
        <table:table-row table:style-name="ro1">
          <table:table-cell office:value-type="float" office:value="52.5833333333333" calcext:value-type="float">
            <text:p>52.5833333333333</text:p>
          </table:table-cell>
          <table:table-cell/>
          <table:table-cell office:value-type="float" office:value="44.9803921568627" calcext:value-type="float">
            <text:p>44.9803921568627</text:p>
          </table:table-cell>
        </table:table-row>
        <table:table-row table:style-name="ro1">
          <table:table-cell office:value-type="float" office:value="51.9722222222222" calcext:value-type="float">
            <text:p>51.972222222222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714285714286" calcext:value-type="float">
            <text:p>71.5714285714286</text:p>
          </table:table-cell>
          <table:table-cell/>
          <table:table-cell office:value-type="float" office:value="45.0625" calcext:value-type="float">
            <text:p>45.0625</text:p>
          </table:table-cell>
        </table:table-row>
        <table:table-row table:style-name="ro1">
          <table:table-cell office:value-type="float" office:value="67.2857142857143" calcext:value-type="float">
            <text:p>67.2857142857143</text:p>
          </table:table-cell>
          <table:table-cell/>
          <table:table-cell office:value-type="float" office:value="45.0689655172414" calcext:value-type="float">
            <text:p>45.0689655172414</text:p>
          </table:table-cell>
        </table:table-row>
        <table:table-row table:style-name="ro1">
          <table:table-cell office:value-type="float" office:value="73.2222222222222" calcext:value-type="float">
            <text:p>73.2222222222222</text:p>
          </table:table-cell>
          <table:table-cell/>
          <table:table-cell office:value-type="float" office:value="45.125" calcext:value-type="float">
            <text:p>45.125</text:p>
          </table:table-cell>
        </table:table-row>
        <table:table-row table:style-name="ro1">
          <table:table-cell office:value-type="float" office:value="64.28" calcext:value-type="float">
            <text:p>64.28</text:p>
          </table:table-cell>
          <table:table-cell/>
          <table:table-cell office:value-type="float" office:value="45.1621621621622" calcext:value-type="float">
            <text:p>45.1621621621622</text:p>
          </table:table-cell>
        </table:table-row>
        <table:table-row table:style-name="ro1">
          <table:table-cell office:value-type="float" office:value="59.6888888888889" calcext:value-type="float">
            <text:p>59.6888888888889</text:p>
          </table:table-cell>
          <table:table-cell/>
          <table:table-cell office:value-type="float" office:value="45.1904761904762" calcext:value-type="float">
            <text:p>45.1904761904762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/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36.037037037037" calcext:value-type="float">
            <text:p>36.037037037037</text:p>
          </table:table-cell>
          <table:table-cell/>
          <table:table-cell office:value-type="float" office:value="45.2083333333333" calcext:value-type="float">
            <text:p>45.2083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5.2142857142857" calcext:value-type="float">
            <text:p>45.2142857142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5.21875" calcext:value-type="float">
            <text:p>45.21875</text:p>
          </table:table-cell>
        </table:table-row>
        <table:table-row table:style-name="ro1">
          <table:table-cell office:value-type="float" office:value="34.2794117647059" calcext:value-type="float">
            <text:p>34.2794117647059</text:p>
          </table:table-cell>
          <table:table-cell/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/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/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60.7777777777778" calcext:value-type="float">
            <text:p>60.7777777777778</text:p>
          </table:table-cell>
          <table:table-cell/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58.0153846153846" calcext:value-type="float">
            <text:p>58.0153846153846</text:p>
          </table:table-cell>
          <table:table-cell/>
          <table:table-cell office:value-type="float" office:value="45.2592592592593" calcext:value-type="float">
            <text:p>45.259259259259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45.2857142857143" calcext:value-type="float">
            <text:p>45.2857142857143</text:p>
          </table:table-cell>
        </table:table-row>
        <table:table-row table:style-name="ro1">
          <table:table-cell office:value-type="float" office:value="38.5294117647059" calcext:value-type="float">
            <text:p>38.5294117647059</text:p>
          </table:table-cell>
          <table:table-cell/>
          <table:table-cell office:value-type="float" office:value="45.2962962962963" calcext:value-type="float">
            <text:p>45.2962962962963</text:p>
          </table:table-cell>
        </table:table-row>
        <table:table-row table:style-name="ro1">
          <table:table-cell office:value-type="float" office:value="79.75" calcext:value-type="float">
            <text:p>79.75</text:p>
          </table:table-cell>
          <table:table-cell/>
          <table:table-cell office:value-type="float" office:value="45.3571428571429" calcext:value-type="float">
            <text:p>45.3571428571429</text:p>
          </table:table-cell>
        </table:table-row>
        <table:table-row table:style-name="ro1">
          <table:table-cell office:value-type="float" office:value="40.1176470588235" calcext:value-type="float">
            <text:p>40.1176470588235</text:p>
          </table:table-cell>
          <table:table-cell/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float" office:value="40.9545454545455" calcext:value-type="float">
            <text:p>40.9545454545455</text:p>
          </table:table-cell>
          <table:table-cell/>
          <table:table-cell office:value-type="float" office:value="45.3809523809524" calcext:value-type="float">
            <text:p>45.3809523809524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/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61.8809523809524" calcext:value-type="float">
            <text:p>61.8809523809524</text:p>
          </table:table-cell>
          <table:table-cell/>
          <table:table-cell office:value-type="float" office:value="45.4146341463415" calcext:value-type="float">
            <text:p>45.4146341463415</text:p>
          </table:table-cell>
        </table:table-row>
        <table:table-row table:style-name="ro1">
          <table:table-cell office:value-type="float" office:value="49.7916666666667" calcext:value-type="float">
            <text:p>49.7916666666667</text:p>
          </table:table-cell>
          <table:table-cell/>
          <table:table-cell office:value-type="float" office:value="45.4166666666667" calcext:value-type="float">
            <text:p>45.4166666666667</text:p>
          </table:table-cell>
        </table:table-row>
        <table:table-row table:style-name="ro1">
          <table:table-cell office:value-type="float" office:value="72.1578947368421" calcext:value-type="float">
            <text:p>72.1578947368421</text:p>
          </table:table-cell>
          <table:table-cell/>
          <table:table-cell office:value-type="float" office:value="45.421052631579" calcext:value-type="float">
            <text:p>45.421052631579</text:p>
          </table:table-cell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/>
          <table:table-cell office:value-type="float" office:value="45.4329896907217" calcext:value-type="float">
            <text:p>45.4329896907217</text:p>
          </table:table-cell>
        </table:table-row>
        <table:table-row table:style-name="ro1">
          <table:table-cell office:value-type="float" office:value="46.4054054054054" calcext:value-type="float">
            <text:p>46.4054054054054</text:p>
          </table:table-cell>
          <table:table-cell/>
          <table:table-cell office:value-type="float" office:value="45.44" calcext:value-type="float">
            <text:p>45.44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/>
          <table:table-cell office:value-type="float" office:value="45.4615384615385" calcext:value-type="float">
            <text:p>45.4615384615385</text:p>
          </table:table-cell>
        </table:table-row>
        <table:table-row table:style-name="ro1">
          <table:table-cell office:value-type="float" office:value="81.375" calcext:value-type="float">
            <text:p>81.375</text:p>
          </table:table-cell>
          <table:table-cell/>
          <table:table-cell office:value-type="float" office:value="45.4736842105263" calcext:value-type="float">
            <text:p>45.4736842105263</text:p>
          </table:table-cell>
        </table:table-row>
        <table:table-row table:style-name="ro1">
          <table:table-cell office:value-type="float" office:value="37.6333333333333" calcext:value-type="float">
            <text:p>37.6333333333333</text:p>
          </table:table-cell>
          <table:table-cell/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45.5217391304348" calcext:value-type="float">
            <text:p>45.5217391304348</text:p>
          </table:table-cell>
        </table:table-row>
        <table:table-row table:style-name="ro1">
          <table:table-cell office:value-type="float" office:value="44.3333333333333" calcext:value-type="float">
            <text:p>44.3333333333333</text:p>
          </table:table-cell>
          <table:table-cell/>
          <table:table-cell office:value-type="float" office:value="45.5375" calcext:value-type="float">
            <text:p>45.5375</text:p>
          </table:table-cell>
        </table:table-row>
        <table:table-row table:style-name="ro1">
          <table:table-cell office:value-type="float" office:value="49.3076923076923" calcext:value-type="float">
            <text:p>49.3076923076923</text:p>
          </table:table-cell>
          <table:table-cell/>
          <table:table-cell office:value-type="float" office:value="45.5384615384615" calcext:value-type="float">
            <text:p>45.5384615384615</text:p>
          </table:table-cell>
        </table:table-row>
        <table:table-row table:style-name="ro1">
          <table:table-cell office:value-type="float" office:value="45.21875" calcext:value-type="float">
            <text:p>45.21875</text:p>
          </table:table-cell>
          <table:table-cell/>
          <table:table-cell office:value-type="float" office:value="45.5416666666667" calcext:value-type="float">
            <text:p>45.5416666666667</text:p>
          </table:table-cell>
        </table:table-row>
        <table:table-row table:style-name="ro1">
          <table:table-cell office:value-type="float" office:value="57.7457627118644" calcext:value-type="float">
            <text:p>57.7457627118644</text:p>
          </table:table-cell>
          <table:table-cell/>
          <table:table-cell office:value-type="float" office:value="45.6111111111111" calcext:value-type="float">
            <text:p>45.6111111111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5.6190476190476" calcext:value-type="float">
            <text:p>45.6190476190476</text:p>
          </table:table-cell>
        </table:table-row>
        <table:table-row table:style-name="ro1">
          <table:table-cell office:value-type="float" office:value="29.5119047619048" calcext:value-type="float">
            <text:p>29.5119047619048</text:p>
          </table:table-cell>
          <table:table-cell/>
          <table:table-cell office:value-type="float" office:value="45.625" calcext:value-type="float">
            <text:p>45.625</text:p>
          </table:table-cell>
        </table:table-row>
        <table:table-row table:style-name="ro1">
          <table:table-cell office:value-type="float" office:value="30.7931034482759" calcext:value-type="float">
            <text:p>30.7931034482759</text:p>
          </table:table-cell>
          <table:table-cell/>
          <table:table-cell office:value-type="float" office:value="45.6547619047619" calcext:value-type="float">
            <text:p>45.654761904761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/>
          <table:table-cell office:value-type="float" office:value="45.6551724137931" calcext:value-type="float">
            <text:p>45.6551724137931</text:p>
          </table:table-cell>
        </table:table-row>
        <table:table-row table:style-name="ro1">
          <table:table-cell office:value-type="float" office:value="51.1428571428572" calcext:value-type="float">
            <text:p>51.1428571428572</text:p>
          </table:table-cell>
          <table:table-cell/>
          <table:table-cell office:value-type="float" office:value="45.6829268292683" calcext:value-type="float">
            <text:p>45.6829268292683</text:p>
          </table:table-cell>
        </table:table-row>
        <table:table-row table:style-name="ro1">
          <table:table-cell office:value-type="float" office:value="56.3846153846154" calcext:value-type="float">
            <text:p>56.3846153846154</text:p>
          </table:table-cell>
          <table:table-cell/>
          <table:table-cell office:value-type="float" office:value="45.7037037037037" calcext:value-type="float">
            <text:p>45.7037037037037</text:p>
          </table:table-cell>
        </table:table-row>
        <table:table-row table:style-name="ro1">
          <table:table-cell office:value-type="float" office:value="46.1588235294118" calcext:value-type="float">
            <text:p>46.1588235294118</text:p>
          </table:table-cell>
          <table:table-cell/>
          <table:table-cell office:value-type="float" office:value="45.7142857142857" calcext:value-type="float">
            <text:p>45.7142857142857</text:p>
          </table:table-cell>
        </table:table-row>
        <table:table-row table:style-name="ro1">
          <table:table-cell office:value-type="float" office:value="44.2857142857143" calcext:value-type="float">
            <text:p>44.2857142857143</text:p>
          </table:table-cell>
          <table:table-cell/>
          <table:table-cell office:value-type="float" office:value="45.7352941176471" calcext:value-type="float">
            <text:p>45.7352941176471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/>
          <table:table-cell office:value-type="float" office:value="45.7391304347826" calcext:value-type="float">
            <text:p>45.7391304347826</text:p>
          </table:table-cell>
        </table:table-row>
        <table:table-row table:style-name="ro1">
          <table:table-cell office:value-type="float" office:value="55.421052631579" calcext:value-type="float">
            <text:p>55.421052631579</text:p>
          </table:table-cell>
          <table:table-cell/>
          <table:table-cell office:value-type="float" office:value="45.75" calcext:value-type="float">
            <text:p>45.75</text:p>
          </table:table-cell>
        </table:table-row>
        <table:table-row table:style-name="ro1">
          <table:table-cell office:value-type="float" office:value="61.96" calcext:value-type="float">
            <text:p>61.96</text:p>
          </table:table-cell>
          <table:table-cell/>
          <table:table-cell office:value-type="float" office:value="45.7619047619048" calcext:value-type="float">
            <text:p>45.7619047619048</text:p>
          </table:table-cell>
        </table:table-row>
        <table:table-row table:style-name="ro1">
          <table:table-cell office:value-type="float" office:value="73.5555555555556" calcext:value-type="float">
            <text:p>73.5555555555556</text:p>
          </table:table-cell>
          <table:table-cell/>
          <table:table-cell office:value-type="float" office:value="45.8076923076923" calcext:value-type="float">
            <text:p>45.80769230769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5.8305084745763" calcext:value-type="float">
            <text:p>45.83050847457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45.8448275862069" calcext:value-type="float">
            <text:p>45.8448275862069</text:p>
          </table:table-cell>
        </table:table-row>
        <table:table-row table:style-name="ro1">
          <table:table-cell office:value-type="float" office:value="32.5217391304348" calcext:value-type="float">
            <text:p>32.5217391304348</text:p>
          </table:table-cell>
          <table:table-cell/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79.75" calcext:value-type="float">
            <text:p>79.75</text:p>
          </table:table-cell>
          <table:table-cell/>
          <table:table-cell office:value-type="float" office:value="45.9047619047619" calcext:value-type="float">
            <text:p>45.9047619047619</text:p>
          </table:table-cell>
        </table:table-row>
        <table:table-row table:style-name="ro1">
          <table:table-cell office:value-type="float" office:value="38.2578125" calcext:value-type="float">
            <text:p>38.2578125</text:p>
          </table:table-cell>
          <table:table-cell/>
          <table:table-cell office:value-type="float" office:value="45.9090909090909" calcext:value-type="float">
            <text:p>45.9090909090909</text:p>
          </table:table-cell>
        </table:table-row>
        <table:table-row table:style-name="ro1">
          <table:table-cell office:value-type="float" office:value="52.0952380952381" calcext:value-type="float">
            <text:p>52.0952380952381</text:p>
          </table:table-cell>
          <table:table-cell/>
          <table:table-cell office:value-type="float" office:value="45.9148936170213" calcext:value-type="float">
            <text:p>45.9148936170213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/>
          <table:table-cell office:value-type="float" office:value="45.9333333333333" calcext:value-type="float">
            <text:p>45.93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5.952380952381" calcext:value-type="float">
            <text:p>45.952380952381</text:p>
          </table:table-cell>
        </table:table-row>
        <table:table-row table:style-name="ro1">
          <table:table-cell office:value-type="float" office:value="46.4657534246575" calcext:value-type="float">
            <text:p>46.465753424657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.0714285714286" calcext:value-type="float">
            <text:p>46.071428571428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.3529411764706" calcext:value-type="float">
            <text:p>39.352941176470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.2317073170732" calcext:value-type="float">
            <text:p>53.231707317073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.9722222222222" calcext:value-type="float">
            <text:p>57.972222222222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.1029411764706" calcext:value-type="float">
            <text:p>61.102941176470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.7741935483871" calcext:value-type="float">
            <text:p>58.774193548387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.9333333333333" calcext:value-type="float">
            <text:p>47.9333333333333</text:p>
          </table:table-cell>
          <table:table-cell/>
          <table:table-cell office:value-type="float" office:value="46.0476190476191" calcext:value-type="float">
            <text:p>46.0476190476191</text:p>
          </table:table-cell>
        </table:table-row>
        <table:table-row table:style-name="ro1">
          <table:table-cell office:value-type="float" office:value="38.5573770491803" calcext:value-type="float">
            <text:p>38.5573770491803</text:p>
          </table:table-cell>
          <table:table-cell/>
          <table:table-cell office:value-type="float" office:value="46.0526315789474" calcext:value-type="float">
            <text:p>46.0526315789474</text:p>
          </table:table-cell>
        </table:table-row>
        <table:table-row table:style-name="ro1">
          <table:table-cell office:value-type="float" office:value="63.7391304347826" calcext:value-type="float">
            <text:p>63.7391304347826</text:p>
          </table:table-cell>
          <table:table-cell/>
          <table:table-cell office:value-type="float" office:value="46.0714285714286" calcext:value-type="float">
            <text:p>46.0714285714286</text:p>
          </table:table-cell>
        </table:table-row>
        <table:table-row table:style-name="ro1">
          <table:table-cell office:value-type="float" office:value="88.3333333333333" calcext:value-type="float">
            <text:p>88.3333333333333</text:p>
          </table:table-cell>
          <table:table-cell/>
          <table:table-cell office:value-type="float" office:value="46.0833333333333" calcext:value-type="float">
            <text:p>46.0833333333333</text:p>
          </table:table-cell>
        </table:table-row>
        <table:table-row table:style-name="ro1">
          <table:table-cell office:value-type="float" office:value="52.1428571428571" calcext:value-type="float">
            <text:p>52.1428571428571</text:p>
          </table:table-cell>
          <table:table-cell/>
          <table:table-cell office:value-type="float" office:value="46.0862068965517" calcext:value-type="float">
            <text:p>46.0862068965517</text:p>
          </table:table-cell>
        </table:table-row>
        <table:table-row table:style-name="ro1">
          <table:table-cell office:value-type="float" office:value="20.5084745762712" calcext:value-type="float">
            <text:p>20.5084745762712</text:p>
          </table:table-cell>
          <table:table-cell/>
          <table:table-cell office:value-type="float" office:value="46.1136363636364" calcext:value-type="float">
            <text:p>46.1136363636364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/>
          <table:table-cell office:value-type="float" office:value="46.1428571428572" calcext:value-type="float">
            <text:p>46.1428571428572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/>
          <table:table-cell office:value-type="float" office:value="46.1428571428572" calcext:value-type="float">
            <text:p>46.1428571428572</text:p>
          </table:table-cell>
        </table:table-row>
        <table:table-row table:style-name="ro1">
          <table:table-cell office:value-type="float" office:value="63.4583333333333" calcext:value-type="float">
            <text:p>63.4583333333333</text:p>
          </table:table-cell>
          <table:table-cell/>
          <table:table-cell office:value-type="float" office:value="46.1578947368421" calcext:value-type="float">
            <text:p>46.1578947368421</text:p>
          </table:table-cell>
        </table:table-row>
        <table:table-row table:style-name="ro1">
          <table:table-cell office:value-type="float" office:value="47.3222222222222" calcext:value-type="float">
            <text:p>47.3222222222222</text:p>
          </table:table-cell>
          <table:table-cell/>
          <table:table-cell office:value-type="float" office:value="46.1588235294118" calcext:value-type="float">
            <text:p>46.158823529411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/>
          <table:table-cell office:value-type="float" office:value="46.1666666666667" calcext:value-type="float">
            <text:p>46.1666666666667</text:p>
          </table:table-cell>
        </table:table-row>
        <table:table-row table:style-name="ro1">
          <table:table-cell office:value-type="float" office:value="60.4166666666667" calcext:value-type="float">
            <text:p>60.4166666666667</text:p>
          </table:table-cell>
          <table:table-cell/>
          <table:table-cell office:value-type="float" office:value="46.1702127659575" calcext:value-type="float">
            <text:p>46.1702127659575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/>
          <table:table-cell office:value-type="float" office:value="46.1785714285714" calcext:value-type="float">
            <text:p>46.1785714285714</text:p>
          </table:table-cell>
        </table:table-row>
        <table:table-row table:style-name="ro1">
          <table:table-cell office:value-type="float" office:value="62.9814814814815" calcext:value-type="float">
            <text:p>62.9814814814815</text:p>
          </table:table-cell>
          <table:table-cell/>
          <table:table-cell office:value-type="float" office:value="46.1860465116279" calcext:value-type="float">
            <text:p>46.1860465116279</text:p>
          </table:table-cell>
        </table:table-row>
        <table:table-row table:style-name="ro1">
          <table:table-cell office:value-type="float" office:value="70.7777777777778" calcext:value-type="float">
            <text:p>70.7777777777778</text:p>
          </table:table-cell>
          <table:table-cell/>
          <table:table-cell office:value-type="float" office:value="46.2222222222222" calcext:value-type="float">
            <text:p>46.2222222222222</text:p>
          </table:table-cell>
        </table:table-row>
        <table:table-row table:style-name="ro1">
          <table:table-cell office:value-type="float" office:value="25.531914893617" calcext:value-type="float">
            <text:p>25.531914893617</text:p>
          </table:table-cell>
          <table:table-cell/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47.6857142857143" calcext:value-type="float">
            <text:p>47.6857142857143</text:p>
          </table:table-cell>
          <table:table-cell/>
          <table:table-cell office:value-type="float" office:value="46.2631578947368" calcext:value-type="float">
            <text:p>46.26315789473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6.2727272727273" calcext:value-type="float">
            <text:p>46.2727272727273</text:p>
          </table:table-cell>
        </table:table-row>
        <table:table-row table:style-name="ro1">
          <table:table-cell office:value-type="float" office:value="52.5333333333333" calcext:value-type="float">
            <text:p>52.5333333333333</text:p>
          </table:table-cell>
          <table:table-cell/>
          <table:table-cell office:value-type="float" office:value="46.3333333333333" calcext:value-type="float">
            <text:p>46.3333333333333</text:p>
          </table:table-cell>
        </table:table-row>
        <table:table-row table:style-name="ro1">
          <table:table-cell office:value-type="float" office:value="75.75" calcext:value-type="float">
            <text:p>75.75</text:p>
          </table:table-cell>
          <table:table-cell/>
          <table:table-cell office:value-type="float" office:value="46.3448275862069" calcext:value-type="float">
            <text:p>46.3448275862069</text:p>
          </table:table-cell>
        </table:table-row>
        <table:table-row table:style-name="ro1">
          <table:table-cell office:value-type="float" office:value="36.3333333333333" calcext:value-type="float">
            <text:p>36.3333333333333</text:p>
          </table:table-cell>
          <table:table-cell/>
          <table:table-cell office:value-type="float" office:value="46.35" calcext:value-type="float">
            <text:p>46.35</text:p>
          </table:table-cell>
        </table:table-row>
        <table:table-row table:style-name="ro1">
          <table:table-cell office:value-type="float" office:value="46.8285714285714" calcext:value-type="float">
            <text:p>46.8285714285714</text:p>
          </table:table-cell>
          <table:table-cell/>
          <table:table-cell office:value-type="float" office:value="46.35" calcext:value-type="float">
            <text:p>46.35</text:p>
          </table:table-cell>
        </table:table-row>
        <table:table-row table:style-name="ro1">
          <table:table-cell office:value-type="float" office:value="69.4285714285714" calcext:value-type="float">
            <text:p>69.4285714285714</text:p>
          </table:table-cell>
          <table:table-cell/>
          <table:table-cell office:value-type="float" office:value="46.3953488372093" calcext:value-type="float">
            <text:p>46.3953488372093</text:p>
          </table:table-cell>
        </table:table-row>
        <table:table-row table:style-name="ro1">
          <table:table-cell office:value-type="float" office:value="52.2222222222222" calcext:value-type="float">
            <text:p>52.2222222222222</text:p>
          </table:table-cell>
          <table:table-cell/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73.125" calcext:value-type="float">
            <text:p>73.125</text:p>
          </table:table-cell>
          <table:table-cell/>
          <table:table-cell office:value-type="float" office:value="46.4047619047619" calcext:value-type="float">
            <text:p>46.4047619047619</text:p>
          </table:table-cell>
        </table:table-row>
        <table:table-row table:style-name="ro1">
          <table:table-cell office:value-type="float" office:value="53.4285714285714" calcext:value-type="float">
            <text:p>53.4285714285714</text:p>
          </table:table-cell>
          <table:table-cell/>
          <table:table-cell office:value-type="float" office:value="46.4054054054054" calcext:value-type="float">
            <text:p>46.4054054054054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/>
          <table:table-cell office:value-type="float" office:value="46.4615384615385" calcext:value-type="float">
            <text:p>46.4615384615385</text:p>
          </table:table-cell>
        </table:table-row>
        <table:table-row table:style-name="ro1">
          <table:table-cell office:value-type="float" office:value="60.1666666666667" calcext:value-type="float">
            <text:p>60.1666666666667</text:p>
          </table:table-cell>
          <table:table-cell/>
          <table:table-cell office:value-type="float" office:value="46.4657534246575" calcext:value-type="float">
            <text:p>46.4657534246575</text:p>
          </table:table-cell>
        </table:table-row>
        <table:table-row table:style-name="ro1">
          <table:table-cell office:value-type="float" office:value="50.2380952380952" calcext:value-type="float">
            <text:p>50.2380952380952</text:p>
          </table:table-cell>
          <table:table-cell/>
          <table:table-cell office:value-type="float" office:value="46.4666666666667" calcext:value-type="float">
            <text:p>46.4666666666667</text:p>
          </table:table-cell>
        </table:table-row>
        <table:table-row table:style-name="ro1">
          <table:table-cell office:value-type="float" office:value="52.6315789473684" calcext:value-type="float">
            <text:p>52.6315789473684</text:p>
          </table:table-cell>
          <table:table-cell/>
          <table:table-cell office:value-type="float" office:value="46.46875" calcext:value-type="float">
            <text:p>46.46875</text:p>
          </table:table-cell>
        </table:table-row>
        <table:table-row table:style-name="ro1">
          <table:table-cell office:value-type="float" office:value="55.6923076923077" calcext:value-type="float">
            <text:p>55.6923076923077</text:p>
          </table:table-cell>
          <table:table-cell/>
          <table:table-cell office:value-type="float" office:value="46.4782608695652" calcext:value-type="float">
            <text:p>46.4782608695652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/>
          <table:table-cell office:value-type="float" office:value="46.4821428571429" calcext:value-type="float">
            <text:p>46.4821428571429</text:p>
          </table:table-cell>
        </table:table-row>
        <table:table-row table:style-name="ro1">
          <table:table-cell office:value-type="float" office:value="67.0769230769231" calcext:value-type="float">
            <text:p>67.0769230769231</text:p>
          </table:table-cell>
          <table:table-cell/>
          <table:table-cell office:value-type="float" office:value="46.5263157894737" calcext:value-type="float">
            <text:p>46.5263157894737</text:p>
          </table:table-cell>
        </table:table-row>
        <table:table-row table:style-name="ro1">
          <table:table-cell office:value-type="float" office:value="74.4814814814815" calcext:value-type="float">
            <text:p>74.4814814814815</text:p>
          </table:table-cell>
          <table:table-cell/>
          <table:table-cell office:value-type="float" office:value="46.5454545454545" calcext:value-type="float">
            <text:p>46.5454545454545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/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32.7808219178082" calcext:value-type="float">
            <text:p>32.7808219178082</text:p>
          </table:table-cell>
          <table:table-cell/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/>
          <table:table-cell office:value-type="float" office:value="46.6190476190476" calcext:value-type="float">
            <text:p>46.6190476190476</text:p>
          </table:table-cell>
        </table:table-row>
        <table:table-row table:style-name="ro1">
          <table:table-cell office:value-type="float" office:value="59.9354838709678" calcext:value-type="float">
            <text:p>59.9354838709678</text:p>
          </table:table-cell>
          <table:table-cell/>
          <table:table-cell office:value-type="float" office:value="46.625" calcext:value-type="float">
            <text:p>46.625</text:p>
          </table:table-cell>
        </table:table-row>
        <table:table-row table:style-name="ro1">
          <table:table-cell office:value-type="float" office:value="52.9047619047619" calcext:value-type="float">
            <text:p>52.9047619047619</text:p>
          </table:table-cell>
          <table:table-cell/>
          <table:table-cell office:value-type="float" office:value="46.625" calcext:value-type="float">
            <text:p>46.625</text:p>
          </table:table-cell>
        </table:table-row>
        <table:table-row table:style-name="ro1">
          <table:table-cell office:value-type="float" office:value="57.8333333333333" calcext:value-type="float">
            <text:p>57.8333333333333</text:p>
          </table:table-cell>
          <table:table-cell/>
          <table:table-cell office:value-type="float" office:value="46.6285714285714" calcext:value-type="float">
            <text:p>46.6285714285714</text:p>
          </table:table-cell>
        </table:table-row>
        <table:table-row table:style-name="ro1">
          <table:table-cell office:value-type="float" office:value="58.1142857142857" calcext:value-type="float">
            <text:p>58.1142857142857</text:p>
          </table:table-cell>
          <table:table-cell/>
          <table:table-cell office:value-type="float" office:value="46.6363636363636" calcext:value-type="float">
            <text:p>46.6363636363636</text:p>
          </table:table-cell>
        </table:table-row>
        <table:table-row table:style-name="ro1">
          <table:table-cell office:value-type="float" office:value="85.5555555555556" calcext:value-type="float">
            <text:p>85.5555555555556</text:p>
          </table:table-cell>
          <table:table-cell/>
          <table:table-cell office:value-type="float" office:value="46.6538461538462" calcext:value-type="float">
            <text:p>46.6538461538462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/>
          <table:table-cell office:value-type="float" office:value="46.7058823529412" calcext:value-type="float">
            <text:p>46.7058823529412</text:p>
          </table:table-cell>
        </table:table-row>
        <table:table-row table:style-name="ro1">
          <table:table-cell office:value-type="float" office:value="64.3958333333333" calcext:value-type="float">
            <text:p>64.3958333333333</text:p>
          </table:table-cell>
          <table:table-cell/>
          <table:table-cell office:value-type="float" office:value="46.7254901960784" calcext:value-type="float">
            <text:p>46.72549019607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6.7555555555556" calcext:value-type="float">
            <text:p>46.7555555555556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/>
          <table:table-cell office:value-type="float" office:value="46.7719298245614" calcext:value-type="float">
            <text:p>46.7719298245614</text:p>
          </table:table-cell>
        </table:table-row>
        <table:table-row table:style-name="ro1">
          <table:table-cell office:value-type="float" office:value="42.2727272727273" calcext:value-type="float">
            <text:p>42.2727272727273</text:p>
          </table:table-cell>
          <table:table-cell/>
          <table:table-cell office:value-type="float" office:value="46.7777777777778" calcext:value-type="float">
            <text:p>46.7777777777778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/>
          <table:table-cell office:value-type="float" office:value="46.7777777777778" calcext:value-type="float">
            <text:p>46.7777777777778</text:p>
          </table:table-cell>
        </table:table-row>
        <table:table-row table:style-name="ro1">
          <table:table-cell office:value-type="float" office:value="49.9142857142857" calcext:value-type="float">
            <text:p>49.9142857142857</text:p>
          </table:table-cell>
          <table:table-cell/>
          <table:table-cell office:value-type="float" office:value="46.7894736842105" calcext:value-type="float">
            <text:p>46.7894736842105</text:p>
          </table:table-cell>
        </table:table-row>
        <table:table-row table:style-name="ro1">
          <table:table-cell office:value-type="float" office:value="55.1428571428571" calcext:value-type="float">
            <text:p>55.1428571428571</text:p>
          </table:table-cell>
          <table:table-cell/>
          <table:table-cell office:value-type="float" office:value="46.8108108108108" calcext:value-type="float">
            <text:p>46.8108108108108</text:p>
          </table:table-cell>
        </table:table-row>
        <table:table-row table:style-name="ro1">
          <table:table-cell office:value-type="float" office:value="31.9230769230769" calcext:value-type="float">
            <text:p>31.9230769230769</text:p>
          </table:table-cell>
          <table:table-cell/>
          <table:table-cell office:value-type="float" office:value="46.8260869565217" calcext:value-type="float">
            <text:p>46.8260869565217</text:p>
          </table:table-cell>
        </table:table-row>
        <table:table-row table:style-name="ro1">
          <table:table-cell office:value-type="float" office:value="15.1379310344828" calcext:value-type="float">
            <text:p>15.1379310344828</text:p>
          </table:table-cell>
          <table:table-cell/>
          <table:table-cell office:value-type="float" office:value="46.8285714285714" calcext:value-type="float">
            <text:p>46.8285714285714</text:p>
          </table:table-cell>
        </table:table-row>
        <table:table-row table:style-name="ro1">
          <table:table-cell office:value-type="float" office:value="54.9259259259259" calcext:value-type="float">
            <text:p>54.9259259259259</text:p>
          </table:table-cell>
          <table:table-cell/>
          <table:table-cell office:value-type="float" office:value="46.8333333333333" calcext:value-type="float">
            <text:p>46.8333333333333</text:p>
          </table:table-cell>
        </table:table-row>
        <table:table-row table:style-name="ro1">
          <table:table-cell office:value-type="float" office:value="54.3181818181818" calcext:value-type="float">
            <text:p>54.3181818181818</text:p>
          </table:table-cell>
          <table:table-cell/>
          <table:table-cell office:value-type="float" office:value="46.8333333333333" calcext:value-type="float">
            <text:p>46.8333333333333</text:p>
          </table:table-cell>
        </table:table-row>
        <table:table-row table:style-name="ro1">
          <table:table-cell office:value-type="float" office:value="31.1521739130435" calcext:value-type="float">
            <text:p>31.1521739130435</text:p>
          </table:table-cell>
          <table:table-cell/>
          <table:table-cell office:value-type="float" office:value="46.8571428571429" calcext:value-type="float">
            <text:p>46.8571428571429</text:p>
          </table:table-cell>
        </table:table-row>
        <table:table-row table:style-name="ro1">
          <table:table-cell office:value-type="float" office:value="61.5365853658537" calcext:value-type="float">
            <text:p>61.5365853658537</text:p>
          </table:table-cell>
          <table:table-cell/>
          <table:table-cell office:value-type="float" office:value="46.8571428571429" calcext:value-type="float">
            <text:p>46.8571428571429</text:p>
          </table:table-cell>
        </table:table-row>
        <table:table-row table:style-name="ro1">
          <table:table-cell office:value-type="float" office:value="43.9090909090909" calcext:value-type="float">
            <text:p>43.9090909090909</text:p>
          </table:table-cell>
          <table:table-cell/>
          <table:table-cell office:value-type="float" office:value="46.8695652173913" calcext:value-type="float">
            <text:p>46.8695652173913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/>
          <table:table-cell office:value-type="float" office:value="46.8787878787879" calcext:value-type="float">
            <text:p>46.8787878787879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/>
          <table:table-cell office:value-type="float" office:value="46.88" calcext:value-type="float">
            <text:p>46.88</text:p>
          </table:table-cell>
        </table:table-row>
        <table:table-row table:style-name="ro1">
          <table:table-cell office:value-type="float" office:value="32.7931034482759" calcext:value-type="float">
            <text:p>32.7931034482759</text:p>
          </table:table-cell>
          <table:table-cell/>
          <table:table-cell office:value-type="float" office:value="46.8823529411765" calcext:value-type="float">
            <text:p>46.8823529411765</text:p>
          </table:table-cell>
        </table:table-row>
        <table:table-row table:style-name="ro1">
          <table:table-cell office:value-type="float" office:value="36.9285714285714" calcext:value-type="float">
            <text:p>36.9285714285714</text:p>
          </table:table-cell>
          <table:table-cell/>
          <table:table-cell office:value-type="float" office:value="46.8846153846154" calcext:value-type="float">
            <text:p>46.8846153846154</text:p>
          </table:table-cell>
        </table:table-row>
        <table:table-row table:style-name="ro1">
          <table:table-cell office:value-type="float" office:value="36.9032258064516" calcext:value-type="float">
            <text:p>36.9032258064516</text:p>
          </table:table-cell>
          <table:table-cell/>
          <table:table-cell office:value-type="float" office:value="46.8947368421053" calcext:value-type="float">
            <text:p>46.8947368421053</text:p>
          </table:table-cell>
        </table:table-row>
        <table:table-row table:style-name="ro1">
          <table:table-cell office:value-type="float" office:value="64.3548387096774" calcext:value-type="float">
            <text:p>64.3548387096774</text:p>
          </table:table-cell>
          <table:table-cell/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55.7619047619048" calcext:value-type="float">
            <text:p>55.7619047619048</text:p>
          </table:table-cell>
          <table:table-cell/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/>
          <table:table-cell office:value-type="float" office:value="46.9047619047619" calcext:value-type="float">
            <text:p>46.9047619047619</text:p>
          </table:table-cell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/>
          <table:table-cell office:value-type="float" office:value="46.9473684210526" calcext:value-type="float">
            <text:p>46.94736842105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46.9545454545455" calcext:value-type="float">
            <text:p>46.9545454545455</text:p>
          </table:table-cell>
        </table:table-row>
        <table:table-row table:style-name="ro1">
          <table:table-cell office:value-type="float" office:value="41.2727272727273" calcext:value-type="float">
            <text:p>41.2727272727273</text:p>
          </table:table-cell>
          <table:table-cell/>
          <table:table-cell office:value-type="float" office:value="46.9772727272727" calcext:value-type="float">
            <text:p>46.9772727272727</text:p>
          </table:table-cell>
        </table:table-row>
        <table:table-row table:style-name="ro1">
          <table:table-cell office:value-type="float" office:value="47.3863636363636" calcext:value-type="float">
            <text:p>47.386363636363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.9272727272727" calcext:value-type="float">
            <text:p>40.9272727272727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.7272727272727" calcext:value-type="float">
            <text:p>41.7272727272727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.7446808510638" calcext:value-type="float">
            <text:p>24.744680851063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.703125" calcext:value-type="float">
            <text:p>47.703125</text:p>
          </table:table-cell>
          <table:table-cell/>
          <table:table-cell office:value-type="float" office:value="47.0512820512821" calcext:value-type="float">
            <text:p>47.0512820512821</text:p>
          </table:table-cell>
        </table:table-row>
        <table:table-row table:style-name="ro1">
          <table:table-cell office:value-type="float" office:value="63.7857142857143" calcext:value-type="float">
            <text:p>63.7857142857143</text:p>
          </table:table-cell>
          <table:table-cell/>
          <table:table-cell office:value-type="float" office:value="47.0869565217391" calcext:value-type="float">
            <text:p>47.0869565217391</text:p>
          </table:table-cell>
        </table:table-row>
        <table:table-row table:style-name="ro1">
          <table:table-cell office:value-type="float" office:value="65.1428571428571" calcext:value-type="float">
            <text:p>65.1428571428571</text:p>
          </table:table-cell>
          <table:table-cell/>
          <table:table-cell office:value-type="float" office:value="47.1111111111111" calcext:value-type="float">
            <text:p>47.1111111111111</text:p>
          </table:table-cell>
        </table:table-row>
        <table:table-row table:style-name="ro1">
          <table:table-cell office:value-type="float" office:value="51.5789473684211" calcext:value-type="float">
            <text:p>51.5789473684211</text:p>
          </table:table-cell>
          <table:table-cell/>
          <table:table-cell office:value-type="float" office:value="47.1153846153846" calcext:value-type="float">
            <text:p>47.1153846153846</text:p>
          </table:table-cell>
        </table:table-row>
        <table:table-row table:style-name="ro1">
          <table:table-cell office:value-type="float" office:value="34.7674418604651" calcext:value-type="float">
            <text:p>34.7674418604651</text:p>
          </table:table-cell>
          <table:table-cell/>
          <table:table-cell office:value-type="float" office:value="47.125" calcext:value-type="float">
            <text:p>47.12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/>
          <table:table-cell office:value-type="float" office:value="47.1363636363636" calcext:value-type="float">
            <text:p>47.1363636363636</text:p>
          </table:table-cell>
        </table:table-row>
        <table:table-row table:style-name="ro1">
          <table:table-cell office:value-type="float" office:value="43.0952380952381" calcext:value-type="float">
            <text:p>43.0952380952381</text:p>
          </table:table-cell>
          <table:table-cell/>
          <table:table-cell office:value-type="float" office:value="47.1388888888889" calcext:value-type="float">
            <text:p>47.1388888888889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/>
          <table:table-cell office:value-type="float" office:value="47.1428571428571" calcext:value-type="float">
            <text:p>47.1428571428571</text:p>
          </table:table-cell>
        </table:table-row>
        <table:table-row table:style-name="ro1">
          <table:table-cell office:value-type="float" office:value="41.3125" calcext:value-type="float">
            <text:p>41.3125</text:p>
          </table:table-cell>
          <table:table-cell/>
          <table:table-cell office:value-type="float" office:value="47.1578947368421" calcext:value-type="float">
            <text:p>47.1578947368421</text:p>
          </table:table-cell>
        </table:table-row>
        <table:table-row table:style-name="ro1">
          <table:table-cell office:value-type="float" office:value="58.6190476190476" calcext:value-type="float">
            <text:p>58.6190476190476</text:p>
          </table:table-cell>
          <table:table-cell/>
          <table:table-cell office:value-type="float" office:value="47.1666666666667" calcext:value-type="float">
            <text:p>47.16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57.6428571428571" calcext:value-type="float">
            <text:p>57.6428571428571</text:p>
          </table:table-cell>
          <table:table-cell/>
          <table:table-cell office:value-type="float" office:value="47.28125" calcext:value-type="float">
            <text:p>47.28125</text:p>
          </table:table-cell>
        </table:table-row>
        <table:table-row table:style-name="ro1">
          <table:table-cell office:value-type="float" office:value="54.1071428571429" calcext:value-type="float">
            <text:p>54.1071428571429</text:p>
          </table:table-cell>
          <table:table-cell/>
          <table:table-cell office:value-type="float" office:value="47.2972972972973" calcext:value-type="float">
            <text:p>47.2972972972973</text:p>
          </table:table-cell>
        </table:table-row>
        <table:table-row table:style-name="ro1">
          <table:table-cell office:value-type="float" office:value="50.9545454545455" calcext:value-type="float">
            <text:p>50.9545454545455</text:p>
          </table:table-cell>
          <table:table-cell/>
          <table:table-cell office:value-type="float" office:value="47.2978723404255" calcext:value-type="float">
            <text:p>47.2978723404255</text:p>
          </table:table-cell>
        </table:table-row>
        <table:table-row table:style-name="ro1">
          <table:table-cell office:value-type="float" office:value="51.9545454545455" calcext:value-type="float">
            <text:p>51.9545454545455</text:p>
          </table:table-cell>
          <table:table-cell/>
          <table:table-cell office:value-type="float" office:value="47.3058823529412" calcext:value-type="float">
            <text:p>47.3058823529412</text:p>
          </table:table-cell>
        </table:table-row>
        <table:table-row table:style-name="ro1">
          <table:table-cell office:value-type="float" office:value="44.775" calcext:value-type="float">
            <text:p>44.775</text:p>
          </table:table-cell>
          <table:table-cell/>
          <table:table-cell office:value-type="float" office:value="47.3181818181818" calcext:value-type="float">
            <text:p>47.318181818181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/>
          <table:table-cell office:value-type="float" office:value="47.3222222222222" calcext:value-type="float">
            <text:p>47.3222222222222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/>
          <table:table-cell office:value-type="float" office:value="47.3333333333333" calcext:value-type="float">
            <text:p>47.33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7.3414634146342" calcext:value-type="float">
            <text:p>47.3414634146342</text:p>
          </table:table-cell>
        </table:table-row>
        <table:table-row table:style-name="ro1">
          <table:table-cell office:value-type="float" office:value="54.1666666666667" calcext:value-type="float">
            <text:p>54.1666666666667</text:p>
          </table:table-cell>
          <table:table-cell/>
          <table:table-cell office:value-type="float" office:value="47.3478260869565" calcext:value-type="float">
            <text:p>47.3478260869565</text:p>
          </table:table-cell>
        </table:table-row>
        <table:table-row table:style-name="ro1">
          <table:table-cell office:value-type="float" office:value="41.4166666666667" calcext:value-type="float">
            <text:p>41.4166666666667</text:p>
          </table:table-cell>
          <table:table-cell/>
          <table:table-cell office:value-type="float" office:value="47.3548387096774" calcext:value-type="float">
            <text:p>47.3548387096774</text:p>
          </table:table-cell>
        </table:table-row>
        <table:table-row table:style-name="ro1">
          <table:table-cell office:value-type="float" office:value="48.7666666666667" calcext:value-type="float">
            <text:p>48.7666666666667</text:p>
          </table:table-cell>
          <table:table-cell/>
          <table:table-cell office:value-type="float" office:value="47.375" calcext:value-type="float">
            <text:p>47.375</text:p>
          </table:table-cell>
        </table:table-row>
        <table:table-row table:style-name="ro1">
          <table:table-cell office:value-type="float" office:value="45.6547619047619" calcext:value-type="float">
            <text:p>45.6547619047619</text:p>
          </table:table-cell>
          <table:table-cell/>
          <table:table-cell office:value-type="float" office:value="47.3863636363636" calcext:value-type="float">
            <text:p>47.3863636363636</text:p>
          </table:table-cell>
        </table:table-row>
        <table:table-row table:style-name="ro1">
          <table:table-cell office:value-type="float" office:value="37.1764705882353" calcext:value-type="float">
            <text:p>37.1764705882353</text:p>
          </table:table-cell>
          <table:table-cell/>
          <table:table-cell office:value-type="float" office:value="47.4166666666667" calcext:value-type="float">
            <text:p>47.4166666666667</text:p>
          </table:table-cell>
        </table:table-row>
        <table:table-row table:style-name="ro1">
          <table:table-cell office:value-type="float" office:value="68.1666666666667" calcext:value-type="float">
            <text:p>68.1666666666667</text:p>
          </table:table-cell>
          <table:table-cell/>
          <table:table-cell office:value-type="float" office:value="47.4230769230769" calcext:value-type="float">
            <text:p>47.4230769230769</text:p>
          </table:table-cell>
        </table:table-row>
        <table:table-row table:style-name="ro1">
          <table:table-cell office:value-type="float" office:value="36.3230769230769" calcext:value-type="float">
            <text:p>36.3230769230769</text:p>
          </table:table-cell>
          <table:table-cell/>
          <table:table-cell office:value-type="float" office:value="47.4285714285714" calcext:value-type="float">
            <text:p>47.4285714285714</text:p>
          </table:table-cell>
        </table:table-row>
        <table:table-row table:style-name="ro1">
          <table:table-cell office:value-type="float" office:value="42.0909090909091" calcext:value-type="float">
            <text:p>42.0909090909091</text:p>
          </table:table-cell>
          <table:table-cell/>
          <table:table-cell office:value-type="float" office:value="47.4444444444444" calcext:value-type="float">
            <text:p>47.4444444444444</text:p>
          </table:table-cell>
        </table:table-row>
        <table:table-row table:style-name="ro1">
          <table:table-cell office:value-type="float" office:value="45.0625" calcext:value-type="float">
            <text:p>45.0625</text:p>
          </table:table-cell>
          <table:table-cell/>
          <table:table-cell office:value-type="float" office:value="47.4444444444444" calcext:value-type="float">
            <text:p>47.4444444444444</text:p>
          </table:table-cell>
        </table:table-row>
        <table:table-row table:style-name="ro1">
          <table:table-cell office:value-type="float" office:value="62.4210526315789" calcext:value-type="float">
            <text:p>62.4210526315789</text:p>
          </table:table-cell>
          <table:table-cell/>
          <table:table-cell office:value-type="float" office:value="47.4464285714286" calcext:value-type="float">
            <text:p>47.4464285714286</text:p>
          </table:table-cell>
        </table:table-row>
        <table:table-row table:style-name="ro1">
          <table:table-cell office:value-type="float" office:value="51.1904761904762" calcext:value-type="float">
            <text:p>51.1904761904762</text:p>
          </table:table-cell>
          <table:table-cell/>
          <table:table-cell office:value-type="float" office:value="47.4545454545455" calcext:value-type="float">
            <text:p>47.4545454545455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/>
          <table:table-cell office:value-type="float" office:value="47.4571428571429" calcext:value-type="float">
            <text:p>47.457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7.4666666666667" calcext:value-type="float">
            <text:p>47.4666666666667</text:p>
          </table:table-cell>
        </table:table-row>
        <table:table-row table:style-name="ro1">
          <table:table-cell office:value-type="float" office:value="82.3333333333333" calcext:value-type="float">
            <text:p>82.3333333333333</text:p>
          </table:table-cell>
          <table:table-cell/>
          <table:table-cell office:value-type="float" office:value="47.4912280701754" calcext:value-type="float">
            <text:p>47.4912280701754</text:p>
          </table:table-cell>
        </table:table-row>
        <table:table-row table:style-name="ro1">
          <table:table-cell office:value-type="float" office:value="40.7380952380952" calcext:value-type="float">
            <text:p>40.7380952380952</text:p>
          </table:table-cell>
          <table:table-cell/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47.5294117647059" calcext:value-type="float">
            <text:p>47.5294117647059</text:p>
          </table:table-cell>
        </table:table-row>
        <table:table-row table:style-name="ro1">
          <table:table-cell office:value-type="float" office:value="60.6153846153846" calcext:value-type="float">
            <text:p>60.6153846153846</text:p>
          </table:table-cell>
          <table:table-cell/>
          <table:table-cell office:value-type="float" office:value="47.551724137931" calcext:value-type="float">
            <text:p>47.551724137931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/>
          <table:table-cell office:value-type="float" office:value="47.5555555555556" calcext:value-type="float">
            <text:p>47.5555555555556</text:p>
          </table:table-cell>
        </table:table-row>
        <table:table-row table:style-name="ro1">
          <table:table-cell office:value-type="float" office:value="28.5592105263158" calcext:value-type="float">
            <text:p>28.5592105263158</text:p>
          </table:table-cell>
          <table:table-cell/>
          <table:table-cell office:value-type="float" office:value="47.6666666666667" calcext:value-type="float">
            <text:p>47.6666666666667</text:p>
          </table:table-cell>
        </table:table-row>
        <table:table-row table:style-name="ro1">
          <table:table-cell office:value-type="float" office:value="48.1111111111111" calcext:value-type="float">
            <text:p>48.1111111111111</text:p>
          </table:table-cell>
          <table:table-cell/>
          <table:table-cell office:value-type="float" office:value="47.6818181818182" calcext:value-type="float">
            <text:p>47.6818181818182</text:p>
          </table:table-cell>
        </table:table-row>
        <table:table-row table:style-name="ro1">
          <table:table-cell office:value-type="float" office:value="66.0714285714286" calcext:value-type="float">
            <text:p>66.0714285714286</text:p>
          </table:table-cell>
          <table:table-cell/>
          <table:table-cell office:value-type="float" office:value="47.6818181818182" calcext:value-type="float">
            <text:p>47.6818181818182</text:p>
          </table:table-cell>
        </table:table-row>
        <table:table-row table:style-name="ro1">
          <table:table-cell office:value-type="float" office:value="56.0555555555556" calcext:value-type="float">
            <text:p>56.0555555555556</text:p>
          </table:table-cell>
          <table:table-cell/>
          <table:table-cell office:value-type="float" office:value="47.6857142857143" calcext:value-type="float">
            <text:p>47.6857142857143</text:p>
          </table:table-cell>
        </table:table-row>
        <table:table-row table:style-name="ro1">
          <table:table-cell office:value-type="float" office:value="66.5882352941177" calcext:value-type="float">
            <text:p>66.5882352941177</text:p>
          </table:table-cell>
          <table:table-cell/>
          <table:table-cell office:value-type="float" office:value="47.703125" calcext:value-type="float">
            <text:p>47.703125</text:p>
          </table:table-cell>
        </table:table-row>
        <table:table-row table:style-name="ro1">
          <table:table-cell office:value-type="float" office:value="30.1388888888889" calcext:value-type="float">
            <text:p>30.1388888888889</text:p>
          </table:table-cell>
          <table:table-cell/>
          <table:table-cell office:value-type="float" office:value="47.7333333333333" calcext:value-type="float">
            <text:p>47.7333333333333</text:p>
          </table:table-cell>
        </table:table-row>
        <table:table-row table:style-name="ro1">
          <table:table-cell office:value-type="float" office:value="55.3181818181818" calcext:value-type="float">
            <text:p>55.3181818181818</text:p>
          </table:table-cell>
          <table:table-cell/>
          <table:table-cell office:value-type="float" office:value="47.74" calcext:value-type="float">
            <text:p>47.74</text:p>
          </table:table-cell>
        </table:table-row>
        <table:table-row table:style-name="ro1">
          <table:table-cell office:value-type="float" office:value="52.3846153846154" calcext:value-type="float">
            <text:p>52.3846153846154</text:p>
          </table:table-cell>
          <table:table-cell/>
          <table:table-cell office:value-type="float" office:value="47.7407407407407" calcext:value-type="float">
            <text:p>47.7407407407407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/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50.6666666666667" calcext:value-type="float">
            <text:p>50.6666666666667</text:p>
          </table:table-cell>
          <table:table-cell/>
          <table:table-cell office:value-type="float" office:value="47.8181818181818" calcext:value-type="float">
            <text:p>47.8181818181818</text:p>
          </table:table-cell>
        </table:table-row>
        <table:table-row table:style-name="ro1">
          <table:table-cell office:value-type="float" office:value="43.0718232044199" calcext:value-type="float">
            <text:p>43.0718232044199</text:p>
          </table:table-cell>
          <table:table-cell/>
          <table:table-cell office:value-type="float" office:value="47.8333333333333" calcext:value-type="float">
            <text:p>47.8333333333333</text:p>
          </table:table-cell>
        </table:table-row>
        <table:table-row table:style-name="ro1">
          <table:table-cell office:value-type="float" office:value="75.1666666666667" calcext:value-type="float">
            <text:p>75.1666666666667</text:p>
          </table:table-cell>
          <table:table-cell/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/>
          <table:table-cell office:value-type="float" office:value="47.8421052631579" calcext:value-type="float">
            <text:p>47.8421052631579</text:p>
          </table:table-cell>
        </table:table-row>
        <table:table-row table:style-name="ro1">
          <table:table-cell office:value-type="float" office:value="63.1818181818182" calcext:value-type="float">
            <text:p>63.1818181818182</text:p>
          </table:table-cell>
          <table:table-cell/>
          <table:table-cell office:value-type="float" office:value="47.8636363636364" calcext:value-type="float">
            <text:p>47.8636363636364</text:p>
          </table:table-cell>
        </table:table-row>
        <table:table-row table:style-name="ro1">
          <table:table-cell office:value-type="float" office:value="48.6666666666667" calcext:value-type="float">
            <text:p>48.6666666666667</text:p>
          </table:table-cell>
          <table:table-cell/>
          <table:table-cell office:value-type="float" office:value="47.8846153846154" calcext:value-type="float">
            <text:p>47.8846153846154</text:p>
          </table:table-cell>
        </table:table-row>
        <table:table-row table:style-name="ro1">
          <table:table-cell office:value-type="float" office:value="51.3636363636364" calcext:value-type="float">
            <text:p>51.3636363636364</text:p>
          </table:table-cell>
          <table:table-cell/>
          <table:table-cell office:value-type="float" office:value="47.9310344827586" calcext:value-type="float">
            <text:p>47.9310344827586</text:p>
          </table:table-cell>
        </table:table-row>
        <table:table-row table:style-name="ro1">
          <table:table-cell office:value-type="float" office:value="38.9523809523809" calcext:value-type="float">
            <text:p>38.9523809523809</text:p>
          </table:table-cell>
          <table:table-cell/>
          <table:table-cell office:value-type="float" office:value="47.9333333333333" calcext:value-type="float">
            <text:p>47.9333333333333</text:p>
          </table:table-cell>
        </table:table-row>
        <table:table-row table:style-name="ro1">
          <table:table-cell office:value-type="float" office:value="39.9444444444444" calcext:value-type="float">
            <text:p>39.9444444444444</text:p>
          </table:table-cell>
          <table:table-cell/>
          <table:table-cell office:value-type="float" office:value="47.9438202247191" calcext:value-type="float">
            <text:p>47.94382022471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7.9444444444444" calcext:value-type="float">
            <text:p>47.9444444444444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/>
          <table:table-cell office:value-type="float" office:value="47.9545454545455" calcext:value-type="float">
            <text:p>47.9545454545455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/>
          <table:table-cell office:value-type="float" office:value="47.9615384615385" calcext:value-type="float">
            <text:p>47.9615384615385</text:p>
          </table:table-cell>
        </table:table-row>
        <table:table-row table:style-name="ro1">
          <table:table-cell office:value-type="float" office:value="47.2972972972973" calcext:value-type="float">
            <text:p>47.2972972972973</text:p>
          </table:table-cell>
          <table:table-cell/>
          <table:table-cell office:value-type="float" office:value="47.962962962963" calcext:value-type="float">
            <text:p>47.962962962963</text:p>
          </table:table-cell>
        </table:table-row>
        <table:table-row table:style-name="ro1">
          <table:table-cell office:value-type="float" office:value="45.8076923076923" calcext:value-type="float">
            <text:p>45.807692307692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.4615384615385" calcext:value-type="float">
            <text:p>58.461538461538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6578947368421" calcext:value-type="float">
            <text:p>53.657894736842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.3725490196079" calcext:value-type="float">
            <text:p>41.3725490196079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.3076923076923" calcext:value-type="float">
            <text:p>43.307692307692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.0689655172414" calcext:value-type="float">
            <text:p>35.0689655172414</text:p>
          </table:table-cell>
          <table:table-cell/>
          <table:table-cell office:value-type="float" office:value="48.0277777777778" calcext:value-type="float">
            <text:p>48.0277777777778</text:p>
          </table:table-cell>
        </table:table-row>
        <table:table-row table:style-name="ro1">
          <table:table-cell office:value-type="float" office:value="29.6603773584906" calcext:value-type="float">
            <text:p>29.6603773584906</text:p>
          </table:table-cell>
          <table:table-cell/>
          <table:table-cell office:value-type="float" office:value="48.03125" calcext:value-type="float">
            <text:p>48.03125</text:p>
          </table:table-cell>
        </table:table-row>
        <table:table-row table:style-name="ro1">
          <table:table-cell office:value-type="float" office:value="35.8928571428571" calcext:value-type="float">
            <text:p>35.8928571428571</text:p>
          </table:table-cell>
          <table:table-cell/>
          <table:table-cell office:value-type="float" office:value="48.0769230769231" calcext:value-type="float">
            <text:p>48.0769230769231</text:p>
          </table:table-cell>
        </table:table-row>
        <table:table-row table:style-name="ro1">
          <table:table-cell office:value-type="float" office:value="62.0454545454546" calcext:value-type="float">
            <text:p>62.0454545454546</text:p>
          </table:table-cell>
          <table:table-cell/>
          <table:table-cell office:value-type="float" office:value="48.078431372549" calcext:value-type="float">
            <text:p>48.078431372549</text:p>
          </table:table-cell>
        </table:table-row>
        <table:table-row table:style-name="ro1">
          <table:table-cell office:value-type="float" office:value="38.8148148148148" calcext:value-type="float">
            <text:p>38.8148148148148</text:p>
          </table:table-cell>
          <table:table-cell/>
          <table:table-cell office:value-type="float" office:value="48.0909090909091" calcext:value-type="float">
            <text:p>48.0909090909091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/>
          <table:table-cell office:value-type="float" office:value="48.1111111111111" calcext:value-type="float">
            <text:p>48.1111111111111</text:p>
          </table:table-cell>
        </table:table-row>
        <table:table-row table:style-name="ro1">
          <table:table-cell office:value-type="float" office:value="58.3333333333333" calcext:value-type="float">
            <text:p>58.3333333333333</text:p>
          </table:table-cell>
          <table:table-cell/>
          <table:table-cell office:value-type="float" office:value="48.125" calcext:value-type="float">
            <text:p>48.125</text:p>
          </table:table-cell>
        </table:table-row>
        <table:table-row table:style-name="ro1">
          <table:table-cell office:value-type="float" office:value="52.4473684210526" calcext:value-type="float">
            <text:p>52.4473684210526</text:p>
          </table:table-cell>
          <table:table-cell/>
          <table:table-cell office:value-type="float" office:value="48.1258278145695" calcext:value-type="float">
            <text:p>48.1258278145695</text:p>
          </table:table-cell>
        </table:table-row>
        <table:table-row table:style-name="ro1">
          <table:table-cell office:value-type="float" office:value="50.6521739130435" calcext:value-type="float">
            <text:p>50.6521739130435</text:p>
          </table:table-cell>
          <table:table-cell/>
          <table:table-cell office:value-type="float" office:value="48.1363636363636" calcext:value-type="float">
            <text:p>48.1363636363636</text:p>
          </table:table-cell>
        </table:table-row>
        <table:table-row table:style-name="ro1">
          <table:table-cell office:value-type="float" office:value="41.0882352941176" calcext:value-type="float">
            <text:p>41.0882352941176</text:p>
          </table:table-cell>
          <table:table-cell/>
          <table:table-cell office:value-type="float" office:value="48.1428571428572" calcext:value-type="float">
            <text:p>48.1428571428572</text:p>
          </table:table-cell>
        </table:table-row>
        <table:table-row table:style-name="ro1">
          <table:table-cell office:value-type="float" office:value="54.8709677419355" calcext:value-type="float">
            <text:p>54.8709677419355</text:p>
          </table:table-cell>
          <table:table-cell/>
          <table:table-cell office:value-type="float" office:value="48.1666666666667" calcext:value-type="float">
            <text:p>48.1666666666667</text:p>
          </table:table-cell>
        </table:table-row>
        <table:table-row table:style-name="ro1">
          <table:table-cell office:value-type="float" office:value="32.9333333333333" calcext:value-type="float">
            <text:p>32.9333333333333</text:p>
          </table:table-cell>
          <table:table-cell/>
          <table:table-cell office:value-type="float" office:value="48.1764705882353" calcext:value-type="float">
            <text:p>48.1764705882353</text:p>
          </table:table-cell>
        </table:table-row>
        <table:table-row table:style-name="ro1">
          <table:table-cell office:value-type="float" office:value="46.0833333333333" calcext:value-type="float">
            <text:p>46.0833333333333</text:p>
          </table:table-cell>
          <table:table-cell/>
          <table:table-cell office:value-type="float" office:value="48.1818181818182" calcext:value-type="float">
            <text:p>48.1818181818182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/>
          <table:table-cell office:value-type="float" office:value="48.2123142250531" calcext:value-type="float">
            <text:p>48.2123142250531</text:p>
          </table:table-cell>
        </table:table-row>
        <table:table-row table:style-name="ro1">
          <table:table-cell office:value-type="float" office:value="36.2975460122699" calcext:value-type="float">
            <text:p>36.2975460122699</text:p>
          </table:table-cell>
          <table:table-cell/>
          <table:table-cell office:value-type="float" office:value="48.2173913043478" calcext:value-type="float">
            <text:p>48.2173913043478</text:p>
          </table:table-cell>
        </table:table-row>
        <table:table-row table:style-name="ro1">
          <table:table-cell office:value-type="float" office:value="41.8125" calcext:value-type="float">
            <text:p>41.8125</text:p>
          </table:table-cell>
          <table:table-cell/>
          <table:table-cell office:value-type="float" office:value="48.2413793103448" calcext:value-type="float">
            <text:p>48.2413793103448</text:p>
          </table:table-cell>
        </table:table-row>
        <table:table-row table:style-name="ro1">
          <table:table-cell office:value-type="float" office:value="55.214953271028" calcext:value-type="float">
            <text:p>55.214953271028</text:p>
          </table:table-cell>
          <table:table-cell/>
          <table:table-cell office:value-type="float" office:value="48.2878787878788" calcext:value-type="float">
            <text:p>48.2878787878788</text:p>
          </table:table-cell>
        </table:table-row>
        <table:table-row table:style-name="ro1">
          <table:table-cell office:value-type="float" office:value="55.2666666666667" calcext:value-type="float">
            <text:p>55.2666666666667</text:p>
          </table:table-cell>
          <table:table-cell/>
          <table:table-cell office:value-type="float" office:value="48.2897196261682" calcext:value-type="float">
            <text:p>48.2897196261682</text:p>
          </table:table-cell>
        </table:table-row>
        <table:table-row table:style-name="ro1">
          <table:table-cell office:value-type="float" office:value="77.2222222222222" calcext:value-type="float">
            <text:p>77.2222222222222</text:p>
          </table:table-cell>
          <table:table-cell/>
          <table:table-cell office:value-type="float" office:value="48.2931726907631" calcext:value-type="float">
            <text:p>48.2931726907631</text:p>
          </table:table-cell>
        </table:table-row>
        <table:table-row table:style-name="ro1">
          <table:table-cell office:value-type="float" office:value="45.2857142857143" calcext:value-type="float">
            <text:p>45.2857142857143</text:p>
          </table:table-cell>
          <table:table-cell/>
          <table:table-cell office:value-type="float" office:value="48.3023255813954" calcext:value-type="float">
            <text:p>48.3023255813954</text:p>
          </table:table-cell>
        </table:table-row>
        <table:table-row table:style-name="ro1">
          <table:table-cell office:value-type="float" office:value="29.3048780487805" calcext:value-type="float">
            <text:p>29.3048780487805</text:p>
          </table:table-cell>
          <table:table-cell/>
          <table:table-cell office:value-type="float" office:value="48.3157894736842" calcext:value-type="float">
            <text:p>48.3157894736842</text:p>
          </table:table-cell>
        </table:table-row>
        <table:table-row table:style-name="ro1">
          <table:table-cell office:value-type="float" office:value="33.6896551724138" calcext:value-type="float">
            <text:p>33.6896551724138</text:p>
          </table:table-cell>
          <table:table-cell/>
          <table:table-cell office:value-type="float" office:value="48.32" calcext:value-type="float">
            <text:p>48.32</text:p>
          </table:table-cell>
        </table:table-row>
        <table:table-row table:style-name="ro1">
          <table:table-cell office:value-type="float" office:value="30.3333333333333" calcext:value-type="float">
            <text:p>30.3333333333333</text:p>
          </table:table-cell>
          <table:table-cell/>
          <table:table-cell office:value-type="float" office:value="48.3571428571429" calcext:value-type="float">
            <text:p>48.3571428571429</text:p>
          </table:table-cell>
        </table:table-row>
        <table:table-row table:style-name="ro1">
          <table:table-cell office:value-type="float" office:value="23.7777777777778" calcext:value-type="float">
            <text:p>23.7777777777778</text:p>
          </table:table-cell>
          <table:table-cell/>
          <table:table-cell office:value-type="float" office:value="48.3703703703704" calcext:value-type="float">
            <text:p>48.3703703703704</text:p>
          </table:table-cell>
        </table:table-row>
        <table:table-row table:style-name="ro1">
          <table:table-cell office:value-type="float" office:value="41.2631578947368" calcext:value-type="float">
            <text:p>41.2631578947368</text:p>
          </table:table-cell>
          <table:table-cell/>
          <table:table-cell office:value-type="float" office:value="48.3783783783784" calcext:value-type="float">
            <text:p>48.3783783783784</text:p>
          </table:table-cell>
        </table:table-row>
        <table:table-row table:style-name="ro1">
          <table:table-cell office:value-type="float" office:value="32.1904761904762" calcext:value-type="float">
            <text:p>32.1904761904762</text:p>
          </table:table-cell>
          <table:table-cell/>
          <table:table-cell office:value-type="float" office:value="48.3947368421053" calcext:value-type="float">
            <text:p>48.3947368421053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/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40.5625" calcext:value-type="float">
            <text:p>40.5625</text:p>
          </table:table-cell>
          <table:table-cell/>
          <table:table-cell office:value-type="float" office:value="48.4347826086957" calcext:value-type="float">
            <text:p>48.4347826086957</text:p>
          </table:table-cell>
        </table:table-row>
        <table:table-row table:style-name="ro1">
          <table:table-cell office:value-type="float" office:value="38.0925925925926" calcext:value-type="float">
            <text:p>38.0925925925926</text:p>
          </table:table-cell>
          <table:table-cell/>
          <table:table-cell office:value-type="float" office:value="48.4375" calcext:value-type="float">
            <text:p>48.4375</text:p>
          </table:table-cell>
        </table:table-row>
        <table:table-row table:style-name="ro1">
          <table:table-cell office:value-type="float" office:value="36.6666666666667" calcext:value-type="float">
            <text:p>36.6666666666667</text:p>
          </table:table-cell>
          <table:table-cell/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27.4736842105263" calcext:value-type="float">
            <text:p>27.4736842105263</text:p>
          </table:table-cell>
          <table:table-cell/>
          <table:table-cell office:value-type="float" office:value="48.5263157894737" calcext:value-type="float">
            <text:p>48.5263157894737</text:p>
          </table:table-cell>
        </table:table-row>
        <table:table-row table:style-name="ro1">
          <table:table-cell office:value-type="float" office:value="28.1851851851852" calcext:value-type="float">
            <text:p>28.1851851851852</text:p>
          </table:table-cell>
          <table:table-cell/>
          <table:table-cell office:value-type="float" office:value="48.53125" calcext:value-type="float">
            <text:p>48.53125</text:p>
          </table:table-cell>
        </table:table-row>
        <table:table-row table:style-name="ro1">
          <table:table-cell office:value-type="float" office:value="27.7368421052632" calcext:value-type="float">
            <text:p>27.7368421052632</text:p>
          </table:table-cell>
          <table:table-cell/>
          <table:table-cell office:value-type="float" office:value="48.531914893617" calcext:value-type="float">
            <text:p>48.531914893617</text:p>
          </table:table-cell>
        </table:table-row>
        <table:table-row table:style-name="ro1">
          <table:table-cell office:value-type="float" office:value="23.8823529411765" calcext:value-type="float">
            <text:p>23.8823529411765</text:p>
          </table:table-cell>
          <table:table-cell/>
          <table:table-cell office:value-type="float" office:value="48.5728155339806" calcext:value-type="float">
            <text:p>48.5728155339806</text:p>
          </table:table-cell>
        </table:table-row>
        <table:table-row table:style-name="ro1">
          <table:table-cell office:value-type="float" office:value="29.0526315789474" calcext:value-type="float">
            <text:p>29.0526315789474</text:p>
          </table:table-cell>
          <table:table-cell/>
          <table:table-cell office:value-type="float" office:value="48.5744680851064" calcext:value-type="float">
            <text:p>48.5744680851064</text:p>
          </table:table-cell>
        </table:table-row>
        <table:table-row table:style-name="ro1">
          <table:table-cell office:value-type="float" office:value="71.1333333333333" calcext:value-type="float">
            <text:p>71.1333333333333</text:p>
          </table:table-cell>
          <table:table-cell/>
          <table:table-cell office:value-type="float" office:value="48.5833333333333" calcext:value-type="float">
            <text:p>48.5833333333333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/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60.2777777777778" calcext:value-type="float">
            <text:p>60.2777777777778</text:p>
          </table:table-cell>
          <table:table-cell/>
          <table:table-cell office:value-type="float" office:value="48.6315789473684" calcext:value-type="float">
            <text:p>48.6315789473684</text:p>
          </table:table-cell>
        </table:table-row>
        <table:table-row table:style-name="ro1">
          <table:table-cell office:value-type="float" office:value="40.4705882352941" calcext:value-type="float">
            <text:p>40.4705882352941</text:p>
          </table:table-cell>
          <table:table-cell/>
          <table:table-cell office:value-type="float" office:value="48.6666666666667" calcext:value-type="float">
            <text:p>48.6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8.6666666666667" calcext:value-type="float">
            <text:p>48.6666666666667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/>
          <table:table-cell office:value-type="float" office:value="48.7058823529412" calcext:value-type="float">
            <text:p>48.7058823529412</text:p>
          </table:table-cell>
        </table:table-row>
        <table:table-row table:style-name="ro1">
          <table:table-cell office:value-type="float" office:value="55.8636363636364" calcext:value-type="float">
            <text:p>55.8636363636364</text:p>
          </table:table-cell>
          <table:table-cell/>
          <table:table-cell office:value-type="float" office:value="48.7272727272727" calcext:value-type="float">
            <text:p>48.7272727272727</text:p>
          </table:table-cell>
        </table:table-row>
        <table:table-row table:style-name="ro1">
          <table:table-cell office:value-type="float" office:value="42.7368421052632" calcext:value-type="float">
            <text:p>42.7368421052632</text:p>
          </table:table-cell>
          <table:table-cell/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55.3108108108108" calcext:value-type="float">
            <text:p>55.3108108108108</text:p>
          </table:table-cell>
          <table:table-cell/>
          <table:table-cell office:value-type="float" office:value="48.765306122449" calcext:value-type="float">
            <text:p>48.765306122449</text:p>
          </table:table-cell>
        </table:table-row>
        <table:table-row table:style-name="ro1">
          <table:table-cell office:value-type="float" office:value="36.4736842105263" calcext:value-type="float">
            <text:p>36.4736842105263</text:p>
          </table:table-cell>
          <table:table-cell/>
          <table:table-cell office:value-type="float" office:value="48.7666666666667" calcext:value-type="float">
            <text:p>48.7666666666667</text:p>
          </table:table-cell>
        </table:table-row>
        <table:table-row table:style-name="ro1">
          <table:table-cell office:value-type="float" office:value="34.6046511627907" calcext:value-type="float">
            <text:p>34.6046511627907</text:p>
          </table:table-cell>
          <table:table-cell/>
          <table:table-cell office:value-type="float" office:value="48.7727272727273" calcext:value-type="float">
            <text:p>48.7727272727273</text:p>
          </table:table-cell>
        </table:table-row>
        <table:table-row table:style-name="ro1">
          <table:table-cell office:value-type="float" office:value="57.0967741935484" calcext:value-type="float">
            <text:p>57.0967741935484</text:p>
          </table:table-cell>
          <table:table-cell/>
          <table:table-cell office:value-type="float" office:value="48.8085106382979" calcext:value-type="float">
            <text:p>48.8085106382979</text:p>
          </table:table-cell>
        </table:table-row>
        <table:table-row table:style-name="ro1">
          <table:table-cell office:value-type="float" office:value="58.8315789473684" calcext:value-type="float">
            <text:p>58.8315789473684</text:p>
          </table:table-cell>
          <table:table-cell/>
          <table:table-cell office:value-type="float" office:value="48.8095238095238" calcext:value-type="float">
            <text:p>48.8095238095238</text:p>
          </table:table-cell>
        </table:table-row>
        <table:table-row table:style-name="ro1">
          <table:table-cell office:value-type="float" office:value="58.1818181818182" calcext:value-type="float">
            <text:p>58.1818181818182</text:p>
          </table:table-cell>
          <table:table-cell/>
          <table:table-cell office:value-type="float" office:value="48.859649122807" calcext:value-type="float">
            <text:p>48.859649122807</text:p>
          </table:table-cell>
        </table:table-row>
        <table:table-row table:style-name="ro1">
          <table:table-cell office:value-type="float" office:value="62.2592592592593" calcext:value-type="float">
            <text:p>62.2592592592593</text:p>
          </table:table-cell>
          <table:table-cell/>
          <table:table-cell office:value-type="float" office:value="48.8809523809524" calcext:value-type="float">
            <text:p>48.8809523809524</text:p>
          </table:table-cell>
        </table:table-row>
        <table:table-row table:style-name="ro1">
          <table:table-cell office:value-type="float" office:value="47.3478260869565" calcext:value-type="float">
            <text:p>47.3478260869565</text:p>
          </table:table-cell>
          <table:table-cell/>
          <table:table-cell office:value-type="float" office:value="48.8888888888889" calcext:value-type="float">
            <text:p>48.8888888888889</text:p>
          </table:table-cell>
        </table:table-row>
        <table:table-row table:style-name="ro1">
          <table:table-cell office:value-type="float" office:value="59.0227272727273" calcext:value-type="float">
            <text:p>59.0227272727273</text:p>
          </table:table-cell>
          <table:table-cell/>
          <table:table-cell office:value-type="float" office:value="48.8978102189781" calcext:value-type="float">
            <text:p>48.8978102189781</text:p>
          </table:table-cell>
        </table:table-row>
        <table:table-row table:style-name="ro1">
          <table:table-cell office:value-type="float" office:value="42.3333333333333" calcext:value-type="float">
            <text:p>42.3333333333333</text:p>
          </table:table-cell>
          <table:table-cell/>
          <table:table-cell office:value-type="float" office:value="48.9032258064516" calcext:value-type="float">
            <text:p>48.9032258064516</text:p>
          </table:table-cell>
        </table:table-row>
        <table:table-row table:style-name="ro1">
          <table:table-cell office:value-type="float" office:value="29.6153846153846" calcext:value-type="float">
            <text:p>29.6153846153846</text:p>
          </table:table-cell>
          <table:table-cell/>
          <table:table-cell office:value-type="float" office:value="48.9230769230769" calcext:value-type="float">
            <text:p>48.9230769230769</text:p>
          </table:table-cell>
        </table:table-row>
        <table:table-row table:style-name="ro1">
          <table:table-cell office:value-type="float" office:value="50.1818181818182" calcext:value-type="float">
            <text:p>50.1818181818182</text:p>
          </table:table-cell>
          <table:table-cell/>
          <table:table-cell office:value-type="float" office:value="48.9375" calcext:value-type="float">
            <text:p>48.9375</text:p>
          </table:table-cell>
        </table:table-row>
        <table:table-row table:style-name="ro1">
          <table:table-cell office:value-type="float" office:value="58.8787878787879" calcext:value-type="float">
            <text:p>58.8787878787879</text:p>
          </table:table-cell>
          <table:table-cell/>
          <table:table-cell office:value-type="float" office:value="48.9459459459459" calcext:value-type="float">
            <text:p>48.9459459459459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/>
          <table:table-cell office:value-type="float" office:value="48.95" calcext:value-type="float">
            <text:p>48.95</text:p>
          </table:table-cell>
        </table:table-row>
        <table:table-row table:style-name="ro1">
          <table:table-cell office:value-type="float" office:value="49.2857142857143" calcext:value-type="float">
            <text:p>49.2857142857143</text:p>
          </table:table-cell>
          <table:table-cell/>
          <table:table-cell office:value-type="float" office:value="48.96875" calcext:value-type="float">
            <text:p>48.96875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.4615384615385" calcext:value-type="float">
            <text:p>43.4615384615385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.7727272727273" calcext:value-type="float">
            <text:p>48.7727272727273</text:p>
          </table:table-cell>
          <table:table-cell/>
          <table:table-cell office:value-type="float" office:value="49.0169491525424" calcext:value-type="float">
            <text:p>49.0169491525424</text:p>
          </table:table-cell>
        </table:table-row>
        <table:table-row table:style-name="ro1">
          <table:table-cell office:value-type="float" office:value="41.6619718309859" calcext:value-type="float">
            <text:p>41.6619718309859</text:p>
          </table:table-cell>
          <table:table-cell/>
          <table:table-cell office:value-type="float" office:value="49.03125" calcext:value-type="float">
            <text:p>49.03125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/>
          <table:table-cell office:value-type="float" office:value="49.05" calcext:value-type="float">
            <text:p>49.05</text:p>
          </table:table-cell>
        </table:table-row>
        <table:table-row table:style-name="ro1">
          <table:table-cell office:value-type="float" office:value="55.5909090909091" calcext:value-type="float">
            <text:p>55.5909090909091</text:p>
          </table:table-cell>
          <table:table-cell/>
          <table:table-cell office:value-type="float" office:value="49.0657894736842" calcext:value-type="float">
            <text:p>49.0657894736842</text:p>
          </table:table-cell>
        </table:table-row>
        <table:table-row table:style-name="ro1">
          <table:table-cell office:value-type="float" office:value="45.952380952381" calcext:value-type="float">
            <text:p>45.952380952381</text:p>
          </table:table-cell>
          <table:table-cell/>
          <table:table-cell office:value-type="float" office:value="49.0909090909091" calcext:value-type="float">
            <text:p>49.0909090909091</text:p>
          </table:table-cell>
        </table:table-row>
        <table:table-row table:style-name="ro1">
          <table:table-cell office:value-type="float" office:value="56.0869565217391" calcext:value-type="float">
            <text:p>56.0869565217391</text:p>
          </table:table-cell>
          <table:table-cell/>
          <table:table-cell office:value-type="float" office:value="49.0952380952381" calcext:value-type="float">
            <text:p>49.0952380952381</text:p>
          </table:table-cell>
        </table:table-row>
        <table:table-row table:style-name="ro1">
          <table:table-cell office:value-type="float" office:value="97.6666666666667" calcext:value-type="float">
            <text:p>97.6666666666667</text:p>
          </table:table-cell>
          <table:table-cell/>
          <table:table-cell office:value-type="float" office:value="49.1578947368421" calcext:value-type="float">
            <text:p>49.1578947368421</text:p>
          </table:table-cell>
        </table:table-row>
        <table:table-row table:style-name="ro1">
          <table:table-cell office:value-type="float" office:value="44.46875" calcext:value-type="float">
            <text:p>44.46875</text:p>
          </table:table-cell>
          <table:table-cell/>
          <table:table-cell office:value-type="float" office:value="49.1714285714286" calcext:value-type="float">
            <text:p>49.1714285714286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/>
          <table:table-cell office:value-type="float" office:value="49.1739130434783" calcext:value-type="float">
            <text:p>49.1739130434783</text:p>
          </table:table-cell>
        </table:table-row>
        <table:table-row table:style-name="ro1">
          <table:table-cell office:value-type="float" office:value="84.6666666666667" calcext:value-type="float">
            <text:p>84.6666666666667</text:p>
          </table:table-cell>
          <table:table-cell/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/>
          <table:table-cell office:value-type="float" office:value="49.2142857142857" calcext:value-type="float">
            <text:p>49.2142857142857</text:p>
          </table:table-cell>
        </table:table-row>
        <table:table-row table:style-name="ro1">
          <table:table-cell office:value-type="float" office:value="31.4761904761905" calcext:value-type="float">
            <text:p>31.4761904761905</text:p>
          </table:table-cell>
          <table:table-cell/>
          <table:table-cell office:value-type="float" office:value="49.2272727272727" calcext:value-type="float">
            <text:p>49.2272727272727</text:p>
          </table:table-cell>
        </table:table-row>
        <table:table-row table:style-name="ro1">
          <table:table-cell office:value-type="float" office:value="33.4137168141593" calcext:value-type="float">
            <text:p>33.4137168141593</text:p>
          </table:table-cell>
          <table:table-cell/>
          <table:table-cell office:value-type="float" office:value="49.2352941176471" calcext:value-type="float">
            <text:p>49.2352941176471</text:p>
          </table:table-cell>
        </table:table-row>
        <table:table-row table:style-name="ro1">
          <table:table-cell office:value-type="float" office:value="38.0189873417722" calcext:value-type="float">
            <text:p>38.0189873417722</text:p>
          </table:table-cell>
          <table:table-cell/>
          <table:table-cell office:value-type="float" office:value="49.2608695652174" calcext:value-type="float">
            <text:p>49.2608695652174</text:p>
          </table:table-cell>
        </table:table-row>
        <table:table-row table:style-name="ro1">
          <table:table-cell office:value-type="float" office:value="47.6818181818182" calcext:value-type="float">
            <text:p>47.6818181818182</text:p>
          </table:table-cell>
          <table:table-cell/>
          <table:table-cell office:value-type="float" office:value="49.2666666666667" calcext:value-type="float">
            <text:p>49.266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49.2727272727273" calcext:value-type="float">
            <text:p>49.2727272727273</text:p>
          </table:table-cell>
        </table:table-row>
        <table:table-row table:style-name="ro1">
          <table:table-cell office:value-type="float" office:value="56.6363636363636" calcext:value-type="float">
            <text:p>56.6363636363636</text:p>
          </table:table-cell>
          <table:table-cell/>
          <table:table-cell office:value-type="float" office:value="49.2857142857143" calcext:value-type="float">
            <text:p>49.2857142857143</text:p>
          </table:table-cell>
        </table:table-row>
        <table:table-row table:style-name="ro1">
          <table:table-cell office:value-type="float" office:value="66.7777777777778" calcext:value-type="float">
            <text:p>66.7777777777778</text:p>
          </table:table-cell>
          <table:table-cell/>
          <table:table-cell office:value-type="float" office:value="49.2857142857143" calcext:value-type="float">
            <text:p>49.2857142857143</text:p>
          </table:table-cell>
        </table:table-row>
        <table:table-row table:style-name="ro1">
          <table:table-cell office:value-type="float" office:value="41.5476190476191" calcext:value-type="float">
            <text:p>41.5476190476191</text:p>
          </table:table-cell>
          <table:table-cell/>
          <table:table-cell office:value-type="float" office:value="49.2972972972973" calcext:value-type="float">
            <text:p>49.2972972972973</text:p>
          </table:table-cell>
        </table:table-row>
        <table:table-row table:style-name="ro1">
          <table:table-cell office:value-type="float" office:value="32.8288288288288" calcext:value-type="float">
            <text:p>32.8288288288288</text:p>
          </table:table-cell>
          <table:table-cell/>
          <table:table-cell office:value-type="float" office:value="49.3076923076923" calcext:value-type="float">
            <text:p>49.3076923076923</text:p>
          </table:table-cell>
        </table:table-row>
        <table:table-row table:style-name="ro1">
          <table:table-cell office:value-type="float" office:value="45.4166666666667" calcext:value-type="float">
            <text:p>45.4166666666667</text:p>
          </table:table-cell>
          <table:table-cell/>
          <table:table-cell office:value-type="float" office:value="49.3076923076923" calcext:value-type="float">
            <text:p>49.3076923076923</text:p>
          </table:table-cell>
        </table:table-row>
        <table:table-row table:style-name="ro1">
          <table:table-cell office:value-type="float" office:value="37.4166666666667" calcext:value-type="float">
            <text:p>37.4166666666667</text:p>
          </table:table-cell>
          <table:table-cell/>
          <table:table-cell office:value-type="float" office:value="49.3255813953488" calcext:value-type="float">
            <text:p>49.32558139534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9.3333333333333" calcext:value-type="float">
            <text:p>49.3333333333333</text:p>
          </table:table-cell>
        </table:table-row>
        <table:table-row table:style-name="ro1">
          <table:table-cell office:value-type="float" office:value="55.5714285714286" calcext:value-type="float">
            <text:p>55.5714285714286</text:p>
          </table:table-cell>
          <table:table-cell/>
          <table:table-cell office:value-type="float" office:value="49.3488372093023" calcext:value-type="float">
            <text:p>49.3488372093023</text:p>
          </table:table-cell>
        </table:table-row>
        <table:table-row table:style-name="ro1">
          <table:table-cell office:value-type="float" office:value="40.6336633663366" calcext:value-type="float">
            <text:p>40.6336633663366</text:p>
          </table:table-cell>
          <table:table-cell/>
          <table:table-cell office:value-type="float" office:value="49.4117647058824" calcext:value-type="float">
            <text:p>49.4117647058824</text:p>
          </table:table-cell>
        </table:table-row>
        <table:table-row table:style-name="ro1">
          <table:table-cell office:value-type="float" office:value="32.3928571428571" calcext:value-type="float">
            <text:p>32.3928571428571</text:p>
          </table:table-cell>
          <table:table-cell/>
          <table:table-cell office:value-type="float" office:value="49.4186046511628" calcext:value-type="float">
            <text:p>49.4186046511628</text:p>
          </table:table-cell>
        </table:table-row>
        <table:table-row table:style-name="ro1">
          <table:table-cell office:value-type="float" office:value="35.0281690140845" calcext:value-type="float">
            <text:p>35.0281690140845</text:p>
          </table:table-cell>
          <table:table-cell/>
          <table:table-cell office:value-type="float" office:value="49.4642857142857" calcext:value-type="float">
            <text:p>49.4642857142857</text:p>
          </table:table-cell>
        </table:table-row>
        <table:table-row table:style-name="ro1">
          <table:table-cell office:value-type="float" office:value="41.4594594594595" calcext:value-type="float">
            <text:p>41.4594594594595</text:p>
          </table:table-cell>
          <table:table-cell/>
          <table:table-cell office:value-type="float" office:value="49.4782608695652" calcext:value-type="float">
            <text:p>49.4782608695652</text:p>
          </table:table-cell>
        </table:table-row>
        <table:table-row table:style-name="ro1">
          <table:table-cell office:value-type="float" office:value="42.0057803468208" calcext:value-type="float">
            <text:p>42.0057803468208</text:p>
          </table:table-cell>
          <table:table-cell/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33.3913043478261" calcext:value-type="float">
            <text:p>33.3913043478261</text:p>
          </table:table-cell>
          <table:table-cell/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26.3538461538462" calcext:value-type="float">
            <text:p>26.3538461538462</text:p>
          </table:table-cell>
          <table:table-cell/>
          <table:table-cell office:value-type="float" office:value="49.5217391304348" calcext:value-type="float">
            <text:p>49.5217391304348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/>
          <table:table-cell office:value-type="float" office:value="49.5238095238095" calcext:value-type="float">
            <text:p>49.5238095238095</text:p>
          </table:table-cell>
        </table:table-row>
        <table:table-row table:style-name="ro1">
          <table:table-cell office:value-type="float" office:value="80.8571428571429" calcext:value-type="float">
            <text:p>80.8571428571429</text:p>
          </table:table-cell>
          <table:table-cell/>
          <table:table-cell office:value-type="float" office:value="49.5263157894737" calcext:value-type="float">
            <text:p>49.5263157894737</text:p>
          </table:table-cell>
        </table:table-row>
        <table:table-row table:style-name="ro1">
          <table:table-cell office:value-type="float" office:value="24.3846153846154" calcext:value-type="float">
            <text:p>24.3846153846154</text:p>
          </table:table-cell>
          <table:table-cell/>
          <table:table-cell office:value-type="float" office:value="49.5434782608696" calcext:value-type="float">
            <text:p>49.5434782608696</text:p>
          </table:table-cell>
        </table:table-row>
        <table:table-row table:style-name="ro1">
          <table:table-cell office:value-type="float" office:value="51.0434782608696" calcext:value-type="float">
            <text:p>51.0434782608696</text:p>
          </table:table-cell>
          <table:table-cell/>
          <table:table-cell office:value-type="float" office:value="49.5454545454546" calcext:value-type="float">
            <text:p>49.5454545454546</text:p>
          </table:table-cell>
        </table:table-row>
        <table:table-row table:style-name="ro1">
          <table:table-cell office:value-type="float" office:value="26.6806722689076" calcext:value-type="float">
            <text:p>26.6806722689076</text:p>
          </table:table-cell>
          <table:table-cell/>
          <table:table-cell office:value-type="float" office:value="49.5641025641026" calcext:value-type="float">
            <text:p>49.5641025641026</text:p>
          </table:table-cell>
        </table:table-row>
        <table:table-row table:style-name="ro1">
          <table:table-cell office:value-type="float" office:value="30.7916666666667" calcext:value-type="float">
            <text:p>30.7916666666667</text:p>
          </table:table-cell>
          <table:table-cell/>
          <table:table-cell office:value-type="float" office:value="49.625" calcext:value-type="float">
            <text:p>49.625</text:p>
          </table:table-cell>
        </table:table-row>
        <table:table-row table:style-name="ro1">
          <table:table-cell office:value-type="float" office:value="53.32" calcext:value-type="float">
            <text:p>53.32</text:p>
          </table:table-cell>
          <table:table-cell/>
          <table:table-cell office:value-type="float" office:value="49.6333333333333" calcext:value-type="float">
            <text:p>49.6333333333333</text:p>
          </table:table-cell>
        </table:table-row>
        <table:table-row table:style-name="ro1">
          <table:table-cell office:value-type="float" office:value="37.6923076923077" calcext:value-type="float">
            <text:p>37.6923076923077</text:p>
          </table:table-cell>
          <table:table-cell/>
          <table:table-cell office:value-type="float" office:value="49.66" calcext:value-type="float">
            <text:p>49.66</text:p>
          </table:table-cell>
        </table:table-row>
        <table:table-row table:style-name="ro1">
          <table:table-cell office:value-type="float" office:value="38.1724137931034" calcext:value-type="float">
            <text:p>38.1724137931034</text:p>
          </table:table-cell>
          <table:table-cell/>
          <table:table-cell office:value-type="float" office:value="49.6666666666667" calcext:value-type="float">
            <text:p>49.6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9.6981132075472" calcext:value-type="float">
            <text:p>49.6981132075472</text:p>
          </table:table-cell>
        </table:table-row>
        <table:table-row table:style-name="ro1">
          <table:table-cell office:value-type="float" office:value="58.8181818181818" calcext:value-type="float">
            <text:p>58.8181818181818</text:p>
          </table:table-cell>
          <table:table-cell/>
          <table:table-cell office:value-type="float" office:value="49.7096774193548" calcext:value-type="float">
            <text:p>49.7096774193548</text:p>
          </table:table-cell>
        </table:table-row>
        <table:table-row table:style-name="ro1">
          <table:table-cell office:value-type="float" office:value="49.2666666666667" calcext:value-type="float">
            <text:p>49.2666666666667</text:p>
          </table:table-cell>
          <table:table-cell/>
          <table:table-cell office:value-type="float" office:value="49.7263157894737" calcext:value-type="float">
            <text:p>49.7263157894737</text:p>
          </table:table-cell>
        </table:table-row>
        <table:table-row table:style-name="ro1">
          <table:table-cell office:value-type="float" office:value="49.9677419354839" calcext:value-type="float">
            <text:p>49.9677419354839</text:p>
          </table:table-cell>
          <table:table-cell/>
          <table:table-cell office:value-type="float" office:value="49.7619047619048" calcext:value-type="float">
            <text:p>49.7619047619048</text:p>
          </table:table-cell>
        </table:table-row>
        <table:table-row table:style-name="ro1">
          <table:table-cell office:value-type="float" office:value="44.5833333333333" calcext:value-type="float">
            <text:p>44.5833333333333</text:p>
          </table:table-cell>
          <table:table-cell/>
          <table:table-cell office:value-type="float" office:value="49.7692307692308" calcext:value-type="float">
            <text:p>49.7692307692308</text:p>
          </table:table-cell>
        </table:table-row>
        <table:table-row table:style-name="ro1">
          <table:table-cell office:value-type="float" office:value="48.8809523809524" calcext:value-type="float">
            <text:p>48.8809523809524</text:p>
          </table:table-cell>
          <table:table-cell/>
          <table:table-cell office:value-type="float" office:value="49.7727272727273" calcext:value-type="float">
            <text:p>49.772727272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9.7916666666667" calcext:value-type="float">
            <text:p>49.7916666666667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/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37.4571428571429" calcext:value-type="float">
            <text:p>37.4571428571429</text:p>
          </table:table-cell>
          <table:table-cell/>
          <table:table-cell office:value-type="float" office:value="49.8125" calcext:value-type="float">
            <text:p>49.8125</text:p>
          </table:table-cell>
        </table:table-row>
        <table:table-row table:style-name="ro1">
          <table:table-cell office:value-type="float" office:value="24.8529411764706" calcext:value-type="float">
            <text:p>24.8529411764706</text:p>
          </table:table-cell>
          <table:table-cell/>
          <table:table-cell office:value-type="float" office:value="49.8181818181818" calcext:value-type="float">
            <text:p>49.8181818181818</text:p>
          </table:table-cell>
        </table:table-row>
        <table:table-row table:style-name="ro1">
          <table:table-cell office:value-type="float" office:value="35.5384615384615" calcext:value-type="float">
            <text:p>35.5384615384615</text:p>
          </table:table-cell>
          <table:table-cell/>
          <table:table-cell office:value-type="float" office:value="49.8571428571429" calcext:value-type="float">
            <text:p>49.8571428571429</text:p>
          </table:table-cell>
        </table:table-row>
        <table:table-row table:style-name="ro1">
          <table:table-cell office:value-type="float" office:value="44.9508196721312" calcext:value-type="float">
            <text:p>44.9508196721312</text:p>
          </table:table-cell>
          <table:table-cell/>
          <table:table-cell office:value-type="float" office:value="49.8636363636364" calcext:value-type="float">
            <text:p>49.8636363636364</text:p>
          </table:table-cell>
        </table:table-row>
        <table:table-row table:style-name="ro1">
          <table:table-cell office:value-type="float" office:value="38.4137931034483" calcext:value-type="float">
            <text:p>38.4137931034483</text:p>
          </table:table-cell>
          <table:table-cell/>
          <table:table-cell office:value-type="float" office:value="49.875" calcext:value-type="float">
            <text:p>49.875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/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float" office:value="43.5652173913044" calcext:value-type="float">
            <text:p>43.5652173913044</text:p>
          </table:table-cell>
          <table:table-cell/>
          <table:table-cell office:value-type="float" office:value="49.8829787234043" calcext:value-type="float">
            <text:p>49.8829787234043</text:p>
          </table:table-cell>
        </table:table-row>
        <table:table-row table:style-name="ro1">
          <table:table-cell office:value-type="float" office:value="32.3559322033898" calcext:value-type="float">
            <text:p>32.3559322033898</text:p>
          </table:table-cell>
          <table:table-cell/>
          <table:table-cell office:value-type="float" office:value="49.8979591836735" calcext:value-type="float">
            <text:p>49.8979591836735</text:p>
          </table:table-cell>
        </table:table-row>
        <table:table-row table:style-name="ro1">
          <table:table-cell office:value-type="float" office:value="22.7586206896552" calcext:value-type="float">
            <text:p>22.7586206896552</text:p>
          </table:table-cell>
          <table:table-cell/>
          <table:table-cell office:value-type="float" office:value="49.9142857142857" calcext:value-type="float">
            <text:p>49.9142857142857</text:p>
          </table:table-cell>
        </table:table-row>
        <table:table-row table:style-name="ro1">
          <table:table-cell office:value-type="float" office:value="51.5652173913044" calcext:value-type="float">
            <text:p>51.5652173913044</text:p>
          </table:table-cell>
          <table:table-cell/>
          <table:table-cell office:value-type="float" office:value="49.9166666666667" calcext:value-type="float">
            <text:p>49.9166666666667</text:p>
          </table:table-cell>
        </table:table-row>
        <table:table-row table:style-name="ro1">
          <table:table-cell office:value-type="float" office:value="50.9666666666667" calcext:value-type="float">
            <text:p>50.9666666666667</text:p>
          </table:table-cell>
          <table:table-cell/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float" office:value="33.3333333333333" calcext:value-type="float">
            <text:p>33.3333333333333</text:p>
          </table:table-cell>
          <table:table-cell/>
          <table:table-cell office:value-type="float" office:value="49.9565217391304" calcext:value-type="float">
            <text:p>49.9565217391304</text:p>
          </table:table-cell>
        </table:table-row>
        <table:table-row table:style-name="ro1">
          <table:table-cell office:value-type="float" office:value="54.8181818181818" calcext:value-type="float">
            <text:p>54.8181818181818</text:p>
          </table:table-cell>
          <table:table-cell/>
          <table:table-cell office:value-type="float" office:value="49.96" calcext:value-type="float">
            <text:p>49.96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/>
          <table:table-cell office:value-type="float" office:value="49.9677419354839" calcext:value-type="float">
            <text:p>49.96774193548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.7083333333333" calcext:value-type="float">
            <text:p>36.7083333333333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.6818181818182" calcext:value-type="float">
            <text:p>25.681818181818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.7142857142857" calcext:value-type="float">
            <text:p>33.7142857142857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.5641025641026" calcext:value-type="float">
            <text:p>49.564102564102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.6363636363636" calcext:value-type="float">
            <text:p>50.6363636363636</text:p>
          </table:table-cell>
          <table:table-cell/>
          <table:table-cell office:value-type="float" office:value="50.0384615384615" calcext:value-type="float">
            <text:p>50.0384615384615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/>
          <table:table-cell office:value-type="float" office:value="50.0434782608696" calcext:value-type="float">
            <text:p>50.0434782608696</text:p>
          </table:table-cell>
        </table:table-row>
        <table:table-row table:style-name="ro1">
          <table:table-cell office:value-type="float" office:value="62.2368421052632" calcext:value-type="float">
            <text:p>62.2368421052632</text:p>
          </table:table-cell>
          <table:table-cell/>
          <table:table-cell office:value-type="float" office:value="50.0476190476191" calcext:value-type="float">
            <text:p>50.0476190476191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/>
          <table:table-cell office:value-type="float" office:value="50.0571428571429" calcext:value-type="float">
            <text:p>50.0571428571429</text:p>
          </table:table-cell>
        </table:table-row>
        <table:table-row table:style-name="ro1">
          <table:table-cell office:value-type="float" office:value="30.6086956521739" calcext:value-type="float">
            <text:p>30.6086956521739</text:p>
          </table:table-cell>
          <table:table-cell/>
          <table:table-cell office:value-type="float" office:value="50.0666666666667" calcext:value-type="float">
            <text:p>50.0666666666667</text:p>
          </table:table-cell>
        </table:table-row>
        <table:table-row table:style-name="ro1">
          <table:table-cell office:value-type="float" office:value="27.1052631578947" calcext:value-type="float">
            <text:p>27.1052631578947</text:p>
          </table:table-cell>
          <table:table-cell/>
          <table:table-cell office:value-type="float" office:value="50.0714285714286" calcext:value-type="float">
            <text:p>50.0714285714286</text:p>
          </table:table-cell>
        </table:table-row>
        <table:table-row table:style-name="ro1">
          <table:table-cell office:value-type="float" office:value="39.9090909090909" calcext:value-type="float">
            <text:p>39.9090909090909</text:p>
          </table:table-cell>
          <table:table-cell/>
          <table:table-cell office:value-type="float" office:value="50.0909090909091" calcext:value-type="float">
            <text:p>50.0909090909091</text:p>
          </table:table-cell>
        </table:table-row>
        <table:table-row table:style-name="ro1">
          <table:table-cell office:value-type="float" office:value="39.9487179487179" calcext:value-type="float">
            <text:p>39.9487179487179</text:p>
          </table:table-cell>
          <table:table-cell/>
          <table:table-cell office:value-type="float" office:value="50.0975609756098" calcext:value-type="float">
            <text:p>50.097560975609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/>
          <table:table-cell office:value-type="float" office:value="50.1666666666667" calcext:value-type="float">
            <text:p>50.1666666666667</text:p>
          </table:table-cell>
        </table:table-row>
        <table:table-row table:style-name="ro1">
          <table:table-cell office:value-type="float" office:value="20.9634146341463" calcext:value-type="float">
            <text:p>20.9634146341463</text:p>
          </table:table-cell>
          <table:table-cell/>
          <table:table-cell office:value-type="float" office:value="50.1818181818182" calcext:value-type="float">
            <text:p>50.18181818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0.2153846153846" calcext:value-type="float">
            <text:p>50.2153846153846</text:p>
          </table:table-cell>
        </table:table-row>
        <table:table-row table:style-name="ro1">
          <table:table-cell office:value-type="float" office:value="37.8421052631579" calcext:value-type="float">
            <text:p>37.8421052631579</text:p>
          </table:table-cell>
          <table:table-cell/>
          <table:table-cell office:value-type="float" office:value="50.2272727272727" calcext:value-type="float">
            <text:p>50.2272727272727</text:p>
          </table:table-cell>
        </table:table-row>
        <table:table-row table:style-name="ro1">
          <table:table-cell office:value-type="float" office:value="51.8181818181818" calcext:value-type="float">
            <text:p>51.8181818181818</text:p>
          </table:table-cell>
          <table:table-cell/>
          <table:table-cell office:value-type="float" office:value="50.2380952380952" calcext:value-type="float">
            <text:p>50.2380952380952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/>
          <table:table-cell office:value-type="float" office:value="50.2727272727273" calcext:value-type="float">
            <text:p>50.2727272727273</text:p>
          </table:table-cell>
        </table:table-row>
        <table:table-row table:style-name="ro1">
          <table:table-cell office:value-type="float" office:value="47.6818181818182" calcext:value-type="float">
            <text:p>47.6818181818182</text:p>
          </table:table-cell>
          <table:table-cell/>
          <table:table-cell office:value-type="float" office:value="50.2941176470588" calcext:value-type="float">
            <text:p>50.2941176470588</text:p>
          </table:table-cell>
        </table:table-row>
        <table:table-row table:style-name="ro1">
          <table:table-cell office:value-type="float" office:value="59.2461538461538" calcext:value-type="float">
            <text:p>59.2461538461538</text:p>
          </table:table-cell>
          <table:table-cell/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36.2142857142857" calcext:value-type="float">
            <text:p>36.2142857142857</text:p>
          </table:table-cell>
          <table:table-cell/>
          <table:table-cell office:value-type="float" office:value="50.35" calcext:value-type="float">
            <text:p>50.35</text:p>
          </table:table-cell>
        </table:table-row>
        <table:table-row table:style-name="ro1">
          <table:table-cell office:value-type="float" office:value="58.3636363636364" calcext:value-type="float">
            <text:p>58.3636363636364</text:p>
          </table:table-cell>
          <table:table-cell/>
          <table:table-cell office:value-type="float" office:value="50.3636363636364" calcext:value-type="float">
            <text:p>50.3636363636364</text:p>
          </table:table-cell>
        </table:table-row>
        <table:table-row table:style-name="ro1">
          <table:table-cell office:value-type="float" office:value="63.0454545454546" calcext:value-type="float">
            <text:p>63.0454545454546</text:p>
          </table:table-cell>
          <table:table-cell/>
          <table:table-cell office:value-type="float" office:value="50.3636363636364" calcext:value-type="float">
            <text:p>50.3636363636364</text:p>
          </table:table-cell>
        </table:table-row>
        <table:table-row table:style-name="ro1">
          <table:table-cell office:value-type="float" office:value="56.2340425531915" calcext:value-type="float">
            <text:p>56.2340425531915</text:p>
          </table:table-cell>
          <table:table-cell/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30.7866666666667" calcext:value-type="float">
            <text:p>30.7866666666667</text:p>
          </table:table-cell>
          <table:table-cell/>
          <table:table-cell office:value-type="float" office:value="50.4166666666667" calcext:value-type="float">
            <text:p>50.4166666666667</text:p>
          </table:table-cell>
        </table:table-row>
        <table:table-row table:style-name="ro1">
          <table:table-cell office:value-type="float" office:value="51.6666666666667" calcext:value-type="float">
            <text:p>51.6666666666667</text:p>
          </table:table-cell>
          <table:table-cell/>
          <table:table-cell office:value-type="float" office:value="50.4347826086956" calcext:value-type="float">
            <text:p>50.4347826086956</text:p>
          </table:table-cell>
        </table:table-row>
        <table:table-row table:style-name="ro1">
          <table:table-cell office:value-type="float" office:value="34.7876712328767" calcext:value-type="float">
            <text:p>34.7876712328767</text:p>
          </table:table-cell>
          <table:table-cell/>
          <table:table-cell office:value-type="float" office:value="50.4583333333333" calcext:value-type="float">
            <text:p>50.4583333333333</text:p>
          </table:table-cell>
        </table:table-row>
        <table:table-row table:style-name="ro1">
          <table:table-cell office:value-type="float" office:value="71.7222222222222" calcext:value-type="float">
            <text:p>71.7222222222222</text:p>
          </table:table-cell>
          <table:table-cell/>
          <table:table-cell office:value-type="float" office:value="50.4651162790698" calcext:value-type="float">
            <text:p>50.4651162790698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/>
          <table:table-cell office:value-type="float" office:value="50.4651162790698" calcext:value-type="float">
            <text:p>50.4651162790698</text:p>
          </table:table-cell>
        </table:table-row>
        <table:table-row table:style-name="ro1">
          <table:table-cell office:value-type="float" office:value="42.3777777777778" calcext:value-type="float">
            <text:p>42.3777777777778</text:p>
          </table:table-cell>
          <table:table-cell/>
          <table:table-cell office:value-type="float" office:value="50.4705882352941" calcext:value-type="float">
            <text:p>50.4705882352941</text:p>
          </table:table-cell>
        </table:table-row>
        <table:table-row table:style-name="ro1">
          <table:table-cell office:value-type="float" office:value="39.2222222222222" calcext:value-type="float">
            <text:p>39.2222222222222</text:p>
          </table:table-cell>
          <table:table-cell/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/>
          <table:table-cell office:value-type="float" office:value="50.5151515151515" calcext:value-type="float">
            <text:p>50.5151515151515</text:p>
          </table:table-cell>
        </table:table-row>
        <table:table-row table:style-name="ro1">
          <table:table-cell office:value-type="float" office:value="32.978021978022" calcext:value-type="float">
            <text:p>32.978021978022</text:p>
          </table:table-cell>
          <table:table-cell/>
          <table:table-cell office:value-type="float" office:value="50.5555555555556" calcext:value-type="float">
            <text:p>50.5555555555556</text:p>
          </table:table-cell>
        </table:table-row>
        <table:table-row table:style-name="ro1">
          <table:table-cell office:value-type="float" office:value="45.7352941176471" calcext:value-type="float">
            <text:p>45.7352941176471</text:p>
          </table:table-cell>
          <table:table-cell/>
          <table:table-cell office:value-type="float" office:value="50.5909090909091" calcext:value-type="float">
            <text:p>50.590909090909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/>
          <table:table-cell office:value-type="float" office:value="50.6122448979592" calcext:value-type="float">
            <text:p>50.6122448979592</text:p>
          </table:table-cell>
        </table:table-row>
        <table:table-row table:style-name="ro1">
          <table:table-cell office:value-type="float" office:value="51.8529411764706" calcext:value-type="float">
            <text:p>51.8529411764706</text:p>
          </table:table-cell>
          <table:table-cell/>
          <table:table-cell office:value-type="float" office:value="50.6363636363636" calcext:value-type="float">
            <text:p>50.6363636363636</text:p>
          </table:table-cell>
        </table:table-row>
        <table:table-row table:style-name="ro1">
          <table:table-cell office:value-type="float" office:value="33.6780487804878" calcext:value-type="float">
            <text:p>33.6780487804878</text:p>
          </table:table-cell>
          <table:table-cell/>
          <table:table-cell office:value-type="float" office:value="50.6363636363636" calcext:value-type="float">
            <text:p>50.6363636363636</text:p>
          </table:table-cell>
        </table:table-row>
        <table:table-row table:style-name="ro1">
          <table:table-cell office:value-type="float" office:value="41.2941176470588" calcext:value-type="float">
            <text:p>41.2941176470588</text:p>
          </table:table-cell>
          <table:table-cell/>
          <table:table-cell office:value-type="float" office:value="50.6521739130435" calcext:value-type="float">
            <text:p>50.652173913043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/>
          <table:table-cell office:value-type="float" office:value="50.6551724137931" calcext:value-type="float">
            <text:p>50.6551724137931</text:p>
          </table:table-cell>
        </table:table-row>
        <table:table-row table:style-name="ro1">
          <table:table-cell office:value-type="float" office:value="52.8181818181818" calcext:value-type="float">
            <text:p>52.8181818181818</text:p>
          </table:table-cell>
          <table:table-cell/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float" office:value="32.2727272727273" calcext:value-type="float">
            <text:p>32.2727272727273</text:p>
          </table:table-cell>
          <table:table-cell/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float" office:value="53.0487804878049" calcext:value-type="float">
            <text:p>53.0487804878049</text:p>
          </table:table-cell>
          <table:table-cell/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float" office:value="50.4651162790698" calcext:value-type="float">
            <text:p>50.4651162790698</text:p>
          </table:table-cell>
          <table:table-cell/>
          <table:table-cell office:value-type="float" office:value="50.7058823529412" calcext:value-type="float">
            <text:p>50.7058823529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50.734375" calcext:value-type="float">
            <text:p>50.734375</text:p>
          </table:table-cell>
        </table:table-row>
        <table:table-row table:style-name="ro1">
          <table:table-cell office:value-type="float" office:value="84.5714285714286" calcext:value-type="float">
            <text:p>84.5714285714286</text:p>
          </table:table-cell>
          <table:table-cell/>
          <table:table-cell office:value-type="float" office:value="50.7352941176471" calcext:value-type="float">
            <text:p>50.7352941176471</text:p>
          </table:table-cell>
        </table:table-row>
        <table:table-row table:style-name="ro1">
          <table:table-cell office:value-type="float" office:value="59.9761904761905" calcext:value-type="float">
            <text:p>59.9761904761905</text:p>
          </table:table-cell>
          <table:table-cell/>
          <table:table-cell office:value-type="float" office:value="50.7466666666667" calcext:value-type="float">
            <text:p>50.7466666666667</text:p>
          </table:table-cell>
        </table:table-row>
        <table:table-row table:style-name="ro1">
          <table:table-cell office:value-type="float" office:value="46.1428571428572" calcext:value-type="float">
            <text:p>46.1428571428572</text:p>
          </table:table-cell>
          <table:table-cell/>
          <table:table-cell office:value-type="float" office:value="50.7692307692308" calcext:value-type="float">
            <text:p>50.76923076923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0.7699115044248" calcext:value-type="float">
            <text:p>50.7699115044248</text:p>
          </table:table-cell>
        </table:table-row>
        <table:table-row table:style-name="ro1">
          <table:table-cell office:value-type="float" office:value="43.5909090909091" calcext:value-type="float">
            <text:p>43.5909090909091</text:p>
          </table:table-cell>
          <table:table-cell/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50.4166666666667" calcext:value-type="float">
            <text:p>50.4166666666667</text:p>
          </table:table-cell>
          <table:table-cell/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6.05882352941176" calcext:value-type="float">
            <text:p>6.05882352941176</text:p>
          </table:table-cell>
          <table:table-cell/>
          <table:table-cell office:value-type="float" office:value="50.9090909090909" calcext:value-type="float">
            <text:p>50.9090909090909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/>
          <table:table-cell office:value-type="float" office:value="50.9333333333333" calcext:value-type="float">
            <text:p>50.9333333333333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/>
          <table:table-cell office:value-type="float" office:value="50.9393939393939" calcext:value-type="float">
            <text:p>50.9393939393939</text:p>
          </table:table-cell>
        </table:table-row>
        <table:table-row table:style-name="ro1">
          <table:table-cell office:value-type="float" office:value="23.4117647058823" calcext:value-type="float">
            <text:p>23.4117647058823</text:p>
          </table:table-cell>
          <table:table-cell/>
          <table:table-cell office:value-type="float" office:value="50.9444444444444" calcext:value-type="float">
            <text:p>50.9444444444444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/>
          <table:table-cell office:value-type="float" office:value="50.9545454545455" calcext:value-type="float">
            <text:p>50.9545454545455</text:p>
          </table:table-cell>
        </table:table-row>
        <table:table-row table:style-name="ro1">
          <table:table-cell office:value-type="float" office:value="67.2380952380952" calcext:value-type="float">
            <text:p>67.2380952380952</text:p>
          </table:table-cell>
          <table:table-cell/>
          <table:table-cell office:value-type="float" office:value="50.9545454545455" calcext:value-type="float">
            <text:p>50.9545454545455</text:p>
          </table:table-cell>
        </table:table-row>
        <table:table-row table:style-name="ro1">
          <table:table-cell office:value-type="float" office:value="35.9714285714286" calcext:value-type="float">
            <text:p>35.9714285714286</text:p>
          </table:table-cell>
          <table:table-cell/>
          <table:table-cell office:value-type="float" office:value="50.9545454545455" calcext:value-type="float">
            <text:p>50.9545454545455</text:p>
          </table:table-cell>
        </table:table-row>
        <table:table-row table:style-name="ro1">
          <table:table-cell office:value-type="float" office:value="35.4803921568627" calcext:value-type="float">
            <text:p>35.4803921568627</text:p>
          </table:table-cell>
          <table:table-cell/>
          <table:table-cell office:value-type="float" office:value="50.9583333333333" calcext:value-type="float">
            <text:p>50.958333333333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/>
          <table:table-cell office:value-type="float" office:value="50.9666666666667" calcext:value-type="float">
            <text:p>50.9666666666667</text:p>
          </table:table-cell>
        </table:table-row>
        <table:table-row table:style-name="ro1">
          <table:table-cell office:value-type="float" office:value="36.8421052631579" calcext:value-type="float">
            <text:p>36.8421052631579</text:p>
          </table:table-cell>
          <table:table-cell/>
          <table:table-cell office:value-type="float" office:value="50.9733333333333" calcext:value-type="float">
            <text:p>50.9733333333333</text:p>
          </table:table-cell>
        </table:table-row>
        <table:table-row table:style-name="ro1">
          <table:table-cell office:value-type="float" office:value="33.4285714285714" calcext:value-type="float">
            <text:p>33.4285714285714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.6333333333333" calcext:value-type="float">
            <text:p>49.6333333333333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.8571428571429" calcext:value-type="float">
            <text:p>56.8571428571429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.4545454545455" calcext:value-type="float">
            <text:p>47.4545454545455</text:p>
          </table:table-cell>
          <table:table-cell/>
          <table:table-cell office:value-type="float" office:value="51.0434782608696" calcext:value-type="float">
            <text:p>51.0434782608696</text:p>
          </table:table-cell>
        </table:table-row>
        <table:table-row table:style-name="ro1">
          <table:table-cell office:value-type="float" office:value="58.3636363636364" calcext:value-type="float">
            <text:p>58.3636363636364</text:p>
          </table:table-cell>
          <table:table-cell/>
          <table:table-cell office:value-type="float" office:value="51.0454545454545" calcext:value-type="float">
            <text:p>51.0454545454545</text:p>
          </table:table-cell>
        </table:table-row>
        <table:table-row table:style-name="ro1">
          <table:table-cell office:value-type="float" office:value="15.5909090909091" calcext:value-type="float">
            <text:p>15.5909090909091</text:p>
          </table:table-cell>
          <table:table-cell/>
          <table:table-cell office:value-type="float" office:value="51.05" calcext:value-type="float">
            <text:p>51.05</text:p>
          </table:table-cell>
        </table:table-row>
        <table:table-row table:style-name="ro1">
          <table:table-cell office:value-type="float" office:value="49.8181818181818" calcext:value-type="float">
            <text:p>49.8181818181818</text:p>
          </table:table-cell>
          <table:table-cell/>
          <table:table-cell office:value-type="float" office:value="51.0606060606061" calcext:value-type="float">
            <text:p>51.0606060606061</text:p>
          </table:table-cell>
        </table:table-row>
        <table:table-row table:style-name="ro1">
          <table:table-cell office:value-type="float" office:value="29.1219512195122" calcext:value-type="float">
            <text:p>29.1219512195122</text:p>
          </table:table-cell>
          <table:table-cell/>
          <table:table-cell office:value-type="float" office:value="51.0625" calcext:value-type="float">
            <text:p>51.0625</text:p>
          </table:table-cell>
        </table:table-row>
        <table:table-row table:style-name="ro1">
          <table:table-cell office:value-type="float" office:value="37.8846153846154" calcext:value-type="float">
            <text:p>37.8846153846154</text:p>
          </table:table-cell>
          <table:table-cell/>
          <table:table-cell office:value-type="float" office:value="51.0666666666667" calcext:value-type="float">
            <text:p>51.0666666666667</text:p>
          </table:table-cell>
        </table:table-row>
        <table:table-row table:style-name="ro1">
          <table:table-cell office:value-type="float" office:value="52.0882352941177" calcext:value-type="float">
            <text:p>52.0882352941177</text:p>
          </table:table-cell>
          <table:table-cell/>
          <table:table-cell office:value-type="float" office:value="51.0769230769231" calcext:value-type="float">
            <text:p>51.0769230769231</text:p>
          </table:table-cell>
        </table:table-row>
        <table:table-row table:style-name="ro1">
          <table:table-cell office:value-type="float" office:value="39.9230769230769" calcext:value-type="float">
            <text:p>39.9230769230769</text:p>
          </table:table-cell>
          <table:table-cell/>
          <table:table-cell office:value-type="float" office:value="51.0983606557377" calcext:value-type="float">
            <text:p>51.0983606557377</text:p>
          </table:table-cell>
        </table:table-row>
        <table:table-row table:style-name="ro1">
          <table:table-cell office:value-type="float" office:value="39.1785714285714" calcext:value-type="float">
            <text:p>39.1785714285714</text:p>
          </table:table-cell>
          <table:table-cell/>
          <table:table-cell office:value-type="float" office:value="51.1304347826087" calcext:value-type="float">
            <text:p>51.1304347826087</text:p>
          </table:table-cell>
        </table:table-row>
        <table:table-row table:style-name="ro1">
          <table:table-cell office:value-type="float" office:value="13.1379310344828" calcext:value-type="float">
            <text:p>13.1379310344828</text:p>
          </table:table-cell>
          <table:table-cell/>
          <table:table-cell office:value-type="float" office:value="51.1428571428572" calcext:value-type="float">
            <text:p>51.1428571428572</text:p>
          </table:table-cell>
        </table:table-row>
        <table:table-row table:style-name="ro1">
          <table:table-cell office:value-type="float" office:value="51.6315789473684" calcext:value-type="float">
            <text:p>51.6315789473684</text:p>
          </table:table-cell>
          <table:table-cell/>
          <table:table-cell office:value-type="float" office:value="51.1818181818182" calcext:value-type="float">
            <text:p>51.1818181818182</text:p>
          </table:table-cell>
        </table:table-row>
        <table:table-row table:style-name="ro1">
          <table:table-cell office:value-type="float" office:value="33.4814814814815" calcext:value-type="float">
            <text:p>33.4814814814815</text:p>
          </table:table-cell>
          <table:table-cell/>
          <table:table-cell office:value-type="float" office:value="51.1818181818182" calcext:value-type="float">
            <text:p>51.1818181818182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/>
          <table:table-cell office:value-type="float" office:value="51.1904761904762" calcext:value-type="float">
            <text:p>51.1904761904762</text:p>
          </table:table-cell>
        </table:table-row>
        <table:table-row table:style-name="ro1">
          <table:table-cell office:value-type="float" office:value="64.1176470588235" calcext:value-type="float">
            <text:p>64.1176470588235</text:p>
          </table:table-cell>
          <table:table-cell/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1.2424242424242" calcext:value-type="float">
            <text:p>51.2424242424242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/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59.0555555555556" calcext:value-type="float">
            <text:p>59.0555555555556</text:p>
          </table:table-cell>
          <table:table-cell/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/>
          <table:table-cell office:value-type="float" office:value="51.3023255813954" calcext:value-type="float">
            <text:p>51.3023255813954</text:p>
          </table:table-cell>
        </table:table-row>
        <table:table-row table:style-name="ro1">
          <table:table-cell office:value-type="float" office:value="29.0909090909091" calcext:value-type="float">
            <text:p>29.0909090909091</text:p>
          </table:table-cell>
          <table:table-cell/>
          <table:table-cell office:value-type="float" office:value="51.3333333333333" calcext:value-type="float">
            <text:p>51.3333333333333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/>
          <table:table-cell office:value-type="float" office:value="51.35" calcext:value-type="float">
            <text:p>51.35</text:p>
          </table:table-cell>
        </table:table-row>
        <table:table-row table:style-name="ro1">
          <table:table-cell office:value-type="float" office:value="58.8888888888889" calcext:value-type="float">
            <text:p>58.8888888888889</text:p>
          </table:table-cell>
          <table:table-cell/>
          <table:table-cell office:value-type="float" office:value="51.3636363636364" calcext:value-type="float">
            <text:p>51.363636363636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/>
          <table:table-cell office:value-type="float" office:value="51.3703703703704" calcext:value-type="float">
            <text:p>51.3703703703704</text:p>
          </table:table-cell>
        </table:table-row>
        <table:table-row table:style-name="ro1">
          <table:table-cell office:value-type="float" office:value="85.3333333333333" calcext:value-type="float">
            <text:p>85.3333333333333</text:p>
          </table:table-cell>
          <table:table-cell/>
          <table:table-cell office:value-type="float" office:value="51.3855421686747" calcext:value-type="float">
            <text:p>51.38554216867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1.3870967741936" calcext:value-type="float">
            <text:p>51.3870967741936</text:p>
          </table:table-cell>
        </table:table-row>
        <table:table-row table:style-name="ro1">
          <table:table-cell office:value-type="float" office:value="39.169014084507" calcext:value-type="float">
            <text:p>39.169014084507</text:p>
          </table:table-cell>
          <table:table-cell/>
          <table:table-cell office:value-type="float" office:value="51.4006514657981" calcext:value-type="float">
            <text:p>51.400651465798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/>
          <table:table-cell office:value-type="float" office:value="51.4347826086957" calcext:value-type="float">
            <text:p>51.4347826086957</text:p>
          </table:table-cell>
        </table:table-row>
        <table:table-row table:style-name="ro1">
          <table:table-cell office:value-type="float" office:value="40.1875" calcext:value-type="float">
            <text:p>40.1875</text:p>
          </table:table-cell>
          <table:table-cell/>
          <table:table-cell office:value-type="float" office:value="51.4615384615385" calcext:value-type="float">
            <text:p>51.4615384615385</text:p>
          </table:table-cell>
        </table:table-row>
        <table:table-row table:style-name="ro1">
          <table:table-cell office:value-type="float" office:value="36.0277777777778" calcext:value-type="float">
            <text:p>36.0277777777778</text:p>
          </table:table-cell>
          <table:table-cell/>
          <table:table-cell office:value-type="float" office:value="51.4651162790698" calcext:value-type="float">
            <text:p>51.4651162790698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/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32.6363636363636" calcext:value-type="float">
            <text:p>32.6363636363636</text:p>
          </table:table-cell>
          <table:table-cell/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26.4210526315789" calcext:value-type="float">
            <text:p>26.4210526315789</text:p>
          </table:table-cell>
          <table:table-cell/>
          <table:table-cell office:value-type="float" office:value="51.5277777777778" calcext:value-type="float">
            <text:p>51.5277777777778</text:p>
          </table:table-cell>
        </table:table-row>
        <table:table-row table:style-name="ro1">
          <table:table-cell office:value-type="float" office:value="44.6363636363636" calcext:value-type="float">
            <text:p>44.6363636363636</text:p>
          </table:table-cell>
          <table:table-cell/>
          <table:table-cell office:value-type="float" office:value="51.5652173913044" calcext:value-type="float">
            <text:p>51.5652173913044</text:p>
          </table:table-cell>
        </table:table-row>
        <table:table-row table:style-name="ro1">
          <table:table-cell office:value-type="float" office:value="50.9333333333333" calcext:value-type="float">
            <text:p>50.9333333333333</text:p>
          </table:table-cell>
          <table:table-cell/>
          <table:table-cell office:value-type="float" office:value="51.5789473684211" calcext:value-type="float">
            <text:p>51.5789473684211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/>
          <table:table-cell office:value-type="float" office:value="51.6046511627907" calcext:value-type="float">
            <text:p>51.6046511627907</text:p>
          </table:table-cell>
        </table:table-row>
        <table:table-row table:style-name="ro1">
          <table:table-cell office:value-type="float" office:value="47.1363636363636" calcext:value-type="float">
            <text:p>47.1363636363636</text:p>
          </table:table-cell>
          <table:table-cell/>
          <table:table-cell office:value-type="float" office:value="51.625" calcext:value-type="float">
            <text:p>51.625</text:p>
          </table:table-cell>
        </table:table-row>
        <table:table-row table:style-name="ro1">
          <table:table-cell office:value-type="float" office:value="49.7619047619048" calcext:value-type="float">
            <text:p>49.7619047619048</text:p>
          </table:table-cell>
          <table:table-cell/>
          <table:table-cell office:value-type="float" office:value="51.6315789473684" calcext:value-type="float">
            <text:p>51.6315789473684</text:p>
          </table:table-cell>
        </table:table-row>
        <table:table-row table:style-name="ro1">
          <table:table-cell office:value-type="float" office:value="38.9661016949153" calcext:value-type="float">
            <text:p>38.9661016949153</text:p>
          </table:table-cell>
          <table:table-cell/>
          <table:table-cell office:value-type="float" office:value="51.6666666666667" calcext:value-type="float">
            <text:p>51.6666666666667</text:p>
          </table:table-cell>
        </table:table-row>
        <table:table-row table:style-name="ro1">
          <table:table-cell office:value-type="float" office:value="59.6842105263158" calcext:value-type="float">
            <text:p>59.6842105263158</text:p>
          </table:table-cell>
          <table:table-cell/>
          <table:table-cell office:value-type="float" office:value="51.6785714285714" calcext:value-type="float">
            <text:p>51.6785714285714</text:p>
          </table:table-cell>
        </table:table-row>
        <table:table-row table:style-name="ro1">
          <table:table-cell office:value-type="float" office:value="42.551724137931" calcext:value-type="float">
            <text:p>42.551724137931</text:p>
          </table:table-cell>
          <table:table-cell/>
          <table:table-cell office:value-type="float" office:value="51.7222222222222" calcext:value-type="float">
            <text:p>51.7222222222222</text:p>
          </table:table-cell>
        </table:table-row>
        <table:table-row table:style-name="ro1">
          <table:table-cell office:value-type="float" office:value="63.1904761904762" calcext:value-type="float">
            <text:p>63.1904761904762</text:p>
          </table:table-cell>
          <table:table-cell/>
          <table:table-cell office:value-type="float" office:value="51.7441860465116" calcext:value-type="float">
            <text:p>51.7441860465116</text:p>
          </table:table-cell>
        </table:table-row>
        <table:table-row table:style-name="ro1">
          <table:table-cell office:value-type="float" office:value="40.6071428571429" calcext:value-type="float">
            <text:p>40.6071428571429</text:p>
          </table:table-cell>
          <table:table-cell/>
          <table:table-cell office:value-type="float" office:value="51.75" calcext:value-type="float">
            <text:p>51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52.45" calcext:value-type="float">
            <text:p>52.45</text:p>
          </table:table-cell>
          <table:table-cell/>
          <table:table-cell office:value-type="float" office:value="51.8125" calcext:value-type="float">
            <text:p>51.8125</text:p>
          </table:table-cell>
        </table:table-row>
        <table:table-row table:style-name="ro1">
          <table:table-cell office:value-type="float" office:value="57.0476190476191" calcext:value-type="float">
            <text:p>57.0476190476191</text:p>
          </table:table-cell>
          <table:table-cell/>
          <table:table-cell office:value-type="float" office:value="51.8181818181818" calcext:value-type="float">
            <text:p>51.81818181818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1.8181818181818" calcext:value-type="float">
            <text:p>51.81818181818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1.828125" calcext:value-type="float">
            <text:p>51.828125</text:p>
          </table:table-cell>
        </table:table-row>
        <table:table-row table:style-name="ro1">
          <table:table-cell office:value-type="float" office:value="30.5416666666667" calcext:value-type="float">
            <text:p>30.5416666666667</text:p>
          </table:table-cell>
          <table:table-cell/>
          <table:table-cell office:value-type="float" office:value="51.8333333333333" calcext:value-type="float">
            <text:p>51.8333333333333</text:p>
          </table:table-cell>
        </table:table-row>
        <table:table-row table:style-name="ro1">
          <table:table-cell office:value-type="float" office:value="41.4166666666667" calcext:value-type="float">
            <text:p>41.4166666666667</text:p>
          </table:table-cell>
          <table:table-cell/>
          <table:table-cell office:value-type="float" office:value="51.8333333333333" calcext:value-type="float">
            <text:p>51.8333333333333</text:p>
          </table:table-cell>
        </table:table-row>
        <table:table-row table:style-name="ro1">
          <table:table-cell office:value-type="float" office:value="46.9545454545455" calcext:value-type="float">
            <text:p>46.9545454545455</text:p>
          </table:table-cell>
          <table:table-cell/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float" office:value="45.1621621621622" calcext:value-type="float">
            <text:p>45.1621621621622</text:p>
          </table:table-cell>
          <table:table-cell/>
          <table:table-cell office:value-type="float" office:value="51.8405797101449" calcext:value-type="float">
            <text:p>51.8405797101449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/>
          <table:table-cell office:value-type="float" office:value="51.84375" calcext:value-type="float">
            <text:p>51.84375</text:p>
          </table:table-cell>
        </table:table-row>
        <table:table-row table:style-name="ro1">
          <table:table-cell office:value-type="float" office:value="29.0657894736842" calcext:value-type="float">
            <text:p>29.0657894736842</text:p>
          </table:table-cell>
          <table:table-cell/>
          <table:table-cell office:value-type="float" office:value="51.8529411764706" calcext:value-type="float">
            <text:p>51.8529411764706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/>
          <table:table-cell office:value-type="float" office:value="51.8666666666667" calcext:value-type="float">
            <text:p>51.8666666666667</text:p>
          </table:table-cell>
        </table:table-row>
        <table:table-row table:style-name="ro1">
          <table:table-cell office:value-type="float" office:value="60.9310344827586" calcext:value-type="float">
            <text:p>60.9310344827586</text:p>
          </table:table-cell>
          <table:table-cell/>
          <table:table-cell office:value-type="float" office:value="51.8809523809524" calcext:value-type="float">
            <text:p>51.8809523809524</text:p>
          </table:table-cell>
        </table:table-row>
        <table:table-row table:style-name="ro1">
          <table:table-cell office:value-type="float" office:value="47.74" calcext:value-type="float">
            <text:p>47.74</text:p>
          </table:table-cell>
          <table:table-cell/>
          <table:table-cell office:value-type="float" office:value="51.8947368421053" calcext:value-type="float">
            <text:p>51.8947368421053</text:p>
          </table:table-cell>
        </table:table-row>
        <table:table-row table:style-name="ro1">
          <table:table-cell office:value-type="float" office:value="81.2857142857143" calcext:value-type="float">
            <text:p>81.2857142857143</text:p>
          </table:table-cell>
          <table:table-cell/>
          <table:table-cell office:value-type="float" office:value="51.906976744186" calcext:value-type="float">
            <text:p>51.9069767441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1.9545454545455" calcext:value-type="float">
            <text:p>51.9545454545455</text:p>
          </table:table-cell>
        </table:table-row>
        <table:table-row table:style-name="ro1">
          <table:table-cell office:value-type="float" office:value="40.8666666666667" calcext:value-type="float">
            <text:p>40.8666666666667</text:p>
          </table:table-cell>
          <table:table-cell/>
          <table:table-cell office:value-type="float" office:value="51.9722222222222" calcext:value-type="float">
            <text:p>51.9722222222222</text:p>
          </table:table-cell>
        </table:table-row>
        <table:table-row table:style-name="ro1">
          <table:table-cell office:value-type="float" office:value="37.8932384341637" calcext:value-type="float">
            <text:p>37.8932384341637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.0769230769231" calcext:value-type="float">
            <text:p>48.0769230769231</text:p>
          </table:table-cell>
          <table:table-cell/>
          <table:table-cell office:value-type="float" office:value="52.025" calcext:value-type="float">
            <text:p>52.02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/>
          <table:table-cell office:value-type="float" office:value="52.037037037037" calcext:value-type="float">
            <text:p>52.037037037037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/>
          <table:table-cell office:value-type="float" office:value="52.0625" calcext:value-type="float">
            <text:p>52.0625</text:p>
          </table:table-cell>
        </table:table-row>
        <table:table-row table:style-name="ro1">
          <table:table-cell office:value-type="float" office:value="49.03125" calcext:value-type="float">
            <text:p>49.03125</text:p>
          </table:table-cell>
          <table:table-cell/>
          <table:table-cell office:value-type="float" office:value="52.0869565217391" calcext:value-type="float">
            <text:p>52.08695652173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2.0882352941177" calcext:value-type="float">
            <text:p>52.0882352941177</text:p>
          </table:table-cell>
        </table:table-row>
        <table:table-row table:style-name="ro1">
          <table:table-cell office:value-type="float" office:value="33.4642857142857" calcext:value-type="float">
            <text:p>33.4642857142857</text:p>
          </table:table-cell>
          <table:table-cell/>
          <table:table-cell office:value-type="float" office:value="52.0952380952381" calcext:value-type="float">
            <text:p>52.09523809523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2.1111111111111" calcext:value-type="float">
            <text:p>52.11111111111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2.1428571428571" calcext:value-type="float">
            <text:p>52.1428571428571</text:p>
          </table:table-cell>
        </table:table-row>
        <table:table-row table:style-name="ro1">
          <table:table-cell office:value-type="float" office:value="41.3564356435644" calcext:value-type="float">
            <text:p>41.3564356435644</text:p>
          </table:table-cell>
          <table:table-cell/>
          <table:table-cell office:value-type="float" office:value="52.1538461538462" calcext:value-type="float">
            <text:p>52.1538461538462</text:p>
          </table:table-cell>
        </table:table-row>
        <table:table-row table:style-name="ro1">
          <table:table-cell office:value-type="float" office:value="28.7670454545455" calcext:value-type="float">
            <text:p>28.7670454545455</text:p>
          </table:table-cell>
          <table:table-cell/>
          <table:table-cell office:value-type="float" office:value="52.1666666666667" calcext:value-type="float">
            <text:p>52.1666666666667</text:p>
          </table:table-cell>
        </table:table-row>
        <table:table-row table:style-name="ro1">
          <table:table-cell office:value-type="float" office:value="60.1153846153846" calcext:value-type="float">
            <text:p>60.1153846153846</text:p>
          </table:table-cell>
          <table:table-cell/>
          <table:table-cell office:value-type="float" office:value="52.2040816326531" calcext:value-type="float">
            <text:p>52.2040816326531</text:p>
          </table:table-cell>
        </table:table-row>
        <table:table-row table:style-name="ro1">
          <table:table-cell office:value-type="float" office:value="50.4347826086956" calcext:value-type="float">
            <text:p>50.4347826086956</text:p>
          </table:table-cell>
          <table:table-cell/>
          <table:table-cell office:value-type="float" office:value="52.2222222222222" calcext:value-type="float">
            <text:p>52.2222222222222</text:p>
          </table:table-cell>
        </table:table-row>
        <table:table-row table:style-name="ro1">
          <table:table-cell office:value-type="float" office:value="43.9365079365079" calcext:value-type="float">
            <text:p>43.9365079365079</text:p>
          </table:table-cell>
          <table:table-cell/>
          <table:table-cell office:value-type="float" office:value="52.24" calcext:value-type="float">
            <text:p>52.24</text:p>
          </table:table-cell>
        </table:table-row>
        <table:table-row table:style-name="ro1">
          <table:table-cell office:value-type="float" office:value="39.0384615384615" calcext:value-type="float">
            <text:p>39.0384615384615</text:p>
          </table:table-cell>
          <table:table-cell/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20.5428571428571" calcext:value-type="float">
            <text:p>20.5428571428571</text:p>
          </table:table-cell>
          <table:table-cell/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28.1851851851852" calcext:value-type="float">
            <text:p>28.1851851851852</text:p>
          </table:table-cell>
          <table:table-cell/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2.2727272727273" calcext:value-type="float">
            <text:p>52.2727272727273</text:p>
          </table:table-cell>
        </table:table-row>
        <table:table-row table:style-name="ro1">
          <table:table-cell office:value-type="float" office:value="40.952380952381" calcext:value-type="float">
            <text:p>40.952380952381</text:p>
          </table:table-cell>
          <table:table-cell/>
          <table:table-cell office:value-type="float" office:value="52.2857142857143" calcext:value-type="float">
            <text:p>52.2857142857143</text:p>
          </table:table-cell>
        </table:table-row>
        <table:table-row table:style-name="ro1">
          <table:table-cell office:value-type="float" office:value="24.3846153846154" calcext:value-type="float">
            <text:p>24.3846153846154</text:p>
          </table:table-cell>
          <table:table-cell/>
          <table:table-cell office:value-type="float" office:value="52.2857142857143" calcext:value-type="float">
            <text:p>52.2857142857143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/>
          <table:table-cell office:value-type="float" office:value="52.2857142857143" calcext:value-type="float">
            <text:p>52.2857142857143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/>
          <table:table-cell office:value-type="float" office:value="52.3333333333333" calcext:value-type="float">
            <text:p>52.3333333333333</text:p>
          </table:table-cell>
        </table:table-row>
        <table:table-row table:style-name="ro1">
          <table:table-cell office:value-type="float" office:value="64.7857142857143" calcext:value-type="float">
            <text:p>64.7857142857143</text:p>
          </table:table-cell>
          <table:table-cell/>
          <table:table-cell office:value-type="float" office:value="52.3478260869565" calcext:value-type="float">
            <text:p>52.3478260869565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/>
          <table:table-cell office:value-type="float" office:value="52.3529411764706" calcext:value-type="float">
            <text:p>52.3529411764706</text:p>
          </table:table-cell>
        </table:table-row>
        <table:table-row table:style-name="ro1">
          <table:table-cell office:value-type="float" office:value="25.6222222222222" calcext:value-type="float">
            <text:p>25.6222222222222</text:p>
          </table:table-cell>
          <table:table-cell/>
          <table:table-cell office:value-type="float" office:value="52.3846153846154" calcext:value-type="float">
            <text:p>52.384615384615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/>
          <table:table-cell office:value-type="float" office:value="52.4444444444444" calcext:value-type="float">
            <text:p>52.4444444444444</text:p>
          </table:table-cell>
        </table:table-row>
        <table:table-row table:style-name="ro1">
          <table:table-cell office:value-type="float" office:value="31.2474226804124" calcext:value-type="float">
            <text:p>31.2474226804124</text:p>
          </table:table-cell>
          <table:table-cell/>
          <table:table-cell office:value-type="float" office:value="52.4473684210526" calcext:value-type="float">
            <text:p>52.4473684210526</text:p>
          </table:table-cell>
        </table:table-row>
        <table:table-row table:style-name="ro1">
          <table:table-cell office:value-type="float" office:value="37.4137931034483" calcext:value-type="float">
            <text:p>37.4137931034483</text:p>
          </table:table-cell>
          <table:table-cell/>
          <table:table-cell office:value-type="float" office:value="52.448275862069" calcext:value-type="float">
            <text:p>52.44827586206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/>
          <table:table-cell office:value-type="float" office:value="52.45" calcext:value-type="float">
            <text:p>52.45</text:p>
          </table:table-cell>
        </table:table-row>
        <table:table-row table:style-name="ro1">
          <table:table-cell office:value-type="float" office:value="48.5833333333333" calcext:value-type="float">
            <text:p>48.5833333333333</text:p>
          </table:table-cell>
          <table:table-cell/>
          <table:table-cell office:value-type="float" office:value="52.4615384615385" calcext:value-type="float">
            <text:p>52.4615384615385</text:p>
          </table:table-cell>
        </table:table-row>
        <table:table-row table:style-name="ro1">
          <table:table-cell office:value-type="float" office:value="49.96" calcext:value-type="float">
            <text:p>49.96</text:p>
          </table:table-cell>
          <table:table-cell/>
          <table:table-cell office:value-type="float" office:value="52.4722222222222" calcext:value-type="float">
            <text:p>52.4722222222222</text:p>
          </table:table-cell>
        </table:table-row>
        <table:table-row table:style-name="ro1">
          <table:table-cell office:value-type="float" office:value="38.9047619047619" calcext:value-type="float">
            <text:p>38.9047619047619</text:p>
          </table:table-cell>
          <table:table-cell/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30.1363636363636" calcext:value-type="float">
            <text:p>30.1363636363636</text:p>
          </table:table-cell>
          <table:table-cell/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39.4782608695652" calcext:value-type="float">
            <text:p>39.4782608695652</text:p>
          </table:table-cell>
          <table:table-cell/>
          <table:table-cell office:value-type="float" office:value="52.5227272727273" calcext:value-type="float">
            <text:p>52.5227272727273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/>
          <table:table-cell office:value-type="float" office:value="52.5333333333333" calcext:value-type="float">
            <text:p>52.5333333333333</text:p>
          </table:table-cell>
        </table:table-row>
        <table:table-row table:style-name="ro1">
          <table:table-cell office:value-type="float" office:value="33.7794871794872" calcext:value-type="float">
            <text:p>33.7794871794872</text:p>
          </table:table-cell>
          <table:table-cell/>
          <table:table-cell office:value-type="float" office:value="52.5428571428571" calcext:value-type="float">
            <text:p>52.5428571428571</text:p>
          </table:table-cell>
        </table:table-row>
        <table:table-row table:style-name="ro1">
          <table:table-cell office:value-type="float" office:value="18.3478260869565" calcext:value-type="float">
            <text:p>18.3478260869565</text:p>
          </table:table-cell>
          <table:table-cell/>
          <table:table-cell office:value-type="float" office:value="52.5454545454546" calcext:value-type="float">
            <text:p>52.5454545454546</text:p>
          </table:table-cell>
        </table:table-row>
        <table:table-row table:style-name="ro1">
          <table:table-cell office:value-type="float" office:value="34.3636363636364" calcext:value-type="float">
            <text:p>34.3636363636364</text:p>
          </table:table-cell>
          <table:table-cell/>
          <table:table-cell office:value-type="float" office:value="52.5454545454546" calcext:value-type="float">
            <text:p>52.5454545454546</text:p>
          </table:table-cell>
        </table:table-row>
        <table:table-row table:style-name="ro1">
          <table:table-cell office:value-type="float" office:value="48.0909090909091" calcext:value-type="float">
            <text:p>48.0909090909091</text:p>
          </table:table-cell>
          <table:table-cell/>
          <table:table-cell office:value-type="float" office:value="52.5454545454546" calcext:value-type="float">
            <text:p>52.5454545454546</text:p>
          </table:table-cell>
        </table:table-row>
        <table:table-row table:style-name="ro1">
          <table:table-cell office:value-type="float" office:value="63.0555555555556" calcext:value-type="float">
            <text:p>63.0555555555556</text:p>
          </table:table-cell>
          <table:table-cell/>
          <table:table-cell office:value-type="float" office:value="52.5833333333333" calcext:value-type="float">
            <text:p>52.5833333333333</text:p>
          </table:table-cell>
        </table:table-row>
        <table:table-row table:style-name="ro1">
          <table:table-cell office:value-type="float" office:value="30.53125" calcext:value-type="float">
            <text:p>30.53125</text:p>
          </table:table-cell>
          <table:table-cell/>
          <table:table-cell office:value-type="float" office:value="52.622641509434" calcext:value-type="float">
            <text:p>52.622641509434</text:p>
          </table:table-cell>
        </table:table-row>
        <table:table-row table:style-name="ro1">
          <table:table-cell office:value-type="float" office:value="48.078431372549" calcext:value-type="float">
            <text:p>48.078431372549</text:p>
          </table:table-cell>
          <table:table-cell/>
          <table:table-cell office:value-type="float" office:value="52.6315789473684" calcext:value-type="float">
            <text:p>52.6315789473684</text:p>
          </table:table-cell>
        </table:table-row>
        <table:table-row table:style-name="ro1">
          <table:table-cell office:value-type="float" office:value="42.2380952380952" calcext:value-type="float">
            <text:p>42.2380952380952</text:p>
          </table:table-cell>
          <table:table-cell/>
          <table:table-cell office:value-type="float" office:value="52.6333333333333" calcext:value-type="float">
            <text:p>52.6333333333333</text:p>
          </table:table-cell>
        </table:table-row>
        <table:table-row table:style-name="ro1">
          <table:table-cell office:value-type="float" office:value="59.8333333333333" calcext:value-type="float">
            <text:p>59.8333333333333</text:p>
          </table:table-cell>
          <table:table-cell/>
          <table:table-cell office:value-type="float" office:value="52.6818181818182" calcext:value-type="float">
            <text:p>52.6818181818182</text:p>
          </table:table-cell>
        </table:table-row>
        <table:table-row table:style-name="ro1">
          <table:table-cell office:value-type="float" office:value="45.9090909090909" calcext:value-type="float">
            <text:p>45.9090909090909</text:p>
          </table:table-cell>
          <table:table-cell/>
          <table:table-cell office:value-type="float" office:value="52.7037037037037" calcext:value-type="float">
            <text:p>52.7037037037037</text:p>
          </table:table-cell>
        </table:table-row>
        <table:table-row table:style-name="ro1">
          <table:table-cell office:value-type="float" office:value="56.5342465753425" calcext:value-type="float">
            <text:p>56.5342465753425</text:p>
          </table:table-cell>
          <table:table-cell/>
          <table:table-cell office:value-type="float" office:value="52.741935483871" calcext:value-type="float">
            <text:p>52.741935483871</text:p>
          </table:table-cell>
        </table:table-row>
        <table:table-row table:style-name="ro1">
          <table:table-cell office:value-type="float" office:value="30.3728813559322" calcext:value-type="float">
            <text:p>30.3728813559322</text:p>
          </table:table-cell>
          <table:table-cell/>
          <table:table-cell office:value-type="float" office:value="52.76" calcext:value-type="float">
            <text:p>52.76</text:p>
          </table:table-cell>
        </table:table-row>
        <table:table-row table:style-name="ro1">
          <table:table-cell office:value-type="float" office:value="32.953488372093" calcext:value-type="float">
            <text:p>32.953488372093</text:p>
          </table:table-cell>
          <table:table-cell/>
          <table:table-cell office:value-type="float" office:value="52.7619047619048" calcext:value-type="float">
            <text:p>52.7619047619048</text:p>
          </table:table-cell>
        </table:table-row>
        <table:table-row table:style-name="ro1">
          <table:table-cell office:value-type="float" office:value="45.9333333333333" calcext:value-type="float">
            <text:p>45.9333333333333</text:p>
          </table:table-cell>
          <table:table-cell/>
          <table:table-cell office:value-type="float" office:value="52.7777777777778" calcext:value-type="float">
            <text:p>52.777777777777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/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/>
          <table:table-cell office:value-type="float" office:value="52.8181818181818" calcext:value-type="float">
            <text:p>52.8181818181818</text:p>
          </table:table-cell>
        </table:table-row>
        <table:table-row table:style-name="ro1">
          <table:table-cell office:value-type="float" office:value="58.6521739130435" calcext:value-type="float">
            <text:p>58.6521739130435</text:p>
          </table:table-cell>
          <table:table-cell/>
          <table:table-cell office:value-type="float" office:value="52.875" calcext:value-type="float">
            <text:p>52.875</text:p>
          </table:table-cell>
        </table:table-row>
        <table:table-row table:style-name="ro1">
          <table:table-cell office:value-type="float" office:value="46.0476190476191" calcext:value-type="float">
            <text:p>46.0476190476191</text:p>
          </table:table-cell>
          <table:table-cell/>
          <table:table-cell office:value-type="float" office:value="52.88" calcext:value-type="float">
            <text:p>52.88</text:p>
          </table:table-cell>
        </table:table-row>
        <table:table-row table:style-name="ro1">
          <table:table-cell office:value-type="float" office:value="36.0454545454545" calcext:value-type="float">
            <text:p>36.0454545454545</text:p>
          </table:table-cell>
          <table:table-cell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43.1071428571429" calcext:value-type="float">
            <text:p>43.1071428571429</text:p>
          </table:table-cell>
          <table:table-cell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53.9333333333333" calcext:value-type="float">
            <text:p>53.9333333333333</text:p>
          </table:table-cell>
          <table:table-cell/>
          <table:table-cell office:value-type="float" office:value="52.9024390243903" calcext:value-type="float">
            <text:p>52.9024390243903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/>
          <table:table-cell office:value-type="float" office:value="52.9047619047619" calcext:value-type="float">
            <text:p>52.9047619047619</text:p>
          </table:table-cell>
        </table:table-row>
        <table:table-row table:style-name="ro1">
          <table:table-cell office:value-type="float" office:value="33.8461538461538" calcext:value-type="float">
            <text:p>33.8461538461538</text:p>
          </table:table-cell>
          <table:table-cell/>
          <table:table-cell office:value-type="float" office:value="52.9090909090909" calcext:value-type="float">
            <text:p>52.9090909090909</text:p>
          </table:table-cell>
        </table:table-row>
        <table:table-row table:style-name="ro1">
          <table:table-cell office:value-type="float" office:value="83.3846153846154" calcext:value-type="float">
            <text:p>83.3846153846154</text:p>
          </table:table-cell>
          <table:table-cell/>
          <table:table-cell office:value-type="float" office:value="52.925" calcext:value-type="float">
            <text:p>52.925</text:p>
          </table:table-cell>
        </table:table-row>
        <table:table-row table:style-name="ro1">
          <table:table-cell office:value-type="float" office:value="43.8823529411765" calcext:value-type="float">
            <text:p>43.8823529411765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.2666666666667" calcext:value-type="float">
            <text:p>58.2666666666667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.2307692307692" calcext:value-type="float">
            <text:p>66.2307692307692</text:p>
          </table:table-cell>
          <table:table-cell/>
          <table:table-cell office:value-type="float" office:value="53.0222222222222" calcext:value-type="float">
            <text:p>53.022222222222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/>
          <table:table-cell office:value-type="float" office:value="53.0434782608696" calcext:value-type="float">
            <text:p>53.0434782608696</text:p>
          </table:table-cell>
        </table:table-row>
        <table:table-row table:style-name="ro1">
          <table:table-cell office:value-type="float" office:value="50.4651162790698" calcext:value-type="float">
            <text:p>50.4651162790698</text:p>
          </table:table-cell>
          <table:table-cell/>
          <table:table-cell office:value-type="float" office:value="53.0487804878049" calcext:value-type="float">
            <text:p>53.0487804878049</text:p>
          </table:table-cell>
        </table:table-row>
        <table:table-row table:style-name="ro1">
          <table:table-cell office:value-type="float" office:value="51.84" calcext:value-type="float">
            <text:p>51.84</text:p>
          </table:table-cell>
          <table:table-cell/>
          <table:table-cell office:value-type="float" office:value="53.0555555555556" calcext:value-type="float">
            <text:p>53.0555555555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3.0909090909091" calcext:value-type="float">
            <text:p>53.0909090909091</text:p>
          </table:table-cell>
        </table:table-row>
        <table:table-row table:style-name="ro1">
          <table:table-cell office:value-type="float" office:value="40.2413793103448" calcext:value-type="float">
            <text:p>40.2413793103448</text:p>
          </table:table-cell>
          <table:table-cell/>
          <table:table-cell office:value-type="float" office:value="53.0909090909091" calcext:value-type="float">
            <text:p>53.0909090909091</text:p>
          </table:table-cell>
        </table:table-row>
        <table:table-row table:style-name="ro1">
          <table:table-cell office:value-type="float" office:value="66.1363636363636" calcext:value-type="float">
            <text:p>66.1363636363636</text:p>
          </table:table-cell>
          <table:table-cell/>
          <table:table-cell office:value-type="float" office:value="53.0952380952381" calcext:value-type="float">
            <text:p>53.0952380952381</text:p>
          </table:table-cell>
        </table:table-row>
        <table:table-row table:style-name="ro1">
          <table:table-cell office:value-type="float" office:value="37.2916666666667" calcext:value-type="float">
            <text:p>37.2916666666667</text:p>
          </table:table-cell>
          <table:table-cell/>
          <table:table-cell office:value-type="float" office:value="53.1086956521739" calcext:value-type="float">
            <text:p>53.1086956521739</text:p>
          </table:table-cell>
        </table:table-row>
        <table:table-row table:style-name="ro1">
          <table:table-cell office:value-type="float" office:value="43.3913043478261" calcext:value-type="float">
            <text:p>43.3913043478261</text:p>
          </table:table-cell>
          <table:table-cell/>
          <table:table-cell office:value-type="float" office:value="53.1304347826087" calcext:value-type="float">
            <text:p>53.1304347826087</text:p>
          </table:table-cell>
        </table:table-row>
        <table:table-row table:style-name="ro1">
          <table:table-cell office:value-type="float" office:value="40.6410256410256" calcext:value-type="float">
            <text:p>40.6410256410256</text:p>
          </table:table-cell>
          <table:table-cell/>
          <table:table-cell office:value-type="float" office:value="53.1363636363636" calcext:value-type="float">
            <text:p>53.1363636363636</text:p>
          </table:table-cell>
        </table:table-row>
        <table:table-row table:style-name="ro1">
          <table:table-cell office:value-type="float" office:value="65.5454545454546" calcext:value-type="float">
            <text:p>65.5454545454546</text:p>
          </table:table-cell>
          <table:table-cell/>
          <table:table-cell office:value-type="float" office:value="53.1374045801527" calcext:value-type="float">
            <text:p>53.1374045801527</text:p>
          </table:table-cell>
        </table:table-row>
        <table:table-row table:style-name="ro1">
          <table:table-cell office:value-type="float" office:value="35.2727272727273" calcext:value-type="float">
            <text:p>35.2727272727273</text:p>
          </table:table-cell>
          <table:table-cell/>
          <table:table-cell office:value-type="float" office:value="53.1388888888889" calcext:value-type="float">
            <text:p>53.1388888888889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/>
          <table:table-cell office:value-type="float" office:value="53.1515151515151" calcext:value-type="float">
            <text:p>53.1515151515151</text:p>
          </table:table-cell>
        </table:table-row>
        <table:table-row table:style-name="ro1">
          <table:table-cell office:value-type="float" office:value="77.5714285714286" calcext:value-type="float">
            <text:p>77.5714285714286</text:p>
          </table:table-cell>
          <table:table-cell/>
          <table:table-cell office:value-type="float" office:value="53.1578947368421" calcext:value-type="float">
            <text:p>53.1578947368421</text:p>
          </table:table-cell>
        </table:table-row>
        <table:table-row table:style-name="ro1">
          <table:table-cell office:value-type="float" office:value="47.4571428571429" calcext:value-type="float">
            <text:p>47.4571428571429</text:p>
          </table:table-cell>
          <table:table-cell/>
          <table:table-cell office:value-type="float" office:value="53.1746031746032" calcext:value-type="float">
            <text:p>53.174603174603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/>
          <table:table-cell office:value-type="float" office:value="53.1851851851852" calcext:value-type="float">
            <text:p>53.1851851851852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/>
          <table:table-cell office:value-type="float" office:value="53.2142857142857" calcext:value-type="float">
            <text:p>53.2142857142857</text:p>
          </table:table-cell>
        </table:table-row>
        <table:table-row table:style-name="ro1">
          <table:table-cell office:value-type="float" office:value="45.4146341463415" calcext:value-type="float">
            <text:p>45.4146341463415</text:p>
          </table:table-cell>
          <table:table-cell/>
          <table:table-cell office:value-type="float" office:value="53.2222222222222" calcext:value-type="float">
            <text:p>53.2222222222222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/>
          <table:table-cell office:value-type="float" office:value="53.2222222222222" calcext:value-type="float">
            <text:p>53.2222222222222</text:p>
          </table:table-cell>
        </table:table-row>
        <table:table-row table:style-name="ro1">
          <table:table-cell office:value-type="float" office:value="16.0677966101695" calcext:value-type="float">
            <text:p>16.0677966101695</text:p>
          </table:table-cell>
          <table:table-cell/>
          <table:table-cell office:value-type="float" office:value="53.2258064516129" calcext:value-type="float">
            <text:p>53.2258064516129</text:p>
          </table:table-cell>
        </table:table-row>
        <table:table-row table:style-name="ro1">
          <table:table-cell office:value-type="float" office:value="48.2897196261682" calcext:value-type="float">
            <text:p>48.2897196261682</text:p>
          </table:table-cell>
          <table:table-cell/>
          <table:table-cell office:value-type="float" office:value="53.2317073170732" calcext:value-type="float">
            <text:p>53.231707317073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/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/>
          <table:table-cell office:value-type="float" office:value="53.2537313432836" calcext:value-type="float">
            <text:p>53.2537313432836</text:p>
          </table:table-cell>
        </table:table-row>
        <table:table-row table:style-name="ro1">
          <table:table-cell office:value-type="float" office:value="51.8405797101449" calcext:value-type="float">
            <text:p>51.8405797101449</text:p>
          </table:table-cell>
          <table:table-cell/>
          <table:table-cell office:value-type="float" office:value="53.2608695652174" calcext:value-type="float">
            <text:p>53.2608695652174</text:p>
          </table:table-cell>
        </table:table-row>
        <table:table-row table:style-name="ro1">
          <table:table-cell office:value-type="float" office:value="68.0909090909091" calcext:value-type="float">
            <text:p>68.0909090909091</text:p>
          </table:table-cell>
          <table:table-cell/>
          <table:table-cell office:value-type="float" office:value="53.2682926829268" calcext:value-type="float">
            <text:p>53.2682926829268</text:p>
          </table:table-cell>
        </table:table-row>
        <table:table-row table:style-name="ro1">
          <table:table-cell office:value-type="float" office:value="24.1025641025641" calcext:value-type="float">
            <text:p>24.1025641025641</text:p>
          </table:table-cell>
          <table:table-cell/>
          <table:table-cell office:value-type="float" office:value="53.28125" calcext:value-type="float">
            <text:p>53.28125</text:p>
          </table:table-cell>
        </table:table-row>
        <table:table-row table:style-name="ro1">
          <table:table-cell office:value-type="float" office:value="68.1764705882353" calcext:value-type="float">
            <text:p>68.1764705882353</text:p>
          </table:table-cell>
          <table:table-cell/>
          <table:table-cell office:value-type="float" office:value="53.32" calcext:value-type="float">
            <text:p>53.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 office:value-type="float" office:value="51.0625" calcext:value-type="float">
            <text:p>51.0625</text:p>
          </table:table-cell>
          <table:table-cell/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 office:value-type="float" office:value="46.9473684210526" calcext:value-type="float">
            <text:p>46.9473684210526</text:p>
          </table:table-cell>
          <table:table-cell/>
          <table:table-cell office:value-type="float" office:value="53.34" calcext:value-type="float">
            <text:p>53.34</text:p>
          </table:table-cell>
        </table:table-row>
        <table:table-row table:style-name="ro1">
          <table:table-cell office:value-type="float" office:value="90.75" calcext:value-type="float">
            <text:p>90.75</text:p>
          </table:table-cell>
          <table:table-cell/>
          <table:table-cell office:value-type="float" office:value="53.3461538461538" calcext:value-type="float">
            <text:p>53.3461538461538</text:p>
          </table:table-cell>
        </table:table-row>
        <table:table-row table:style-name="ro1">
          <table:table-cell office:value-type="float" office:value="67.6666666666667" calcext:value-type="float">
            <text:p>67.6666666666667</text:p>
          </table:table-cell>
          <table:table-cell/>
          <table:table-cell office:value-type="float" office:value="53.3548387096774" calcext:value-type="float">
            <text:p>53.3548387096774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/>
          <table:table-cell office:value-type="float" office:value="53.3636363636364" calcext:value-type="float">
            <text:p>53.363636363636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/>
          <table:table-cell office:value-type="float" office:value="53.3666666666667" calcext:value-type="float">
            <text:p>53.3666666666667</text:p>
          </table:table-cell>
        </table:table-row>
        <table:table-row table:style-name="ro1">
          <table:table-cell office:value-type="float" office:value="60.6363636363636" calcext:value-type="float">
            <text:p>60.6363636363636</text:p>
          </table:table-cell>
          <table:table-cell/>
          <table:table-cell office:value-type="float" office:value="53.4090909090909" calcext:value-type="float">
            <text:p>53.4090909090909</text:p>
          </table:table-cell>
        </table:table-row>
        <table:table-row table:style-name="ro1">
          <table:table-cell office:value-type="float" office:value="45.7391304347826" calcext:value-type="float">
            <text:p>45.7391304347826</text:p>
          </table:table-cell>
          <table:table-cell/>
          <table:table-cell office:value-type="float" office:value="53.4181818181818" calcext:value-type="float">
            <text:p>53.4181818181818</text:p>
          </table:table-cell>
        </table:table-row>
        <table:table-row table:style-name="ro1">
          <table:table-cell office:value-type="float" office:value="25.6352941176471" calcext:value-type="float">
            <text:p>25.6352941176471</text:p>
          </table:table-cell>
          <table:table-cell/>
          <table:table-cell office:value-type="float" office:value="53.4183673469388" calcext:value-type="float">
            <text:p>53.4183673469388</text:p>
          </table:table-cell>
        </table:table-row>
        <table:table-row table:style-name="ro1">
          <table:table-cell office:value-type="float" office:value="52.5454545454546" calcext:value-type="float">
            <text:p>52.5454545454546</text:p>
          </table:table-cell>
          <table:table-cell/>
          <table:table-cell office:value-type="float" office:value="53.4193548387097" calcext:value-type="float">
            <text:p>53.4193548387097</text:p>
          </table:table-cell>
        </table:table-row>
        <table:table-row table:style-name="ro1">
          <table:table-cell office:value-type="float" office:value="54.4814814814815" calcext:value-type="float">
            <text:p>54.4814814814815</text:p>
          </table:table-cell>
          <table:table-cell/>
          <table:table-cell office:value-type="float" office:value="53.4230769230769" calcext:value-type="float">
            <text:p>53.4230769230769</text:p>
          </table:table-cell>
        </table:table-row>
        <table:table-row table:style-name="ro1">
          <table:table-cell office:value-type="float" office:value="42.8181818181818" calcext:value-type="float">
            <text:p>42.8181818181818</text:p>
          </table:table-cell>
          <table:table-cell/>
          <table:table-cell office:value-type="float" office:value="53.4285714285714" calcext:value-type="float">
            <text:p>53.42857142857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3.4375" calcext:value-type="float">
            <text:p>53.43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.4375" calcext:value-type="float">
            <text:p>53.4375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/>
          <table:table-cell office:value-type="float" office:value="53.45" calcext:value-type="float">
            <text:p>53.45</text:p>
          </table:table-cell>
        </table:table-row>
        <table:table-row table:style-name="ro1">
          <table:table-cell office:value-type="float" office:value="92.75" calcext:value-type="float">
            <text:p>92.75</text:p>
          </table:table-cell>
          <table:table-cell/>
          <table:table-cell office:value-type="float" office:value="53.4545454545455" calcext:value-type="float">
            <text:p>53.4545454545455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/>
          <table:table-cell office:value-type="float" office:value="53.4594594594595" calcext:value-type="float">
            <text:p>53.4594594594595</text:p>
          </table:table-cell>
        </table:table-row>
        <table:table-row table:style-name="ro1">
          <table:table-cell office:value-type="float" office:value="43.7865168539326" calcext:value-type="float">
            <text:p>43.7865168539326</text:p>
          </table:table-cell>
          <table:table-cell/>
          <table:table-cell office:value-type="float" office:value="53.4838709677419" calcext:value-type="float">
            <text:p>53.4838709677419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/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60.5454545454546" calcext:value-type="float">
            <text:p>60.5454545454546</text:p>
          </table:table-cell>
          <table:table-cell/>
          <table:table-cell office:value-type="float" office:value="53.5294117647059" calcext:value-type="float">
            <text:p>53.5294117647059</text:p>
          </table:table-cell>
        </table:table-row>
        <table:table-row table:style-name="ro1">
          <table:table-cell office:value-type="float" office:value="60.6470588235294" calcext:value-type="float">
            <text:p>60.6470588235294</text:p>
          </table:table-cell>
          <table:table-cell/>
          <table:table-cell office:value-type="float" office:value="53.5454545454545" calcext:value-type="float">
            <text:p>53.5454545454545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/>
          <table:table-cell office:value-type="float" office:value="53.5555555555556" calcext:value-type="float">
            <text:p>53.5555555555556</text:p>
          </table:table-cell>
        </table:table-row>
        <table:table-row table:style-name="ro1">
          <table:table-cell office:value-type="float" office:value="38.047619047619" calcext:value-type="float">
            <text:p>38.047619047619</text:p>
          </table:table-cell>
          <table:table-cell/>
          <table:table-cell office:value-type="float" office:value="53.5583756345178" calcext:value-type="float">
            <text:p>53.5583756345178</text:p>
          </table:table-cell>
        </table:table-row>
        <table:table-row table:style-name="ro1">
          <table:table-cell office:value-type="float" office:value="57.2272727272727" calcext:value-type="float">
            <text:p>57.2272727272727</text:p>
          </table:table-cell>
          <table:table-cell/>
          <table:table-cell office:value-type="float" office:value="53.5625" calcext:value-type="float">
            <text:p>53.5625</text:p>
          </table:table-cell>
        </table:table-row>
        <table:table-row table:style-name="ro1">
          <table:table-cell office:value-type="float" office:value="54.8260869565217" calcext:value-type="float">
            <text:p>54.8260869565217</text:p>
          </table:table-cell>
          <table:table-cell/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33.4842767295597" calcext:value-type="float">
            <text:p>33.4842767295597</text:p>
          </table:table-cell>
          <table:table-cell/>
          <table:table-cell office:value-type="float" office:value="53.6578947368421" calcext:value-type="float">
            <text:p>53.6578947368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53.6666666666667" calcext:value-type="float">
            <text:p>53.6666666666667</text:p>
          </table:table-cell>
        </table:table-row>
        <table:table-row table:style-name="ro1">
          <table:table-cell office:value-type="float" office:value="78.6666666666667" calcext:value-type="float">
            <text:p>78.6666666666667</text:p>
          </table:table-cell>
          <table:table-cell/>
          <table:table-cell office:value-type="float" office:value="53.6666666666667" calcext:value-type="float">
            <text:p>53.6666666666667</text:p>
          </table:table-cell>
        </table:table-row>
        <table:table-row table:style-name="ro1">
          <table:table-cell office:value-type="float" office:value="72.2916666666667" calcext:value-type="float">
            <text:p>72.2916666666667</text:p>
          </table:table-cell>
          <table:table-cell/>
          <table:table-cell office:value-type="float" office:value="53.6818181818182" calcext:value-type="float">
            <text:p>53.68181818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3.695652173913" calcext:value-type="float">
            <text:p>53.695652173913</text:p>
          </table:table-cell>
        </table:table-row>
        <table:table-row table:style-name="ro1">
          <table:table-cell office:value-type="float" office:value="60.0263157894737" calcext:value-type="float">
            <text:p>60.0263157894737</text:p>
          </table:table-cell>
          <table:table-cell/>
          <table:table-cell office:value-type="float" office:value="53.7105263157895" calcext:value-type="float">
            <text:p>53.7105263157895</text:p>
          </table:table-cell>
        </table:table-row>
        <table:table-row table:style-name="ro1">
          <table:table-cell office:value-type="float" office:value="70.1176470588235" calcext:value-type="float">
            <text:p>70.1176470588235</text:p>
          </table:table-cell>
          <table:table-cell/>
          <table:table-cell office:value-type="float" office:value="53.7391304347826" calcext:value-type="float">
            <text:p>53.7391304347826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/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/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53.7619047619048" calcext:value-type="float">
            <text:p>53.76190476190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53.7692307692308" calcext:value-type="float">
            <text:p>53.7692307692308</text:p>
          </table:table-cell>
        </table:table-row>
        <table:table-row table:style-name="ro1">
          <table:table-cell office:value-type="float" office:value="47.1111111111111" calcext:value-type="float">
            <text:p>47.1111111111111</text:p>
          </table:table-cell>
          <table:table-cell/>
          <table:table-cell office:value-type="float" office:value="53.7894736842105" calcext:value-type="float">
            <text:p>53.78947368421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46.4666666666667" calcext:value-type="float">
            <text:p>46.4666666666667</text:p>
          </table:table-cell>
          <table:table-cell/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3.8095238095238" calcext:value-type="float">
            <text:p>53.8095238095238</text:p>
          </table:table-cell>
        </table:table-row>
        <table:table-row table:style-name="ro1">
          <table:table-cell office:value-type="float" office:value="75.5652173913043" calcext:value-type="float">
            <text:p>75.5652173913043</text:p>
          </table:table-cell>
          <table:table-cell/>
          <table:table-cell office:value-type="float" office:value="53.8421052631579" calcext:value-type="float">
            <text:p>53.8421052631579</text:p>
          </table:table-cell>
        </table:table-row>
        <table:table-row table:style-name="ro1">
          <table:table-cell office:value-type="float" office:value="21.6428571428571" calcext:value-type="float">
            <text:p>21.6428571428571</text:p>
          </table:table-cell>
          <table:table-cell/>
          <table:table-cell office:value-type="float" office:value="53.8636363636364" calcext:value-type="float">
            <text:p>53.8636363636364</text:p>
          </table:table-cell>
        </table:table-row>
        <table:table-row table:style-name="ro1">
          <table:table-cell office:value-type="float" office:value="44.9166666666667" calcext:value-type="float">
            <text:p>44.9166666666667</text:p>
          </table:table-cell>
          <table:table-cell/>
          <table:table-cell office:value-type="float" office:value="53.8823529411765" calcext:value-type="float">
            <text:p>53.8823529411765</text:p>
          </table:table-cell>
        </table:table-row>
        <table:table-row table:style-name="ro1">
          <table:table-cell office:value-type="float" office:value="40.3333333333333" calcext:value-type="float">
            <text:p>40.3333333333333</text:p>
          </table:table-cell>
          <table:table-cell/>
          <table:table-cell office:value-type="float" office:value="53.90625" calcext:value-type="float">
            <text:p>53.90625</text:p>
          </table:table-cell>
        </table:table-row>
        <table:table-row table:style-name="ro1">
          <table:table-cell office:value-type="float" office:value="64.7058823529412" calcext:value-type="float">
            <text:p>64.7058823529412</text:p>
          </table:table-cell>
          <table:table-cell/>
          <table:table-cell office:value-type="float" office:value="53.9090909090909" calcext:value-type="float">
            <text:p>53.9090909090909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/>
          <table:table-cell office:value-type="float" office:value="53.9166666666667" calcext:value-type="float">
            <text:p>53.9166666666667</text:p>
          </table:table-cell>
        </table:table-row>
        <table:table-row table:style-name="ro1">
          <table:table-cell office:value-type="float" office:value="68.3571428571429" calcext:value-type="float">
            <text:p>68.3571428571429</text:p>
          </table:table-cell>
          <table:table-cell/>
          <table:table-cell office:value-type="float" office:value="53.9333333333333" calcext:value-type="float">
            <text:p>53.9333333333333</text:p>
          </table:table-cell>
        </table:table-row>
        <table:table-row table:style-name="ro1">
          <table:table-cell office:value-type="float" office:value="15.8695652173913" calcext:value-type="float">
            <text:p>15.8695652173913</text:p>
          </table:table-cell>
          <table:table-cell/>
          <table:table-cell office:value-type="float" office:value="53.9622641509434" calcext:value-type="float">
            <text:p>53.9622641509434</text:p>
          </table:table-cell>
        </table:table-row>
        <table:table-row table:style-name="ro1">
          <table:table-cell office:value-type="float" office:value="51.8666666666667" calcext:value-type="float">
            <text:p>51.8666666666667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.2727272727273" calcext:value-type="float">
            <text:p>50.2727272727273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.3617021276596" calcext:value-type="float">
            <text:p>22.3617021276596</text:p>
          </table:table-cell>
          <table:table-cell/>
          <table:table-cell office:value-type="float" office:value="54.0714285714286" calcext:value-type="float">
            <text:p>54.0714285714286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/>
          <table:table-cell office:value-type="float" office:value="54.1071428571429" calcext:value-type="float">
            <text:p>54.1071428571429</text:p>
          </table:table-cell>
        </table:table-row>
        <table:table-row table:style-name="ro1">
          <table:table-cell office:value-type="float" office:value="46.8260869565217" calcext:value-type="float">
            <text:p>46.8260869565217</text:p>
          </table:table-cell>
          <table:table-cell/>
          <table:table-cell office:value-type="float" office:value="54.125" calcext:value-type="float">
            <text:p>54.125</text:p>
          </table:table-cell>
        </table:table-row>
        <table:table-row table:style-name="ro1">
          <table:table-cell office:value-type="float" office:value="33.8648648648649" calcext:value-type="float">
            <text:p>33.8648648648649</text:p>
          </table:table-cell>
          <table:table-cell/>
          <table:table-cell office:value-type="float" office:value="54.1304347826087" calcext:value-type="float">
            <text:p>54.1304347826087</text:p>
          </table:table-cell>
        </table:table-row>
        <table:table-row table:style-name="ro1">
          <table:table-cell office:value-type="float" office:value="48.1818181818182" calcext:value-type="float">
            <text:p>48.1818181818182</text:p>
          </table:table-cell>
          <table:table-cell/>
          <table:table-cell office:value-type="float" office:value="54.1428571428571" calcext:value-type="float">
            <text:p>54.1428571428571</text:p>
          </table:table-cell>
        </table:table-row>
        <table:table-row table:style-name="ro1">
          <table:table-cell office:value-type="float" office:value="66.304347826087" calcext:value-type="float">
            <text:p>66.304347826087</text:p>
          </table:table-cell>
          <table:table-cell/>
          <table:table-cell office:value-type="float" office:value="54.1621621621622" calcext:value-type="float">
            <text:p>54.1621621621622</text:p>
          </table:table-cell>
        </table:table-row>
        <table:table-row table:style-name="ro1">
          <table:table-cell office:value-type="float" office:value="66.5652173913044" calcext:value-type="float">
            <text:p>66.5652173913044</text:p>
          </table:table-cell>
          <table:table-cell/>
          <table:table-cell office:value-type="float" office:value="54.1666666666667" calcext:value-type="float">
            <text:p>54.1666666666667</text:p>
          </table:table-cell>
        </table:table-row>
        <table:table-row table:style-name="ro1">
          <table:table-cell office:value-type="float" office:value="65.7916666666667" calcext:value-type="float">
            <text:p>65.7916666666667</text:p>
          </table:table-cell>
          <table:table-cell/>
          <table:table-cell office:value-type="float" office:value="54.1752577319588" calcext:value-type="float">
            <text:p>54.1752577319588</text:p>
          </table:table-cell>
        </table:table-row>
        <table:table-row table:style-name="ro1">
          <table:table-cell office:value-type="float" office:value="48.4375" calcext:value-type="float">
            <text:p>48.4375</text:p>
          </table:table-cell>
          <table:table-cell/>
          <table:table-cell office:value-type="float" office:value="54.1875" calcext:value-type="float">
            <text:p>54.1875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/>
          <table:table-cell office:value-type="float" office:value="54.2272727272727" calcext:value-type="float">
            <text:p>54.2272727272727</text:p>
          </table:table-cell>
        </table:table-row>
        <table:table-row table:style-name="ro1">
          <table:table-cell office:value-type="float" office:value="67.85" calcext:value-type="float">
            <text:p>67.85</text:p>
          </table:table-cell>
          <table:table-cell/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54.2631578947368" calcext:value-type="float">
            <text:p>54.2631578947368</text:p>
          </table:table-cell>
        </table:table-row>
        <table:table-row table:style-name="ro1">
          <table:table-cell office:value-type="float" office:value="61.6195652173913" calcext:value-type="float">
            <text:p>61.6195652173913</text:p>
          </table:table-cell>
          <table:table-cell/>
          <table:table-cell office:value-type="float" office:value="54.2857142857143" calcext:value-type="float">
            <text:p>54.285714285714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/>
          <table:table-cell office:value-type="float" office:value="54.3023255813954" calcext:value-type="float">
            <text:p>54.3023255813954</text:p>
          </table:table-cell>
        </table:table-row>
        <table:table-row table:style-name="ro1">
          <table:table-cell office:value-type="float" office:value="36.46875" calcext:value-type="float">
            <text:p>36.46875</text:p>
          </table:table-cell>
          <table:table-cell/>
          <table:table-cell office:value-type="float" office:value="54.3035714285714" calcext:value-type="float">
            <text:p>54.3035714285714</text:p>
          </table:table-cell>
        </table:table-row>
        <table:table-row table:style-name="ro1">
          <table:table-cell office:value-type="float" office:value="67.6666666666667" calcext:value-type="float">
            <text:p>67.6666666666667</text:p>
          </table:table-cell>
          <table:table-cell/>
          <table:table-cell office:value-type="float" office:value="54.3181818181818" calcext:value-type="float">
            <text:p>54.3181818181818</text:p>
          </table:table-cell>
        </table:table-row>
        <table:table-row table:style-name="ro1">
          <table:table-cell office:value-type="float" office:value="61.8095238095238" calcext:value-type="float">
            <text:p>61.8095238095238</text:p>
          </table:table-cell>
          <table:table-cell/>
          <table:table-cell office:value-type="float" office:value="54.3333333333333" calcext:value-type="float">
            <text:p>54.3333333333333</text:p>
          </table:table-cell>
        </table:table-row>
        <table:table-row table:style-name="ro1">
          <table:table-cell office:value-type="float" office:value="79.4666666666667" calcext:value-type="float">
            <text:p>79.4666666666667</text:p>
          </table:table-cell>
          <table:table-cell/>
          <table:table-cell office:value-type="float" office:value="54.35" calcext:value-type="float">
            <text:p>54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54.3571428571429" calcext:value-type="float">
            <text:p>54.3571428571429</text:p>
          </table:table-cell>
        </table:table-row>
        <table:table-row table:style-name="ro1">
          <table:table-cell office:value-type="float" office:value="53.5583756345178" calcext:value-type="float">
            <text:p>53.5583756345178</text:p>
          </table:table-cell>
          <table:table-cell/>
          <table:table-cell office:value-type="float" office:value="54.375" calcext:value-type="float">
            <text:p>54.3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.3827160493827" calcext:value-type="float">
            <text:p>54.3827160493827</text:p>
          </table:table-cell>
        </table:table-row>
        <table:table-row table:style-name="ro1">
          <table:table-cell office:value-type="float" office:value="51.1818181818182" calcext:value-type="float">
            <text:p>51.1818181818182</text:p>
          </table:table-cell>
          <table:table-cell/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51.8333333333333" calcext:value-type="float">
            <text:p>51.8333333333333</text:p>
          </table:table-cell>
          <table:table-cell/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/>
          <table:table-cell office:value-type="float" office:value="54.4166666666667" calcext:value-type="float">
            <text:p>54.4166666666667</text:p>
          </table:table-cell>
        </table:table-row>
        <table:table-row table:style-name="ro1">
          <table:table-cell office:value-type="float" office:value="56.5882352941176" calcext:value-type="float">
            <text:p>56.5882352941176</text:p>
          </table:table-cell>
          <table:table-cell/>
          <table:table-cell office:value-type="float" office:value="54.4545454545455" calcext:value-type="float">
            <text:p>54.4545454545455</text:p>
          </table:table-cell>
        </table:table-row>
        <table:table-row table:style-name="ro1">
          <table:table-cell office:value-type="float" office:value="66.2173913043478" calcext:value-type="float">
            <text:p>66.2173913043478</text:p>
          </table:table-cell>
          <table:table-cell/>
          <table:table-cell office:value-type="float" office:value="54.4814814814815" calcext:value-type="float">
            <text:p>54.4814814814815</text:p>
          </table:table-cell>
        </table:table-row>
        <table:table-row table:style-name="ro1">
          <table:table-cell office:value-type="float" office:value="54.1875" calcext:value-type="float">
            <text:p>54.1875</text:p>
          </table:table-cell>
          <table:table-cell/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3.9166666666667" calcext:value-type="float">
            <text:p>53.9166666666667</text:p>
          </table:table-cell>
          <table:table-cell/>
          <table:table-cell office:value-type="float" office:value="54.5238095238095" calcext:value-type="float">
            <text:p>54.5238095238095</text:p>
          </table:table-cell>
        </table:table-row>
        <table:table-row table:style-name="ro1">
          <table:table-cell office:value-type="float" office:value="44.6666666666667" calcext:value-type="float">
            <text:p>44.6666666666667</text:p>
          </table:table-cell>
          <table:table-cell/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float" office:value="47.8846153846154" calcext:value-type="float">
            <text:p>47.8846153846154</text:p>
          </table:table-cell>
          <table:table-cell/>
          <table:table-cell office:value-type="float" office:value="54.5882352941177" calcext:value-type="float">
            <text:p>54.5882352941177</text:p>
          </table:table-cell>
        </table:table-row>
        <table:table-row table:style-name="ro1">
          <table:table-cell office:value-type="float" office:value="69.2307692307692" calcext:value-type="float">
            <text:p>69.2307692307692</text:p>
          </table:table-cell>
          <table:table-cell/>
          <table:table-cell office:value-type="float" office:value="54.6363636363636" calcext:value-type="float">
            <text:p>54.6363636363636</text:p>
          </table:table-cell>
        </table:table-row>
        <table:table-row table:style-name="ro1">
          <table:table-cell office:value-type="float" office:value="19.9261744966443" calcext:value-type="float">
            <text:p>19.9261744966443</text:p>
          </table:table-cell>
          <table:table-cell/>
          <table:table-cell office:value-type="float" office:value="54.65" calcext:value-type="float">
            <text:p>54.65</text:p>
          </table:table-cell>
        </table:table-row>
        <table:table-row table:style-name="ro1">
          <table:table-cell office:value-type="float" office:value="58.2173913043478" calcext:value-type="float">
            <text:p>58.2173913043478</text:p>
          </table:table-cell>
          <table:table-cell/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float" office:value="60.3076923076923" calcext:value-type="float">
            <text:p>60.3076923076923</text:p>
          </table:table-cell>
          <table:table-cell/>
          <table:table-cell office:value-type="float" office:value="54.675" calcext:value-type="float">
            <text:p>54.675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/>
          <table:table-cell office:value-type="float" office:value="54.68" calcext:value-type="float">
            <text:p>54.68</text:p>
          </table:table-cell>
        </table:table-row>
        <table:table-row table:style-name="ro1">
          <table:table-cell office:value-type="float" office:value="83.5555555555556" calcext:value-type="float">
            <text:p>83.5555555555556</text:p>
          </table:table-cell>
          <table:table-cell/>
          <table:table-cell office:value-type="float" office:value="54.7037037037037" calcext:value-type="float">
            <text:p>54.7037037037037</text:p>
          </table:table-cell>
        </table:table-row>
        <table:table-row table:style-name="ro1">
          <table:table-cell office:value-type="float" office:value="54.1752577319588" calcext:value-type="float">
            <text:p>54.1752577319588</text:p>
          </table:table-cell>
          <table:table-cell/>
          <table:table-cell office:value-type="float" office:value="54.7142857142857" calcext:value-type="float">
            <text:p>54.7142857142857</text:p>
          </table:table-cell>
        </table:table-row>
        <table:table-row table:style-name="ro1">
          <table:table-cell office:value-type="float" office:value="29.8421052631579" calcext:value-type="float">
            <text:p>29.8421052631579</text:p>
          </table:table-cell>
          <table:table-cell/>
          <table:table-cell office:value-type="float" office:value="54.7407407407407" calcext:value-type="float">
            <text:p>54.740740740740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/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/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4.7727272727273" calcext:value-type="float">
            <text:p>54.77272727272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4.804347826087" calcext:value-type="float">
            <text:p>54.804347826087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/>
          <table:table-cell office:value-type="float" office:value="54.8181818181818" calcext:value-type="float">
            <text:p>54.8181818181818</text:p>
          </table:table-cell>
        </table:table-row>
        <table:table-row table:style-name="ro1">
          <table:table-cell office:value-type="float" office:value="73.2857142857143" calcext:value-type="float">
            <text:p>73.2857142857143</text:p>
          </table:table-cell>
          <table:table-cell/>
          <table:table-cell office:value-type="float" office:value="54.8260869565217" calcext:value-type="float">
            <text:p>54.8260869565217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/>
          <table:table-cell office:value-type="float" office:value="54.8571428571429" calcext:value-type="float">
            <text:p>54.8571428571429</text:p>
          </table:table-cell>
        </table:table-row>
        <table:table-row table:style-name="ro1">
          <table:table-cell office:value-type="float" office:value="53.8823529411765" calcext:value-type="float">
            <text:p>53.8823529411765</text:p>
          </table:table-cell>
          <table:table-cell/>
          <table:table-cell office:value-type="float" office:value="54.8636363636364" calcext:value-type="float">
            <text:p>54.8636363636364</text:p>
          </table:table-cell>
        </table:table-row>
        <table:table-row table:style-name="ro1">
          <table:table-cell office:value-type="float" office:value="55.8461538461538" calcext:value-type="float">
            <text:p>55.8461538461538</text:p>
          </table:table-cell>
          <table:table-cell/>
          <table:table-cell office:value-type="float" office:value="54.8709677419355" calcext:value-type="float">
            <text:p>54.87096774193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65.5833333333333" calcext:value-type="float">
            <text:p>65.5833333333333</text:p>
          </table:table-cell>
          <table:table-cell/>
          <table:table-cell office:value-type="float" office:value="54.9259259259259" calcext:value-type="float">
            <text:p>54.9259259259259</text:p>
          </table:table-cell>
        </table:table-row>
        <table:table-row table:style-name="ro1">
          <table:table-cell office:value-type="float" office:value="66.6666666666667" calcext:value-type="float">
            <text:p>66.6666666666667</text:p>
          </table:table-cell>
          <table:table-cell/>
          <table:table-cell office:value-type="float" office:value="55.025" calcext:value-type="float">
            <text:p>55.025</text:p>
          </table:table-cell>
        </table:table-row>
        <table:table-row table:style-name="ro1">
          <table:table-cell office:value-type="float" office:value="67.5789473684211" calcext:value-type="float">
            <text:p>67.5789473684211</text:p>
          </table:table-cell>
          <table:table-cell/>
          <table:table-cell office:value-type="float" office:value="55.0666666666667" calcext:value-type="float">
            <text:p>55.0666666666667</text:p>
          </table:table-cell>
        </table:table-row>
        <table:table-row table:style-name="ro1">
          <table:table-cell office:value-type="float" office:value="75.3846153846154" calcext:value-type="float">
            <text:p>75.3846153846154</text:p>
          </table:table-cell>
          <table:table-cell/>
          <table:table-cell office:value-type="float" office:value="55.0769230769231" calcext:value-type="float">
            <text:p>55.0769230769231</text:p>
          </table:table-cell>
        </table:table-row>
        <table:table-row table:style-name="ro1">
          <table:table-cell office:value-type="float" office:value="14.7014925373134" calcext:value-type="float">
            <text:p>14.7014925373134</text:p>
          </table:table-cell>
          <table:table-cell/>
          <table:table-cell office:value-type="float" office:value="55.1176470588235" calcext:value-type="float">
            <text:p>55.11764705882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5.1428571428571" calcext:value-type="float">
            <text:p>55.1428571428571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/>
          <table:table-cell office:value-type="float" office:value="55.1818181818182" calcext:value-type="float">
            <text:p>55.1818181818182</text:p>
          </table:table-cell>
        </table:table-row>
        <table:table-row table:style-name="ro1">
          <table:table-cell office:value-type="float" office:value="44.9047619047619" calcext:value-type="float">
            <text:p>44.9047619047619</text:p>
          </table:table-cell>
          <table:table-cell/>
          <table:table-cell office:value-type="float" office:value="55.2068965517241" calcext:value-type="float">
            <text:p>55.2068965517241</text:p>
          </table:table-cell>
        </table:table-row>
        <table:table-row table:style-name="ro1">
          <table:table-cell office:value-type="float" office:value="52.4444444444444" calcext:value-type="float">
            <text:p>52.4444444444444</text:p>
          </table:table-cell>
          <table:table-cell/>
          <table:table-cell office:value-type="float" office:value="55.2083333333333" calcext:value-type="float">
            <text:p>55.2083333333333</text:p>
          </table:table-cell>
        </table:table-row>
        <table:table-row table:style-name="ro1">
          <table:table-cell office:value-type="float" office:value="60.8666666666667" calcext:value-type="float">
            <text:p>60.8666666666667</text:p>
          </table:table-cell>
          <table:table-cell/>
          <table:table-cell office:value-type="float" office:value="55.214953271028" calcext:value-type="float">
            <text:p>55.214953271028</text:p>
          </table:table-cell>
        </table:table-row>
        <table:table-row table:style-name="ro1">
          <table:table-cell office:value-type="float" office:value="54.3023255813954" calcext:value-type="float">
            <text:p>54.3023255813954</text:p>
          </table:table-cell>
          <table:table-cell/>
          <table:table-cell office:value-type="float" office:value="55.2272727272727" calcext:value-type="float">
            <text:p>55.2272727272727</text:p>
          </table:table-cell>
        </table:table-row>
        <table:table-row table:style-name="ro1">
          <table:table-cell office:value-type="float" office:value="41.4179104477612" calcext:value-type="float">
            <text:p>41.4179104477612</text:p>
          </table:table-cell>
          <table:table-cell/>
          <table:table-cell office:value-type="float" office:value="55.2307692307692" calcext:value-type="float">
            <text:p>55.2307692307692</text:p>
          </table:table-cell>
        </table:table-row>
        <table:table-row table:style-name="ro1">
          <table:table-cell office:value-type="float" office:value="46.1860465116279" calcext:value-type="float">
            <text:p>46.1860465116279</text:p>
          </table:table-cell>
          <table:table-cell/>
          <table:table-cell office:value-type="float" office:value="55.2661290322581" calcext:value-type="float">
            <text:p>55.2661290322581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/>
          <table:table-cell office:value-type="float" office:value="55.2666666666667" calcext:value-type="float">
            <text:p>55.2666666666667</text:p>
          </table:table-cell>
        </table:table-row>
        <table:table-row table:style-name="ro1">
          <table:table-cell office:value-type="float" office:value="57.1363636363636" calcext:value-type="float">
            <text:p>57.1363636363636</text:p>
          </table:table-cell>
          <table:table-cell/>
          <table:table-cell office:value-type="float" office:value="55.2727272727273" calcext:value-type="float">
            <text:p>55.27272727272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5.2857142857143" calcext:value-type="float">
            <text:p>55.2857142857143</text:p>
          </table:table-cell>
        </table:table-row>
        <table:table-row table:style-name="ro1">
          <table:table-cell office:value-type="float" office:value="47.1153846153846" calcext:value-type="float">
            <text:p>47.1153846153846</text:p>
          </table:table-cell>
          <table:table-cell/>
          <table:table-cell office:value-type="float" office:value="55.3108108108108" calcext:value-type="float">
            <text:p>55.3108108108108</text:p>
          </table:table-cell>
        </table:table-row>
        <table:table-row table:style-name="ro1">
          <table:table-cell office:value-type="float" office:value="42.4117647058824" calcext:value-type="float">
            <text:p>42.4117647058824</text:p>
          </table:table-cell>
          <table:table-cell/>
          <table:table-cell office:value-type="float" office:value="55.3181818181818" calcext:value-type="float">
            <text:p>55.3181818181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5.3333333333333" calcext:value-type="float">
            <text:p>55.3333333333333</text:p>
          </table:table-cell>
        </table:table-row>
        <table:table-row table:style-name="ro1">
          <table:table-cell office:value-type="float" office:value="71.0526315789474" calcext:value-type="float">
            <text:p>71.0526315789474</text:p>
          </table:table-cell>
          <table:table-cell/>
          <table:table-cell office:value-type="float" office:value="55.3333333333333" calcext:value-type="float">
            <text:p>55.3333333333333</text:p>
          </table:table-cell>
        </table:table-row>
        <table:table-row table:style-name="ro1">
          <table:table-cell office:value-type="float" office:value="70.2173913043478" calcext:value-type="float">
            <text:p>70.2173913043478</text:p>
          </table:table-cell>
          <table:table-cell/>
          <table:table-cell office:value-type="float" office:value="55.3571428571429" calcext:value-type="float">
            <text:p>55.3571428571429</text:p>
          </table:table-cell>
        </table:table-row>
        <table:table-row table:style-name="ro1">
          <table:table-cell office:value-type="float" office:value="52.1666666666667" calcext:value-type="float">
            <text:p>52.1666666666667</text:p>
          </table:table-cell>
          <table:table-cell/>
          <table:table-cell office:value-type="float" office:value="55.4137931034483" calcext:value-type="float">
            <text:p>55.4137931034483</text:p>
          </table:table-cell>
        </table:table-row>
        <table:table-row table:style-name="ro1">
          <table:table-cell office:value-type="float" office:value="51.8333333333333" calcext:value-type="float">
            <text:p>51.8333333333333</text:p>
          </table:table-cell>
          <table:table-cell/>
          <table:table-cell office:value-type="float" office:value="55.421052631579" calcext:value-type="float">
            <text:p>55.421052631579</text:p>
          </table:table-cell>
        </table:table-row>
        <table:table-row table:style-name="ro1">
          <table:table-cell office:value-type="float" office:value="70.3333333333333" calcext:value-type="float">
            <text:p>70.3333333333333</text:p>
          </table:table-cell>
          <table:table-cell/>
          <table:table-cell office:value-type="float" office:value="55.4583333333333" calcext:value-type="float">
            <text:p>55.4583333333333</text:p>
          </table:table-cell>
        </table:table-row>
        <table:table-row table:style-name="ro1">
          <table:table-cell office:value-type="float" office:value="40.168" calcext:value-type="float">
            <text:p>40.168</text:p>
          </table:table-cell>
          <table:table-cell/>
          <table:table-cell office:value-type="float" office:value="55.4705882352941" calcext:value-type="float">
            <text:p>55.4705882352941</text:p>
          </table:table-cell>
        </table:table-row>
        <table:table-row table:style-name="ro1">
          <table:table-cell office:value-type="float" office:value="25.6363636363636" calcext:value-type="float">
            <text:p>25.6363636363636</text:p>
          </table:table-cell>
          <table:table-cell/>
          <table:table-cell office:value-type="float" office:value="55.4848484848485" calcext:value-type="float">
            <text:p>55.4848484848485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/>
          <table:table-cell office:value-type="float" office:value="55.4897959183674" calcext:value-type="float">
            <text:p>55.4897959183674</text:p>
          </table:table-cell>
        </table:table-row>
        <table:table-row table:style-name="ro1">
          <table:table-cell office:value-type="float" office:value="56.56" calcext:value-type="float">
            <text:p>56.56</text:p>
          </table:table-cell>
          <table:table-cell/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/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49.2272727272727" calcext:value-type="float">
            <text:p>49.2272727272727</text:p>
          </table:table-cell>
          <table:table-cell/>
          <table:table-cell office:value-type="float" office:value="55.5161290322581" calcext:value-type="float">
            <text:p>55.5161290322581</text:p>
          </table:table-cell>
        </table:table-row>
        <table:table-row table:style-name="ro1">
          <table:table-cell office:value-type="float" office:value="68.0625" calcext:value-type="float">
            <text:p>68.0625</text:p>
          </table:table-cell>
          <table:table-cell/>
          <table:table-cell office:value-type="float" office:value="55.5454545454546" calcext:value-type="float">
            <text:p>55.5454545454546</text:p>
          </table:table-cell>
        </table:table-row>
        <table:table-row table:style-name="ro1">
          <table:table-cell office:value-type="float" office:value="54.1621621621622" calcext:value-type="float">
            <text:p>54.1621621621622</text:p>
          </table:table-cell>
          <table:table-cell/>
          <table:table-cell office:value-type="float" office:value="55.5714285714286" calcext:value-type="float">
            <text:p>55.5714285714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5.5909090909091" calcext:value-type="float">
            <text:p>55.590909090909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/>
          <table:table-cell office:value-type="float" office:value="55.5909090909091" calcext:value-type="float">
            <text:p>55.5909090909091</text:p>
          </table:table-cell>
        </table:table-row>
        <table:table-row table:style-name="ro1">
          <table:table-cell office:value-type="float" office:value="40.3333333333333" calcext:value-type="float">
            <text:p>40.3333333333333</text:p>
          </table:table-cell>
          <table:table-cell/>
          <table:table-cell office:value-type="float" office:value="55.6923076923077" calcext:value-type="float">
            <text:p>55.6923076923077</text:p>
          </table:table-cell>
        </table:table-row>
        <table:table-row table:style-name="ro1">
          <table:table-cell office:value-type="float" office:value="48.3947368421053" calcext:value-type="float">
            <text:p>48.3947368421053</text:p>
          </table:table-cell>
          <table:table-cell/>
          <table:table-cell office:value-type="float" office:value="55.6923076923077" calcext:value-type="float">
            <text:p>55.6923076923077</text:p>
          </table:table-cell>
        </table:table-row>
        <table:table-row table:style-name="ro1">
          <table:table-cell office:value-type="float" office:value="46.1785714285714" calcext:value-type="float">
            <text:p>46.1785714285714</text:p>
          </table:table-cell>
          <table:table-cell/>
          <table:table-cell office:value-type="float" office:value="55.7407407407407" calcext:value-type="float">
            <text:p>55.7407407407407</text:p>
          </table:table-cell>
        </table:table-row>
        <table:table-row table:style-name="ro1">
          <table:table-cell office:value-type="float" office:value="49.3333333333333" calcext:value-type="float">
            <text:p>49.3333333333333</text:p>
          </table:table-cell>
          <table:table-cell/>
          <table:table-cell office:value-type="float" office:value="55.7619047619048" calcext:value-type="float">
            <text:p>55.7619047619048</text:p>
          </table:table-cell>
        </table:table-row>
        <table:table-row table:style-name="ro1">
          <table:table-cell office:value-type="float" office:value="55.1176470588235" calcext:value-type="float">
            <text:p>55.1176470588235</text:p>
          </table:table-cell>
          <table:table-cell/>
          <table:table-cell office:value-type="float" office:value="55.8333333333333" calcext:value-type="float">
            <text:p>55.8333333333333</text:p>
          </table:table-cell>
        </table:table-row>
        <table:table-row table:style-name="ro1">
          <table:table-cell office:value-type="float" office:value="53.4181818181818" calcext:value-type="float">
            <text:p>53.4181818181818</text:p>
          </table:table-cell>
          <table:table-cell/>
          <table:table-cell office:value-type="float" office:value="55.8333333333333" calcext:value-type="float">
            <text:p>55.8333333333333</text:p>
          </table:table-cell>
        </table:table-row>
        <table:table-row table:style-name="ro1">
          <table:table-cell office:value-type="float" office:value="66.6153846153846" calcext:value-type="float">
            <text:p>66.6153846153846</text:p>
          </table:table-cell>
          <table:table-cell/>
          <table:table-cell office:value-type="float" office:value="55.84" calcext:value-type="float">
            <text:p>55.84</text:p>
          </table:table-cell>
        </table:table-row>
        <table:table-row table:style-name="ro1">
          <table:table-cell office:value-type="float" office:value="49.5238095238095" calcext:value-type="float">
            <text:p>49.5238095238095</text:p>
          </table:table-cell>
          <table:table-cell/>
          <table:table-cell office:value-type="float" office:value="55.8461538461538" calcext:value-type="float">
            <text:p>55.8461538461538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/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74.1785714285714" calcext:value-type="float">
            <text:p>74.1785714285714</text:p>
          </table:table-cell>
          <table:table-cell/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54.7407407407407" calcext:value-type="float">
            <text:p>54.7407407407407</text:p>
          </table:table-cell>
          <table:table-cell/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52.3529411764706" calcext:value-type="float">
            <text:p>52.3529411764706</text:p>
          </table:table-cell>
          <table:table-cell/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65.5882352941177" calcext:value-type="float">
            <text:p>65.5882352941177</text:p>
          </table:table-cell>
          <table:table-cell/>
          <table:table-cell office:value-type="float" office:value="55.8636363636364" calcext:value-type="float">
            <text:p>55.86363636363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5.875" calcext:value-type="float">
            <text:p>55.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5.88" calcext:value-type="float">
            <text:p>55.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5.9047619047619" calcext:value-type="float">
            <text:p>55.9047619047619</text:p>
          </table:table-cell>
        </table:table-row>
        <table:table-row table:style-name="ro1">
          <table:table-cell office:value-type="float" office:value="80.6363636363636" calcext:value-type="float">
            <text:p>80.6363636363636</text:p>
          </table:table-cell>
          <table:table-cell/>
          <table:table-cell office:value-type="float" office:value="55.9090909090909" calcext:value-type="float">
            <text:p>55.9090909090909</text:p>
          </table:table-cell>
        </table:table-row>
        <table:table-row table:style-name="ro1">
          <table:table-cell office:value-type="float" office:value="64.6065573770492" calcext:value-type="float">
            <text:p>64.6065573770492</text:p>
          </table:table-cell>
          <table:table-cell/>
          <table:table-cell office:value-type="float" office:value="55.9090909090909" calcext:value-type="float">
            <text:p>55.9090909090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float" office:value="33.9047619047619" calcext:value-type="float">
            <text:p>33.9047619047619</text:p>
          </table:table-cell>
          <table:table-cell/>
          <table:table-cell office:value-type="float" office:value="55.9545454545455" calcext:value-type="float">
            <text:p>55.9545454545455</text:p>
          </table:table-cell>
        </table:table-row>
        <table:table-row table:style-name="ro1">
          <table:table-cell office:value-type="float" office:value="33.7555555555556" calcext:value-type="float">
            <text:p>33.755555555555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.940119760479" calcext:value-type="float">
            <text:p>21.94011976047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.8636363636364" calcext:value-type="float">
            <text:p>54.8636363636364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.6363636363636" calcext:value-type="float">
            <text:p>32.636363636363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.15" calcext:value-type="float">
            <text:p>40.1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.6428571428571" calcext:value-type="float">
            <text:p>44.642857142857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.2631578947368" calcext:value-type="float">
            <text:p>41.2631578947368</text:p>
          </table:table-cell>
          <table:table-cell/>
          <table:table-cell office:value-type="float" office:value="56.0330578512397" calcext:value-type="float">
            <text:p>56.033057851239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56.0555555555556" calcext:value-type="float">
            <text:p>56.0555555555556</text:p>
          </table:table-cell>
        </table:table-row>
        <table:table-row table:style-name="ro1">
          <table:table-cell office:value-type="float" office:value="34.775" calcext:value-type="float">
            <text:p>34.775</text:p>
          </table:table-cell>
          <table:table-cell/>
          <table:table-cell office:value-type="float" office:value="56.0693069306931" calcext:value-type="float">
            <text:p>56.0693069306931</text:p>
          </table:table-cell>
        </table:table-row>
        <table:table-row table:style-name="ro1">
          <table:table-cell office:value-type="float" office:value="48.3783783783784" calcext:value-type="float">
            <text:p>48.3783783783784</text:p>
          </table:table-cell>
          <table:table-cell/>
          <table:table-cell office:value-type="float" office:value="56.0869565217391" calcext:value-type="float">
            <text:p>56.0869565217391</text:p>
          </table:table-cell>
        </table:table-row>
        <table:table-row table:style-name="ro1">
          <table:table-cell office:value-type="float" office:value="54.2857142857143" calcext:value-type="float">
            <text:p>54.2857142857143</text:p>
          </table:table-cell>
          <table:table-cell/>
          <table:table-cell office:value-type="float" office:value="56.0909090909091" calcext:value-type="float">
            <text:p>56.090909090909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/>
          <table:table-cell office:value-type="float" office:value="56.0909090909091" calcext:value-type="float">
            <text:p>56.0909090909091</text:p>
          </table:table-cell>
        </table:table-row>
        <table:table-row table:style-name="ro1">
          <table:table-cell office:value-type="float" office:value="64.6363636363636" calcext:value-type="float">
            <text:p>64.6363636363636</text:p>
          </table:table-cell>
          <table:table-cell/>
          <table:table-cell office:value-type="float" office:value="56.1052631578947" calcext:value-type="float">
            <text:p>56.1052631578947</text:p>
          </table:table-cell>
        </table:table-row>
        <table:table-row table:style-name="ro1">
          <table:table-cell office:value-type="float" office:value="54.8571428571429" calcext:value-type="float">
            <text:p>54.8571428571429</text:p>
          </table:table-cell>
          <table:table-cell/>
          <table:table-cell office:value-type="float" office:value="56.125" calcext:value-type="float">
            <text:p>56.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6.125" calcext:value-type="float">
            <text:p>56.125</text:p>
          </table:table-cell>
        </table:table-row>
        <table:table-row table:style-name="ro1">
          <table:table-cell office:value-type="float" office:value="48.1764705882353" calcext:value-type="float">
            <text:p>48.1764705882353</text:p>
          </table:table-cell>
          <table:table-cell/>
          <table:table-cell office:value-type="float" office:value="56.125" calcext:value-type="float">
            <text:p>56.125</text:p>
          </table:table-cell>
        </table:table-row>
        <table:table-row table:style-name="ro1">
          <table:table-cell office:value-type="float" office:value="56.3055555555556" calcext:value-type="float">
            <text:p>56.3055555555556</text:p>
          </table:table-cell>
          <table:table-cell/>
          <table:table-cell office:value-type="float" office:value="56.15625" calcext:value-type="float">
            <text:p>56.1562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/>
          <table:table-cell office:value-type="float" office:value="56.1764705882353" calcext:value-type="float">
            <text:p>56.1764705882353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/>
          <table:table-cell office:value-type="float" office:value="56.1818181818182" calcext:value-type="float">
            <text:p>56.1818181818182</text:p>
          </table:table-cell>
        </table:table-row>
        <table:table-row table:style-name="ro1">
          <table:table-cell office:value-type="float" office:value="42.8125" calcext:value-type="float">
            <text:p>42.8125</text:p>
          </table:table-cell>
          <table:table-cell/>
          <table:table-cell office:value-type="float" office:value="56.1830985915493" calcext:value-type="float">
            <text:p>56.1830985915493</text:p>
          </table:table-cell>
        </table:table-row>
        <table:table-row table:style-name="ro1">
          <table:table-cell office:value-type="float" office:value="64.42" calcext:value-type="float">
            <text:p>64.42</text:p>
          </table:table-cell>
          <table:table-cell/>
          <table:table-cell office:value-type="float" office:value="56.1875" calcext:value-type="float">
            <text:p>56.1875</text:p>
          </table:table-cell>
        </table:table-row>
        <table:table-row table:style-name="ro1">
          <table:table-cell office:value-type="float" office:value="50.3636363636364" calcext:value-type="float">
            <text:p>50.3636363636364</text:p>
          </table:table-cell>
          <table:table-cell/>
          <table:table-cell office:value-type="float" office:value="56.1904761904762" calcext:value-type="float">
            <text:p>56.1904761904762</text:p>
          </table:table-cell>
        </table:table-row>
        <table:table-row table:style-name="ro1">
          <table:table-cell office:value-type="float" office:value="54.7037037037037" calcext:value-type="float">
            <text:p>54.7037037037037</text:p>
          </table:table-cell>
          <table:table-cell/>
          <table:table-cell office:value-type="float" office:value="56.2105263157895" calcext:value-type="float">
            <text:p>56.2105263157895</text:p>
          </table:table-cell>
        </table:table-row>
        <table:table-row table:style-name="ro1">
          <table:table-cell office:value-type="float" office:value="48.2413793103448" calcext:value-type="float">
            <text:p>48.2413793103448</text:p>
          </table:table-cell>
          <table:table-cell/>
          <table:table-cell office:value-type="float" office:value="56.2285714285714" calcext:value-type="float">
            <text:p>56.2285714285714</text:p>
          </table:table-cell>
        </table:table-row>
        <table:table-row table:style-name="ro1">
          <table:table-cell office:value-type="float" office:value="55.2727272727273" calcext:value-type="float">
            <text:p>55.2727272727273</text:p>
          </table:table-cell>
          <table:table-cell/>
          <table:table-cell office:value-type="float" office:value="56.2340425531915" calcext:value-type="float">
            <text:p>56.2340425531915</text:p>
          </table:table-cell>
        </table:table-row>
        <table:table-row table:style-name="ro1">
          <table:table-cell office:value-type="float" office:value="33.8833333333333" calcext:value-type="float">
            <text:p>33.8833333333333</text:p>
          </table:table-cell>
          <table:table-cell/>
          <table:table-cell office:value-type="float" office:value="56.28" calcext:value-type="float">
            <text:p>56.28</text:p>
          </table:table-cell>
        </table:table-row>
        <table:table-row table:style-name="ro1">
          <table:table-cell office:value-type="float" office:value="55.84" calcext:value-type="float">
            <text:p>55.84</text:p>
          </table:table-cell>
          <table:table-cell/>
          <table:table-cell office:value-type="float" office:value="56.2903225806452" calcext:value-type="float">
            <text:p>56.290322580645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/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48.1428571428572" calcext:value-type="float">
            <text:p>48.1428571428572</text:p>
          </table:table-cell>
          <table:table-cell/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30.4202898550725" calcext:value-type="float">
            <text:p>30.4202898550725</text:p>
          </table:table-cell>
          <table:table-cell/>
          <table:table-cell office:value-type="float" office:value="56.3055555555556" calcext:value-type="float">
            <text:p>56.3055555555556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/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65.2857142857143" calcext:value-type="float">
            <text:p>65.2857142857143</text:p>
          </table:table-cell>
          <table:table-cell/>
          <table:table-cell office:value-type="float" office:value="56.3636363636364" calcext:value-type="float">
            <text:p>56.3636363636364</text:p>
          </table:table-cell>
        </table:table-row>
        <table:table-row table:style-name="ro1">
          <table:table-cell office:value-type="float" office:value="69.1818181818182" calcext:value-type="float">
            <text:p>69.1818181818182</text:p>
          </table:table-cell>
          <table:table-cell/>
          <table:table-cell office:value-type="float" office:value="56.375" calcext:value-type="float">
            <text:p>56.375</text:p>
          </table:table-cell>
        </table:table-row>
        <table:table-row table:style-name="ro1">
          <table:table-cell office:value-type="float" office:value="60.3157894736842" calcext:value-type="float">
            <text:p>60.3157894736842</text:p>
          </table:table-cell>
          <table:table-cell/>
          <table:table-cell office:value-type="float" office:value="56.3846153846154" calcext:value-type="float">
            <text:p>56.3846153846154</text:p>
          </table:table-cell>
        </table:table-row>
        <table:table-row table:style-name="ro1">
          <table:table-cell office:value-type="float" office:value="72.5454545454546" calcext:value-type="float">
            <text:p>72.5454545454546</text:p>
          </table:table-cell>
          <table:table-cell/>
          <table:table-cell office:value-type="float" office:value="56.4444444444444" calcext:value-type="float">
            <text:p>56.4444444444444</text:p>
          </table:table-cell>
        </table:table-row>
        <table:table-row table:style-name="ro1">
          <table:table-cell office:value-type="float" office:value="53.3636363636364" calcext:value-type="float">
            <text:p>53.3636363636364</text:p>
          </table:table-cell>
          <table:table-cell/>
          <table:table-cell office:value-type="float" office:value="56.5238095238095" calcext:value-type="float">
            <text:p>56.5238095238095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/>
          <table:table-cell office:value-type="float" office:value="56.5342465753425" calcext:value-type="float">
            <text:p>56.5342465753425</text:p>
          </table:table-cell>
        </table:table-row>
        <table:table-row table:style-name="ro1">
          <table:table-cell office:value-type="float" office:value="32.1016949152542" calcext:value-type="float">
            <text:p>32.1016949152542</text:p>
          </table:table-cell>
          <table:table-cell/>
          <table:table-cell office:value-type="float" office:value="56.5416666666667" calcext:value-type="float">
            <text:p>56.5416666666667</text:p>
          </table:table-cell>
        </table:table-row>
        <table:table-row table:style-name="ro1">
          <table:table-cell office:value-type="float" office:value="87.1666666666667" calcext:value-type="float">
            <text:p>87.1666666666667</text:p>
          </table:table-cell>
          <table:table-cell/>
          <table:table-cell office:value-type="float" office:value="56.56" calcext:value-type="float">
            <text:p>56.56</text:p>
          </table:table-cell>
        </table:table-row>
        <table:table-row table:style-name="ro1">
          <table:table-cell office:value-type="float" office:value="33.2380952380952" calcext:value-type="float">
            <text:p>33.2380952380952</text:p>
          </table:table-cell>
          <table:table-cell/>
          <table:table-cell office:value-type="float" office:value="56.5833333333333" calcext:value-type="float">
            <text:p>56.5833333333333</text:p>
          </table:table-cell>
        </table:table-row>
        <table:table-row table:style-name="ro1">
          <table:table-cell office:value-type="float" office:value="53.2142857142857" calcext:value-type="float">
            <text:p>53.2142857142857</text:p>
          </table:table-cell>
          <table:table-cell/>
          <table:table-cell office:value-type="float" office:value="56.5882352941176" calcext:value-type="float">
            <text:p>56.5882352941176</text:p>
          </table:table-cell>
        </table:table-row>
        <table:table-row table:style-name="ro1">
          <table:table-cell office:value-type="float" office:value="83.3333333333333" calcext:value-type="float">
            <text:p>83.3333333333333</text:p>
          </table:table-cell>
          <table:table-cell/>
          <table:table-cell office:value-type="float" office:value="56.6129032258065" calcext:value-type="float">
            <text:p>56.6129032258065</text:p>
          </table:table-cell>
        </table:table-row>
        <table:table-row table:style-name="ro1">
          <table:table-cell office:value-type="float" office:value="65.4864864864865" calcext:value-type="float">
            <text:p>65.4864864864865</text:p>
          </table:table-cell>
          <table:table-cell/>
          <table:table-cell office:value-type="float" office:value="56.6363636363636" calcext:value-type="float">
            <text:p>56.6363636363636</text:p>
          </table:table-cell>
        </table:table-row>
        <table:table-row table:style-name="ro1">
          <table:table-cell office:value-type="float" office:value="59.3478260869565" calcext:value-type="float">
            <text:p>59.3478260869565</text:p>
          </table:table-cell>
          <table:table-cell/>
          <table:table-cell office:value-type="float" office:value="56.7088607594937" calcext:value-type="float">
            <text:p>56.7088607594937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3.4838709677419" calcext:value-type="float">
            <text:p>53.4838709677419</text:p>
          </table:table-cell>
          <table:table-cell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44.2222222222222" calcext:value-type="float">
            <text:p>44.2222222222222</text:p>
          </table:table-cell>
          <table:table-cell/>
          <table:table-cell office:value-type="float" office:value="56.7731092436975" calcext:value-type="float">
            <text:p>56.7731092436975</text:p>
          </table:table-cell>
        </table:table-row>
        <table:table-row table:style-name="ro1">
          <table:table-cell office:value-type="float" office:value="61.2916666666667" calcext:value-type="float">
            <text:p>61.2916666666667</text:p>
          </table:table-cell>
          <table:table-cell/>
          <table:table-cell office:value-type="float" office:value="56.7826086956522" calcext:value-type="float">
            <text:p>56.7826086956522</text:p>
          </table:table-cell>
        </table:table-row>
        <table:table-row table:style-name="ro1">
          <table:table-cell office:value-type="float" office:value="35.7777777777778" calcext:value-type="float">
            <text:p>35.7777777777778</text:p>
          </table:table-cell>
          <table:table-cell/>
          <table:table-cell office:value-type="float" office:value="56.7857142857143" calcext:value-type="float">
            <text:p>56.7857142857143</text:p>
          </table:table-cell>
        </table:table-row>
        <table:table-row table:style-name="ro1">
          <table:table-cell office:value-type="float" office:value="41.6052631578947" calcext:value-type="float">
            <text:p>41.6052631578947</text:p>
          </table:table-cell>
          <table:table-cell/>
          <table:table-cell office:value-type="float" office:value="56.8181818181818" calcext:value-type="float">
            <text:p>56.8181818181818</text:p>
          </table:table-cell>
        </table:table-row>
        <table:table-row table:style-name="ro1">
          <table:table-cell office:value-type="float" office:value="67.6315789473684" calcext:value-type="float">
            <text:p>67.6315789473684</text:p>
          </table:table-cell>
          <table:table-cell/>
          <table:table-cell office:value-type="float" office:value="56.8571428571429" calcext:value-type="float">
            <text:p>56.8571428571429</text:p>
          </table:table-cell>
        </table:table-row>
        <table:table-row table:style-name="ro1">
          <table:table-cell office:value-type="float" office:value="66.7142857142857" calcext:value-type="float">
            <text:p>66.7142857142857</text:p>
          </table:table-cell>
          <table:table-cell/>
          <table:table-cell office:value-type="float" office:value="56.8695652173913" calcext:value-type="float">
            <text:p>56.8695652173913</text:p>
          </table:table-cell>
        </table:table-row>
        <table:table-row table:style-name="ro1">
          <table:table-cell office:value-type="float" office:value="20.4761904761905" calcext:value-type="float">
            <text:p>20.4761904761905</text:p>
          </table:table-cell>
          <table:table-cell/>
          <table:table-cell office:value-type="float" office:value="56.9047619047619" calcext:value-type="float">
            <text:p>56.9047619047619</text:p>
          </table:table-cell>
        </table:table-row>
        <table:table-row table:style-name="ro1">
          <table:table-cell office:value-type="float" office:value="41.8333333333333" calcext:value-type="float">
            <text:p>41.8333333333333</text:p>
          </table:table-cell>
          <table:table-cell/>
          <table:table-cell office:value-type="float" office:value="56.9375" calcext:value-type="float">
            <text:p>56.9375</text:p>
          </table:table-cell>
        </table:table-row>
        <table:table-row table:style-name="ro1">
          <table:table-cell office:value-type="float" office:value="72.4782608695652" calcext:value-type="float">
            <text:p>72.4782608695652</text:p>
          </table:table-cell>
          <table:table-cell/>
          <table:table-cell office:value-type="float" office:value="56.9615384615385" calcext:value-type="float">
            <text:p>56.9615384615385</text:p>
          </table:table-cell>
        </table:table-row>
        <table:table-row table:style-name="ro1">
          <table:table-cell office:value-type="float" office:value="71.0833333333333" calcext:value-type="float">
            <text:p>71.083333333333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.2083333333333" calcext:value-type="float">
            <text:p>64.208333333333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.1538461538462" calcext:value-type="float">
            <text:p>80.1538461538462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.6818181818182" calcext:value-type="float">
            <text:p>44.6818181818182</text:p>
          </table:table-cell>
          <table:table-cell/>
          <table:table-cell office:value-type="float" office:value="57.0111111111111" calcext:value-type="float">
            <text:p>57.0111111111111</text:p>
          </table:table-cell>
        </table:table-row>
        <table:table-row table:style-name="ro1">
          <table:table-cell office:value-type="float" office:value="54.5882352941177" calcext:value-type="float">
            <text:p>54.5882352941177</text:p>
          </table:table-cell>
          <table:table-cell/>
          <table:table-cell office:value-type="float" office:value="57.0476190476191" calcext:value-type="float">
            <text:p>57.0476190476191</text:p>
          </table:table-cell>
        </table:table-row>
        <table:table-row table:style-name="ro1">
          <table:table-cell office:value-type="float" office:value="88.6666666666667" calcext:value-type="float">
            <text:p>88.6666666666667</text:p>
          </table:table-cell>
          <table:table-cell/>
          <table:table-cell office:value-type="float" office:value="57.0625" calcext:value-type="float">
            <text:p>57.062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/>
          <table:table-cell office:value-type="float" office:value="57.0681818181818" calcext:value-type="float">
            <text:p>57.0681818181818</text:p>
          </table:table-cell>
        </table:table-row>
        <table:table-row table:style-name="ro1">
          <table:table-cell office:value-type="float" office:value="42.925" calcext:value-type="float">
            <text:p>42.925</text:p>
          </table:table-cell>
          <table:table-cell/>
          <table:table-cell office:value-type="float" office:value="57.0967741935484" calcext:value-type="float">
            <text:p>57.0967741935484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/>
          <table:table-cell office:value-type="float" office:value="57.1304347826087" calcext:value-type="float">
            <text:p>57.1304347826087</text:p>
          </table:table-cell>
        </table:table-row>
        <table:table-row table:style-name="ro1">
          <table:table-cell office:value-type="float" office:value="49.8571428571429" calcext:value-type="float">
            <text:p>49.8571428571429</text:p>
          </table:table-cell>
          <table:table-cell/>
          <table:table-cell office:value-type="float" office:value="57.1363636363636" calcext:value-type="float">
            <text:p>57.1363636363636</text:p>
          </table:table-cell>
        </table:table-row>
        <table:table-row table:style-name="ro1">
          <table:table-cell office:value-type="float" office:value="39.9387755102041" calcext:value-type="float">
            <text:p>39.9387755102041</text:p>
          </table:table-cell>
          <table:table-cell/>
          <table:table-cell office:value-type="float" office:value="57.1428571428571" calcext:value-type="float">
            <text:p>57.1428571428571</text:p>
          </table:table-cell>
        </table:table-row>
        <table:table-row table:style-name="ro1">
          <table:table-cell office:value-type="float" office:value="53.4193548387097" calcext:value-type="float">
            <text:p>53.4193548387097</text:p>
          </table:table-cell>
          <table:table-cell/>
          <table:table-cell office:value-type="float" office:value="57.1538461538462" calcext:value-type="float">
            <text:p>57.1538461538462</text:p>
          </table:table-cell>
        </table:table-row>
        <table:table-row table:style-name="ro1">
          <table:table-cell office:value-type="float" office:value="38.8095238095238" calcext:value-type="float">
            <text:p>38.8095238095238</text:p>
          </table:table-cell>
          <table:table-cell/>
          <table:table-cell office:value-type="float" office:value="57.1842105263158" calcext:value-type="float">
            <text:p>57.1842105263158</text:p>
          </table:table-cell>
        </table:table-row>
        <table:table-row table:style-name="ro1">
          <table:table-cell office:value-type="float" office:value="32.8936170212766" calcext:value-type="float">
            <text:p>32.8936170212766</text:p>
          </table:table-cell>
          <table:table-cell/>
          <table:table-cell office:value-type="float" office:value="57.1935483870968" calcext:value-type="float">
            <text:p>57.1935483870968</text:p>
          </table:table-cell>
        </table:table-row>
        <table:table-row table:style-name="ro1">
          <table:table-cell office:value-type="float" office:value="51.1304347826087" calcext:value-type="float">
            <text:p>51.1304347826087</text:p>
          </table:table-cell>
          <table:table-cell/>
          <table:table-cell office:value-type="float" office:value="57.2040816326531" calcext:value-type="float">
            <text:p>57.2040816326531</text:p>
          </table:table-cell>
        </table:table-row>
        <table:table-row table:style-name="ro1">
          <table:table-cell office:value-type="float" office:value="50.4705882352941" calcext:value-type="float">
            <text:p>50.4705882352941</text:p>
          </table:table-cell>
          <table:table-cell/>
          <table:table-cell office:value-type="float" office:value="57.2068965517241" calcext:value-type="float">
            <text:p>57.2068965517241</text:p>
          </table:table-cell>
        </table:table-row>
        <table:table-row table:style-name="ro1">
          <table:table-cell office:value-type="float" office:value="58.8181818181818" calcext:value-type="float">
            <text:p>58.8181818181818</text:p>
          </table:table-cell>
          <table:table-cell/>
          <table:table-cell office:value-type="float" office:value="57.2142857142857" calcext:value-type="float">
            <text:p>57.2142857142857</text:p>
          </table:table-cell>
        </table:table-row>
        <table:table-row table:style-name="ro1">
          <table:table-cell office:value-type="float" office:value="50.6666666666667" calcext:value-type="float">
            <text:p>50.6666666666667</text:p>
          </table:table-cell>
          <table:table-cell/>
          <table:table-cell office:value-type="float" office:value="57.2258064516129" calcext:value-type="float">
            <text:p>57.2258064516129</text:p>
          </table:table-cell>
        </table:table-row>
        <table:table-row table:style-name="ro1">
          <table:table-cell office:value-type="float" office:value="51.0983606557377" calcext:value-type="float">
            <text:p>51.0983606557377</text:p>
          </table:table-cell>
          <table:table-cell/>
          <table:table-cell office:value-type="float" office:value="57.2272727272727" calcext:value-type="float">
            <text:p>57.2272727272727</text:p>
          </table:table-cell>
        </table:table-row>
        <table:table-row table:style-name="ro1">
          <table:table-cell office:value-type="float" office:value="53.6666666666667" calcext:value-type="float">
            <text:p>53.6666666666667</text:p>
          </table:table-cell>
          <table:table-cell/>
          <table:table-cell office:value-type="float" office:value="57.2352941176471" calcext:value-type="float">
            <text:p>57.2352941176471</text:p>
          </table:table-cell>
        </table:table-row>
        <table:table-row table:style-name="ro1">
          <table:table-cell office:value-type="float" office:value="60.4347826086956" calcext:value-type="float">
            <text:p>60.4347826086956</text:p>
          </table:table-cell>
          <table:table-cell/>
          <table:table-cell office:value-type="float" office:value="57.2857142857143" calcext:value-type="float">
            <text:p>57.2857142857143</text:p>
          </table:table-cell>
        </table:table-row>
        <table:table-row table:style-name="ro1">
          <table:table-cell office:value-type="float" office:value="57.0681818181818" calcext:value-type="float">
            <text:p>57.0681818181818</text:p>
          </table:table-cell>
          <table:table-cell/>
          <table:table-cell office:value-type="float" office:value="57.3181818181818" calcext:value-type="float">
            <text:p>57.3181818181818</text:p>
          </table:table-cell>
        </table:table-row>
        <table:table-row table:style-name="ro1">
          <table:table-cell office:value-type="float" office:value="77.5833333333333" calcext:value-type="float">
            <text:p>77.5833333333333</text:p>
          </table:table-cell>
          <table:table-cell/>
          <table:table-cell office:value-type="float" office:value="57.3333333333333" calcext:value-type="float">
            <text:p>57.3333333333333</text:p>
          </table:table-cell>
        </table:table-row>
        <table:table-row table:style-name="ro1">
          <table:table-cell office:value-type="float" office:value="62.14" calcext:value-type="float">
            <text:p>62.14</text:p>
          </table:table-cell>
          <table:table-cell/>
          <table:table-cell office:value-type="float" office:value="57.3333333333333" calcext:value-type="float">
            <text:p>57.3333333333333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/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63.8620689655172" calcext:value-type="float">
            <text:p>63.8620689655172</text:p>
          </table:table-cell>
          <table:table-cell/>
          <table:table-cell office:value-type="float" office:value="57.3636363636364" calcext:value-type="float">
            <text:p>57.3636363636364</text:p>
          </table:table-cell>
        </table:table-row>
        <table:table-row table:style-name="ro1">
          <table:table-cell office:value-type="float" office:value="69.9047619047619" calcext:value-type="float">
            <text:p>69.9047619047619</text:p>
          </table:table-cell>
          <table:table-cell/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33.4166666666667" calcext:value-type="float">
            <text:p>33.4166666666667</text:p>
          </table:table-cell>
          <table:table-cell/>
          <table:table-cell office:value-type="float" office:value="57.4444444444444" calcext:value-type="float">
            <text:p>57.4444444444444</text:p>
          </table:table-cell>
        </table:table-row>
        <table:table-row table:style-name="ro1">
          <table:table-cell office:value-type="float" office:value="65.2222222222222" calcext:value-type="float">
            <text:p>65.2222222222222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6.1578947368421" calcext:value-type="float">
            <text:p>46.1578947368421</text:p>
          </table:table-cell>
          <table:table-cell/>
          <table:table-cell office:value-type="float" office:value="57.6428571428571" calcext:value-type="float">
            <text:p>57.64285714285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57.6859504132231" calcext:value-type="float">
            <text:p>57.6859504132231</text:p>
          </table:table-cell>
        </table:table-row>
        <table:table-row table:style-name="ro1">
          <table:table-cell office:value-type="float" office:value="51.3333333333333" calcext:value-type="float">
            <text:p>51.3333333333333</text:p>
          </table:table-cell>
          <table:table-cell/>
          <table:table-cell office:value-type="float" office:value="57.6981132075472" calcext:value-type="float">
            <text:p>57.6981132075472</text:p>
          </table:table-cell>
        </table:table-row>
        <table:table-row table:style-name="ro1">
          <table:table-cell office:value-type="float" office:value="43.2222222222222" calcext:value-type="float">
            <text:p>43.2222222222222</text:p>
          </table:table-cell>
          <table:table-cell/>
          <table:table-cell office:value-type="float" office:value="57.7284768211921" calcext:value-type="float">
            <text:p>57.7284768211921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/>
          <table:table-cell office:value-type="float" office:value="57.7457627118644" calcext:value-type="float">
            <text:p>57.745762711864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/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40.1538461538462" calcext:value-type="float">
            <text:p>40.1538461538462</text:p>
          </table:table-cell>
          <table:table-cell/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31.2903225806452" calcext:value-type="float">
            <text:p>31.2903225806452</text:p>
          </table:table-cell>
          <table:table-cell/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38.4677419354839" calcext:value-type="float">
            <text:p>38.4677419354839</text:p>
          </table:table-cell>
          <table:table-cell/>
          <table:table-cell office:value-type="float" office:value="57.8076923076923" calcext:value-type="float">
            <text:p>57.8076923076923</text:p>
          </table:table-cell>
        </table:table-row>
        <table:table-row table:style-name="ro1">
          <table:table-cell office:value-type="float" office:value="55.2307692307692" calcext:value-type="float">
            <text:p>55.2307692307692</text:p>
          </table:table-cell>
          <table:table-cell/>
          <table:table-cell office:value-type="float" office:value="57.8333333333333" calcext:value-type="float">
            <text:p>57.833333333333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/>
          <table:table-cell office:value-type="float" office:value="57.8636363636364" calcext:value-type="float">
            <text:p>57.863636363636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/>
          <table:table-cell office:value-type="float" office:value="57.8648648648649" calcext:value-type="float">
            <text:p>57.8648648648649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/>
          <table:table-cell office:value-type="float" office:value="57.875" calcext:value-type="float">
            <text:p>57.875</text:p>
          </table:table-cell>
        </table:table-row>
        <table:table-row table:style-name="ro1">
          <table:table-cell office:value-type="float" office:value="62.3333333333333" calcext:value-type="float">
            <text:p>62.3333333333333</text:p>
          </table:table-cell>
          <table:table-cell/>
          <table:table-cell office:value-type="float" office:value="57.8888888888889" calcext:value-type="float">
            <text:p>57.8888888888889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/>
          <table:table-cell office:value-type="float" office:value="57.9090909090909" calcext:value-type="float">
            <text:p>57.9090909090909</text:p>
          </table:table-cell>
        </table:table-row>
        <table:table-row table:style-name="ro1">
          <table:table-cell office:value-type="float" office:value="67.2727272727273" calcext:value-type="float">
            <text:p>67.2727272727273</text:p>
          </table:table-cell>
          <table:table-cell/>
          <table:table-cell office:value-type="float" office:value="57.9090909090909" calcext:value-type="float">
            <text:p>57.9090909090909</text:p>
          </table:table-cell>
        </table:table-row>
        <table:table-row table:style-name="ro1">
          <table:table-cell office:value-type="float" office:value="27.7446808510638" calcext:value-type="float">
            <text:p>27.7446808510638</text:p>
          </table:table-cell>
          <table:table-cell/>
          <table:table-cell office:value-type="float" office:value="57.9411764705882" calcext:value-type="float">
            <text:p>57.9411764705882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/>
          <table:table-cell office:value-type="float" office:value="57.9457364341085" calcext:value-type="float">
            <text:p>57.9457364341085</text:p>
          </table:table-cell>
        </table:table-row>
        <table:table-row table:style-name="ro1">
          <table:table-cell office:value-type="float" office:value="64.4545454545455" calcext:value-type="float">
            <text:p>64.4545454545455</text:p>
          </table:table-cell>
          <table:table-cell/>
          <table:table-cell office:value-type="float" office:value="57.9473684210526" calcext:value-type="float">
            <text:p>57.94736842105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7.9583333333333" calcext:value-type="float">
            <text:p>57.9583333333333</text:p>
          </table:table-cell>
        </table:table-row>
        <table:table-row table:style-name="ro1">
          <table:table-cell office:value-type="float" office:value="43.1428571428572" calcext:value-type="float">
            <text:p>43.1428571428572</text:p>
          </table:table-cell>
          <table:table-cell/>
          <table:table-cell office:value-type="float" office:value="57.9722222222222" calcext:value-type="float">
            <text:p>57.9722222222222</text:p>
          </table:table-cell>
        </table:table-row>
        <table:table-row table:style-name="ro1">
          <table:table-cell office:value-type="float" office:value="49.4642857142857" calcext:value-type="float">
            <text:p>49.4642857142857</text:p>
          </table:table-cell>
          <table:table-cell/>
          <table:table-cell office:value-type="float" office:value="57.972972972973" calcext:value-type="float">
            <text:p>57.972972972973</text:p>
          </table:table-cell>
        </table:table-row>
        <table:table-row table:style-name="ro1">
          <table:table-cell office:value-type="float" office:value="36.0645161290323" calcext:value-type="float">
            <text:p>36.0645161290323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2352941176471" calcext:value-type="float">
            <text:p>59.235294117647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.3333333333333" calcext:value-type="float">
            <text:p>53.3333333333333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.1785714285714" calcext:value-type="float">
            <text:p>58.178571428571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.1515151515151" calcext:value-type="float">
            <text:p>53.151515151515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.9166666666667" calcext:value-type="float">
            <text:p>61.9166666666667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.2058823529412" calcext:value-type="float">
            <text:p>37.2058823529412</text:p>
          </table:table-cell>
          <table:table-cell/>
          <table:table-cell office:value-type="float" office:value="58.0153846153846" calcext:value-type="float">
            <text:p>58.0153846153846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58.0196078431373" calcext:value-type="float">
            <text:p>58.019607843137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/>
          <table:table-cell office:value-type="float" office:value="58.0833333333333" calcext:value-type="float">
            <text:p>58.0833333333333</text:p>
          </table:table-cell>
        </table:table-row>
        <table:table-row table:style-name="ro1">
          <table:table-cell office:value-type="float" office:value="70.7647058823529" calcext:value-type="float">
            <text:p>70.7647058823529</text:p>
          </table:table-cell>
          <table:table-cell/>
          <table:table-cell office:value-type="float" office:value="58.0869565217391" calcext:value-type="float">
            <text:p>58.0869565217391</text:p>
          </table:table-cell>
        </table:table-row>
        <table:table-row table:style-name="ro1">
          <table:table-cell office:value-type="float" office:value="47.5294117647059" calcext:value-type="float">
            <text:p>47.5294117647059</text:p>
          </table:table-cell>
          <table:table-cell/>
          <table:table-cell office:value-type="float" office:value="58.0909090909091" calcext:value-type="float">
            <text:p>58.0909090909091</text:p>
          </table:table-cell>
        </table:table-row>
        <table:table-row table:style-name="ro1">
          <table:table-cell office:value-type="float" office:value="55.3571428571429" calcext:value-type="float">
            <text:p>55.3571428571429</text:p>
          </table:table-cell>
          <table:table-cell/>
          <table:table-cell office:value-type="float" office:value="58.1071428571429" calcext:value-type="float">
            <text:p>58.1071428571429</text:p>
          </table:table-cell>
        </table:table-row>
        <table:table-row table:style-name="ro1">
          <table:table-cell office:value-type="float" office:value="51.8125" calcext:value-type="float">
            <text:p>51.8125</text:p>
          </table:table-cell>
          <table:table-cell/>
          <table:table-cell office:value-type="float" office:value="58.1142857142857" calcext:value-type="float">
            <text:p>58.1142857142857</text:p>
          </table:table-cell>
        </table:table-row>
        <table:table-row table:style-name="ro1">
          <table:table-cell office:value-type="float" office:value="60.5333333333333" calcext:value-type="float">
            <text:p>60.5333333333333</text:p>
          </table:table-cell>
          <table:table-cell/>
          <table:table-cell office:value-type="float" office:value="58.1739130434783" calcext:value-type="float">
            <text:p>58.1739130434783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/>
          <table:table-cell office:value-type="float" office:value="58.1785714285714" calcext:value-type="float">
            <text:p>58.1785714285714</text:p>
          </table:table-cell>
        </table:table-row>
        <table:table-row table:style-name="ro1">
          <table:table-cell office:value-type="float" office:value="58.4186046511628" calcext:value-type="float">
            <text:p>58.4186046511628</text:p>
          </table:table-cell>
          <table:table-cell/>
          <table:table-cell office:value-type="float" office:value="58.1818181818182" calcext:value-type="float">
            <text:p>58.1818181818182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/>
          <table:table-cell office:value-type="float" office:value="58.1842105263158" calcext:value-type="float">
            <text:p>58.1842105263158</text:p>
          </table:table-cell>
        </table:table-row>
        <table:table-row table:style-name="ro1">
          <table:table-cell office:value-type="float" office:value="55.9545454545455" calcext:value-type="float">
            <text:p>55.9545454545455</text:p>
          </table:table-cell>
          <table:table-cell/>
          <table:table-cell office:value-type="float" office:value="58.1923076923077" calcext:value-type="float">
            <text:p>58.1923076923077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/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47.3058823529412" calcext:value-type="float">
            <text:p>47.3058823529412</text:p>
          </table:table-cell>
          <table:table-cell/>
          <table:table-cell office:value-type="float" office:value="58.2173913043478" calcext:value-type="float">
            <text:p>58.2173913043478</text:p>
          </table:table-cell>
        </table:table-row>
        <table:table-row table:style-name="ro1">
          <table:table-cell office:value-type="float" office:value="41.1066666666667" calcext:value-type="float">
            <text:p>41.1066666666667</text:p>
          </table:table-cell>
          <table:table-cell/>
          <table:table-cell office:value-type="float" office:value="58.2272727272727" calcext:value-type="float">
            <text:p>58.2272727272727</text:p>
          </table:table-cell>
        </table:table-row>
        <table:table-row table:style-name="ro1">
          <table:table-cell office:value-type="float" office:value="62.9459459459459" calcext:value-type="float">
            <text:p>62.9459459459459</text:p>
          </table:table-cell>
          <table:table-cell/>
          <table:table-cell office:value-type="float" office:value="58.2307692307692" calcext:value-type="float">
            <text:p>58.2307692307692</text:p>
          </table:table-cell>
        </table:table-row>
        <table:table-row table:style-name="ro1">
          <table:table-cell office:value-type="float" office:value="43.6279069767442" calcext:value-type="float">
            <text:p>43.6279069767442</text:p>
          </table:table-cell>
          <table:table-cell/>
          <table:table-cell office:value-type="float" office:value="58.2413793103448" calcext:value-type="float">
            <text:p>58.2413793103448</text:p>
          </table:table-cell>
        </table:table-row>
        <table:table-row table:style-name="ro1">
          <table:table-cell office:value-type="float" office:value="59.0740740740741" calcext:value-type="float">
            <text:p>59.0740740740741</text:p>
          </table:table-cell>
          <table:table-cell/>
          <table:table-cell office:value-type="float" office:value="58.2666666666667" calcext:value-type="float">
            <text:p>58.2666666666667</text:p>
          </table:table-cell>
        </table:table-row>
        <table:table-row table:style-name="ro1">
          <table:table-cell office:value-type="float" office:value="41.5365853658537" calcext:value-type="float">
            <text:p>41.5365853658537</text:p>
          </table:table-cell>
          <table:table-cell/>
          <table:table-cell office:value-type="float" office:value="58.3076923076923" calcext:value-type="float">
            <text:p>58.3076923076923</text:p>
          </table:table-cell>
        </table:table-row>
        <table:table-row table:style-name="ro1">
          <table:table-cell office:value-type="float" office:value="60.1206896551724" calcext:value-type="float">
            <text:p>60.1206896551724</text:p>
          </table:table-cell>
          <table:table-cell/>
          <table:table-cell office:value-type="float" office:value="58.3157894736842" calcext:value-type="float">
            <text:p>58.3157894736842</text:p>
          </table:table-cell>
        </table:table-row>
        <table:table-row table:style-name="ro1">
          <table:table-cell office:value-type="float" office:value="61.3333333333333" calcext:value-type="float">
            <text:p>61.3333333333333</text:p>
          </table:table-cell>
          <table:table-cell/>
          <table:table-cell office:value-type="float" office:value="58.3157894736842" calcext:value-type="float">
            <text:p>58.3157894736842</text:p>
          </table:table-cell>
        </table:table-row>
        <table:table-row table:style-name="ro1">
          <table:table-cell office:value-type="float" office:value="58.1739130434783" calcext:value-type="float">
            <text:p>58.1739130434783</text:p>
          </table:table-cell>
          <table:table-cell/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float" office:value="46.7894736842105" calcext:value-type="float">
            <text:p>46.7894736842105</text:p>
          </table:table-cell>
          <table:table-cell/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/>
          <table:table-cell office:value-type="float" office:value="58.3636363636364" calcext:value-type="float">
            <text:p>58.3636363636364</text:p>
          </table:table-cell>
        </table:table-row>
        <table:table-row table:style-name="ro1">
          <table:table-cell office:value-type="float" office:value="86.8571428571429" calcext:value-type="float">
            <text:p>86.8571428571429</text:p>
          </table:table-cell>
          <table:table-cell/>
          <table:table-cell office:value-type="float" office:value="58.3636363636364" calcext:value-type="float">
            <text:p>58.3636363636364</text:p>
          </table:table-cell>
        </table:table-row>
        <table:table-row table:style-name="ro1">
          <table:table-cell office:value-type="float" office:value="38.2592592592593" calcext:value-type="float">
            <text:p>38.2592592592593</text:p>
          </table:table-cell>
          <table:table-cell/>
          <table:table-cell office:value-type="float" office:value="58.4090909090909" calcext:value-type="float">
            <text:p>58.4090909090909</text:p>
          </table:table-cell>
        </table:table-row>
        <table:table-row table:style-name="ro1">
          <table:table-cell office:value-type="float" office:value="68.1052631578947" calcext:value-type="float">
            <text:p>68.1052631578947</text:p>
          </table:table-cell>
          <table:table-cell/>
          <table:table-cell office:value-type="float" office:value="58.4186046511628" calcext:value-type="float">
            <text:p>58.418604651162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/>
          <table:table-cell office:value-type="float" office:value="58.4615384615385" calcext:value-type="float">
            <text:p>58.4615384615385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/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68.6818181818182" calcext:value-type="float">
            <text:p>68.6818181818182</text:p>
          </table:table-cell>
          <table:table-cell/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35.4464285714286" calcext:value-type="float">
            <text:p>35.4464285714286</text:p>
          </table:table-cell>
          <table:table-cell/>
          <table:table-cell office:value-type="float" office:value="58.5294117647059" calcext:value-type="float">
            <text:p>58.5294117647059</text:p>
          </table:table-cell>
        </table:table-row>
        <table:table-row table:style-name="ro1">
          <table:table-cell office:value-type="float" office:value="36.0952380952381" calcext:value-type="float">
            <text:p>36.0952380952381</text:p>
          </table:table-cell>
          <table:table-cell/>
          <table:table-cell office:value-type="float" office:value="58.5454545454545" calcext:value-type="float">
            <text:p>58.5454545454545</text:p>
          </table:table-cell>
        </table:table-row>
        <table:table-row table:style-name="ro1">
          <table:table-cell office:value-type="float" office:value="54.804347826087" calcext:value-type="float">
            <text:p>54.804347826087</text:p>
          </table:table-cell>
          <table:table-cell/>
          <table:table-cell office:value-type="float" office:value="58.5833333333333" calcext:value-type="float">
            <text:p>58.5833333333333</text:p>
          </table:table-cell>
        </table:table-row>
        <table:table-row table:style-name="ro1">
          <table:table-cell office:value-type="float" office:value="56.28" calcext:value-type="float">
            <text:p>56.28</text:p>
          </table:table-cell>
          <table:table-cell/>
          <table:table-cell office:value-type="float" office:value="58.5882352941176" calcext:value-type="float">
            <text:p>58.5882352941176</text:p>
          </table:table-cell>
        </table:table-row>
        <table:table-row table:style-name="ro1">
          <table:table-cell office:value-type="float" office:value="47.4166666666667" calcext:value-type="float">
            <text:p>47.4166666666667</text:p>
          </table:table-cell>
          <table:table-cell/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60.8947368421053" calcext:value-type="float">
            <text:p>60.8947368421053</text:p>
          </table:table-cell>
          <table:table-cell/>
          <table:table-cell office:value-type="float" office:value="58.6190476190476" calcext:value-type="float">
            <text:p>58.6190476190476</text:p>
          </table:table-cell>
        </table:table-row>
        <table:table-row table:style-name="ro1">
          <table:table-cell office:value-type="float" office:value="73.2432432432432" calcext:value-type="float">
            <text:p>73.2432432432432</text:p>
          </table:table-cell>
          <table:table-cell/>
          <table:table-cell office:value-type="float" office:value="58.64" calcext:value-type="float">
            <text:p>58.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33.9444444444444" calcext:value-type="float">
            <text:p>33.9444444444444</text:p>
          </table:table-cell>
          <table:table-cell/>
          <table:table-cell office:value-type="float" office:value="58.6521739130435" calcext:value-type="float">
            <text:p>58.6521739130435</text:p>
          </table:table-cell>
        </table:table-row>
        <table:table-row table:style-name="ro1">
          <table:table-cell office:value-type="float" office:value="61.34375" calcext:value-type="float">
            <text:p>61.34375</text:p>
          </table:table-cell>
          <table:table-cell/>
          <table:table-cell office:value-type="float" office:value="58.7333333333333" calcext:value-type="float">
            <text:p>58.7333333333333</text:p>
          </table:table-cell>
        </table:table-row>
        <table:table-row table:style-name="ro1">
          <table:table-cell office:value-type="float" office:value="43.2222222222222" calcext:value-type="float">
            <text:p>43.2222222222222</text:p>
          </table:table-cell>
          <table:table-cell/>
          <table:table-cell office:value-type="float" office:value="58.7692307692308" calcext:value-type="float">
            <text:p>58.7692307692308</text:p>
          </table:table-cell>
        </table:table-row>
        <table:table-row table:style-name="ro1">
          <table:table-cell office:value-type="float" office:value="28.525" calcext:value-type="float">
            <text:p>28.525</text:p>
          </table:table-cell>
          <table:table-cell/>
          <table:table-cell office:value-type="float" office:value="58.7741935483871" calcext:value-type="float">
            <text:p>58.7741935483871</text:p>
          </table:table-cell>
        </table:table-row>
        <table:table-row table:style-name="ro1">
          <table:table-cell office:value-type="float" office:value="56.8695652173913" calcext:value-type="float">
            <text:p>56.8695652173913</text:p>
          </table:table-cell>
          <table:table-cell/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55.9090909090909" calcext:value-type="float">
            <text:p>55.9090909090909</text:p>
          </table:table-cell>
          <table:table-cell/>
          <table:table-cell office:value-type="float" office:value="58.8148148148148" calcext:value-type="float">
            <text:p>58.8148148148148</text:p>
          </table:table-cell>
        </table:table-row>
        <table:table-row table:style-name="ro1">
          <table:table-cell office:value-type="float" office:value="42.1785714285714" calcext:value-type="float">
            <text:p>42.1785714285714</text:p>
          </table:table-cell>
          <table:table-cell/>
          <table:table-cell office:value-type="float" office:value="58.8181818181818" calcext:value-type="float">
            <text:p>58.8181818181818</text:p>
          </table:table-cell>
        </table:table-row>
        <table:table-row table:style-name="ro1">
          <table:table-cell office:value-type="float" office:value="50.0434782608696" calcext:value-type="float">
            <text:p>50.0434782608696</text:p>
          </table:table-cell>
          <table:table-cell/>
          <table:table-cell office:value-type="float" office:value="58.8181818181818" calcext:value-type="float">
            <text:p>58.8181818181818</text:p>
          </table:table-cell>
        </table:table-row>
        <table:table-row table:style-name="ro1">
          <table:table-cell office:value-type="float" office:value="53.8636363636364" calcext:value-type="float">
            <text:p>53.8636363636364</text:p>
          </table:table-cell>
          <table:table-cell/>
          <table:table-cell office:value-type="float" office:value="58.8260869565217" calcext:value-type="float">
            <text:p>58.8260869565217</text:p>
          </table:table-cell>
        </table:table-row>
        <table:table-row table:style-name="ro1">
          <table:table-cell office:value-type="float" office:value="27.7586206896552" calcext:value-type="float">
            <text:p>27.7586206896552</text:p>
          </table:table-cell>
          <table:table-cell/>
          <table:table-cell office:value-type="float" office:value="58.8315789473684" calcext:value-type="float">
            <text:p>58.8315789473684</text:p>
          </table:table-cell>
        </table:table-row>
        <table:table-row table:style-name="ro1">
          <table:table-cell office:value-type="float" office:value="40.9666666666667" calcext:value-type="float">
            <text:p>40.9666666666667</text:p>
          </table:table-cell>
          <table:table-cell/>
          <table:table-cell office:value-type="float" office:value="58.8787878787879" calcext:value-type="float">
            <text:p>58.8787878787879</text:p>
          </table:table-cell>
        </table:table-row>
        <table:table-row table:style-name="ro1">
          <table:table-cell office:value-type="float" office:value="62.9230769230769" calcext:value-type="float">
            <text:p>62.9230769230769</text:p>
          </table:table-cell>
          <table:table-cell/>
          <table:table-cell office:value-type="float" office:value="58.8888888888889" calcext:value-type="float">
            <text:p>58.8888888888889</text:p>
          </table:table-cell>
        </table:table-row>
        <table:table-row table:style-name="ro1">
          <table:table-cell office:value-type="float" office:value="89.6363636363637" calcext:value-type="float">
            <text:p>89.6363636363637</text:p>
          </table:table-cell>
          <table:table-cell/>
          <table:table-cell office:value-type="float" office:value="58.8947368421053" calcext:value-type="float">
            <text:p>58.8947368421053</text:p>
          </table:table-cell>
        </table:table-row>
        <table:table-row table:style-name="ro1">
          <table:table-cell office:value-type="float" office:value="65.6060606060606" calcext:value-type="float">
            <text:p>65.6060606060606</text:p>
          </table:table-cell>
          <table:table-cell/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62.8260869565217" calcext:value-type="float">
            <text:p>62.8260869565217</text:p>
          </table:table-cell>
          <table:table-cell/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45.2592592592593" calcext:value-type="float">
            <text:p>45.2592592592593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.0330578512397" calcext:value-type="float">
            <text:p>56.033057851239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.2142857142857" calcext:value-type="float">
            <text:p>61.214285714285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.5686274509804" calcext:value-type="float">
            <text:p>43.568627450980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.8461538461538" calcext:value-type="float">
            <text:p>44.8461538461538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.5277777777778" calcext:value-type="float">
            <text:p>51.5277777777778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.6086956521739" calcext:value-type="float">
            <text:p>70.6086956521739</text:p>
          </table:table-cell>
          <table:table-cell/>
          <table:table-cell office:value-type="float" office:value="59.0222222222222" calcext:value-type="float">
            <text:p>59.022222222222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59.0227272727273" calcext:value-type="float">
            <text:p>59.0227272727273</text:p>
          </table:table-cell>
        </table:table-row>
        <table:table-row table:style-name="ro1">
          <table:table-cell office:value-type="float" office:value="47.0512820512821" calcext:value-type="float">
            <text:p>47.0512820512821</text:p>
          </table:table-cell>
          <table:table-cell/>
          <table:table-cell office:value-type="float" office:value="59.0454545454545" calcext:value-type="float">
            <text:p>59.0454545454545</text:p>
          </table:table-cell>
        </table:table-row>
        <table:table-row table:style-name="ro1">
          <table:table-cell office:value-type="float" office:value="29.0333333333333" calcext:value-type="float">
            <text:p>29.0333333333333</text:p>
          </table:table-cell>
          <table:table-cell/>
          <table:table-cell office:value-type="float" office:value="59.0555555555556" calcext:value-type="float">
            <text:p>59.0555555555556</text:p>
          </table:table-cell>
        </table:table-row>
        <table:table-row table:style-name="ro1">
          <table:table-cell office:value-type="float" office:value="25.9444444444444" calcext:value-type="float">
            <text:p>25.9444444444444</text:p>
          </table:table-cell>
          <table:table-cell/>
          <table:table-cell office:value-type="float" office:value="59.0740740740741" calcext:value-type="float">
            <text:p>59.0740740740741</text:p>
          </table:table-cell>
        </table:table-row>
        <table:table-row table:style-name="ro1">
          <table:table-cell office:value-type="float" office:value="49.0952380952381" calcext:value-type="float">
            <text:p>49.0952380952381</text:p>
          </table:table-cell>
          <table:table-cell/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9.1333333333333" calcext:value-type="float">
            <text:p>59.1333333333333</text:p>
          </table:table-cell>
        </table:table-row>
        <table:table-row table:style-name="ro1">
          <table:table-cell office:value-type="float" office:value="12.2647058823529" calcext:value-type="float">
            <text:p>12.2647058823529</text:p>
          </table:table-cell>
          <table:table-cell/>
          <table:table-cell office:value-type="float" office:value="59.1428571428571" calcext:value-type="float">
            <text:p>59.1428571428571</text:p>
          </table:table-cell>
        </table:table-row>
        <table:table-row table:style-name="ro1">
          <table:table-cell office:value-type="float" office:value="37.1666666666667" calcext:value-type="float">
            <text:p>37.1666666666667</text:p>
          </table:table-cell>
          <table:table-cell/>
          <table:table-cell office:value-type="float" office:value="59.1764705882353" calcext:value-type="float">
            <text:p>59.1764705882353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/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35.1538461538462" calcext:value-type="float">
            <text:p>35.1538461538462</text:p>
          </table:table-cell>
          <table:table-cell/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56.0909090909091" calcext:value-type="float">
            <text:p>56.0909090909091</text:p>
          </table:table-cell>
          <table:table-cell/>
          <table:table-cell office:value-type="float" office:value="59.2307692307692" calcext:value-type="float">
            <text:p>59.2307692307692</text:p>
          </table:table-cell>
        </table:table-row>
        <table:table-row table:style-name="ro1">
          <table:table-cell office:value-type="float" office:value="75.1052631578947" calcext:value-type="float">
            <text:p>75.1052631578947</text:p>
          </table:table-cell>
          <table:table-cell/>
          <table:table-cell office:value-type="float" office:value="59.2352941176471" calcext:value-type="float">
            <text:p>59.2352941176471</text:p>
          </table:table-cell>
        </table:table-row>
        <table:table-row table:style-name="ro1">
          <table:table-cell office:value-type="float" office:value="52.0625" calcext:value-type="float">
            <text:p>52.0625</text:p>
          </table:table-cell>
          <table:table-cell/>
          <table:table-cell office:value-type="float" office:value="59.2461538461538" calcext:value-type="float">
            <text:p>59.2461538461538</text:p>
          </table:table-cell>
        </table:table-row>
        <table:table-row table:style-name="ro1">
          <table:table-cell office:value-type="float" office:value="38.8833333333333" calcext:value-type="float">
            <text:p>38.8833333333333</text:p>
          </table:table-cell>
          <table:table-cell/>
          <table:table-cell office:value-type="float" office:value="59.25" calcext:value-type="float">
            <text:p>59.25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/>
          <table:table-cell office:value-type="float" office:value="59.3157894736842" calcext:value-type="float">
            <text:p>59.3157894736842</text:p>
          </table:table-cell>
        </table:table-row>
        <table:table-row table:style-name="ro1">
          <table:table-cell office:value-type="float" office:value="56.5833333333333" calcext:value-type="float">
            <text:p>56.5833333333333</text:p>
          </table:table-cell>
          <table:table-cell/>
          <table:table-cell office:value-type="float" office:value="59.3333333333333" calcext:value-type="float">
            <text:p>59.3333333333333</text:p>
          </table:table-cell>
        </table:table-row>
        <table:table-row table:style-name="ro1">
          <table:table-cell office:value-type="float" office:value="67.3636363636364" calcext:value-type="float">
            <text:p>67.3636363636364</text:p>
          </table:table-cell>
          <table:table-cell/>
          <table:table-cell office:value-type="float" office:value="59.3333333333333" calcext:value-type="float">
            <text:p>59.3333333333333</text:p>
          </table:table-cell>
        </table:table-row>
        <table:table-row table:style-name="ro1">
          <table:table-cell office:value-type="float" office:value="43.1666666666667" calcext:value-type="float">
            <text:p>43.1666666666667</text:p>
          </table:table-cell>
          <table:table-cell/>
          <table:table-cell office:value-type="float" office:value="59.3333333333333" calcext:value-type="float">
            <text:p>59.3333333333333</text:p>
          </table:table-cell>
        </table:table-row>
        <table:table-row table:style-name="ro1">
          <table:table-cell office:value-type="float" office:value="53.2682926829268" calcext:value-type="float">
            <text:p>53.2682926829268</text:p>
          </table:table-cell>
          <table:table-cell/>
          <table:table-cell office:value-type="float" office:value="59.3333333333333" calcext:value-type="float">
            <text:p>59.3333333333333</text:p>
          </table:table-cell>
        </table:table-row>
        <table:table-row table:style-name="ro1">
          <table:table-cell office:value-type="float" office:value="49.4782608695652" calcext:value-type="float">
            <text:p>49.4782608695652</text:p>
          </table:table-cell>
          <table:table-cell/>
          <table:table-cell office:value-type="float" office:value="59.3478260869565" calcext:value-type="float">
            <text:p>59.3478260869565</text:p>
          </table:table-cell>
        </table:table-row>
        <table:table-row table:style-name="ro1">
          <table:table-cell office:value-type="float" office:value="61.4444444444444" calcext:value-type="float">
            <text:p>61.4444444444444</text:p>
          </table:table-cell>
          <table:table-cell/>
          <table:table-cell office:value-type="float" office:value="59.3571428571429" calcext:value-type="float">
            <text:p>59.3571428571429</text:p>
          </table:table-cell>
        </table:table-row>
        <table:table-row table:style-name="ro1">
          <table:table-cell office:value-type="float" office:value="51.0606060606061" calcext:value-type="float">
            <text:p>51.0606060606061</text:p>
          </table:table-cell>
          <table:table-cell/>
          <table:table-cell office:value-type="float" office:value="59.3684210526316" calcext:value-type="float">
            <text:p>59.3684210526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.4324324324324" calcext:value-type="float">
            <text:p>59.432432432432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/>
          <table:table-cell office:value-type="float" office:value="59.5333333333333" calcext:value-type="float">
            <text:p>59.5333333333333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/>
          <table:table-cell office:value-type="float" office:value="59.6111111111111" calcext:value-type="float">
            <text:p>59.6111111111111</text:p>
          </table:table-cell>
        </table:table-row>
        <table:table-row table:style-name="ro1">
          <table:table-cell office:value-type="float" office:value="45.1904761904762" calcext:value-type="float">
            <text:p>45.1904761904762</text:p>
          </table:table-cell>
          <table:table-cell/>
          <table:table-cell office:value-type="float" office:value="59.6428571428571" calcext:value-type="float">
            <text:p>59.6428571428571</text:p>
          </table:table-cell>
        </table:table-row>
        <table:table-row table:style-name="ro1">
          <table:table-cell office:value-type="float" office:value="69.4166666666667" calcext:value-type="float">
            <text:p>69.4166666666667</text:p>
          </table:table-cell>
          <table:table-cell/>
          <table:table-cell office:value-type="float" office:value="59.6842105263158" calcext:value-type="float">
            <text:p>59.6842105263158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/>
          <table:table-cell office:value-type="float" office:value="59.6888888888889" calcext:value-type="float">
            <text:p>59.6888888888889</text:p>
          </table:table-cell>
        </table:table-row>
        <table:table-row table:style-name="ro1">
          <table:table-cell office:value-type="float" office:value="55.5454545454546" calcext:value-type="float">
            <text:p>55.5454545454546</text:p>
          </table:table-cell>
          <table:table-cell/>
          <table:table-cell office:value-type="float" office:value="59.7254901960784" calcext:value-type="float">
            <text:p>59.7254901960784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/>
          <table:table-cell office:value-type="float" office:value="59.7333333333333" calcext:value-type="float">
            <text:p>59.73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/>
          <table:table-cell office:value-type="float" office:value="59.7692307692308" calcext:value-type="float">
            <text:p>59.7692307692308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/>
          <table:table-cell office:value-type="float" office:value="59.8333333333333" calcext:value-type="float">
            <text:p>59.833333333333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/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79.0909090909091" calcext:value-type="float">
            <text:p>79.0909090909091</text:p>
          </table:table-cell>
          <table:table-cell/>
          <table:table-cell office:value-type="float" office:value="59.9090909090909" calcext:value-type="float">
            <text:p>59.9090909090909</text:p>
          </table:table-cell>
        </table:table-row>
        <table:table-row table:style-name="ro1">
          <table:table-cell office:value-type="float" office:value="43.6923076923077" calcext:value-type="float">
            <text:p>43.6923076923077</text:p>
          </table:table-cell>
          <table:table-cell/>
          <table:table-cell office:value-type="float" office:value="59.9333333333333" calcext:value-type="float">
            <text:p>59.9333333333333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/>
          <table:table-cell office:value-type="float" office:value="59.9354838709678" calcext:value-type="float">
            <text:p>59.9354838709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9.9761904761905" calcext:value-type="float">
            <text:p>59.97619047619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/>
          <table:table-cell office:value-type="float" office:value="60.0263157894737" calcext:value-type="float">
            <text:p>60.0263157894737</text:p>
          </table:table-cell>
        </table:table-row>
        <table:table-row table:style-name="ro1">
          <table:table-cell office:value-type="float" office:value="32.3163265306122" calcext:value-type="float">
            <text:p>32.3163265306122</text:p>
          </table:table-cell>
          <table:table-cell/>
          <table:table-cell office:value-type="float" office:value="60.085201793722" calcext:value-type="float">
            <text:p>60.085201793722</text:p>
          </table:table-cell>
        </table:table-row>
        <table:table-row table:style-name="ro1">
          <table:table-cell office:value-type="float" office:value="58.2307692307692" calcext:value-type="float">
            <text:p>58.2307692307692</text:p>
          </table:table-cell>
          <table:table-cell/>
          <table:table-cell office:value-type="float" office:value="60.1153846153846" calcext:value-type="float">
            <text:p>60.1153846153846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/>
          <table:table-cell office:value-type="float" office:value="60.1206896551724" calcext:value-type="float">
            <text:p>60.1206896551724</text:p>
          </table:table-cell>
        </table:table-row>
        <table:table-row table:style-name="ro1">
          <table:table-cell office:value-type="float" office:value="66.2307692307692" calcext:value-type="float">
            <text:p>66.2307692307692</text:p>
          </table:table-cell>
          <table:table-cell/>
          <table:table-cell office:value-type="float" office:value="60.1320754716981" calcext:value-type="float">
            <text:p>60.1320754716981</text:p>
          </table:table-cell>
        </table:table-row>
        <table:table-row table:style-name="ro1">
          <table:table-cell office:value-type="float" office:value="35.7666666666667" calcext:value-type="float">
            <text:p>35.7666666666667</text:p>
          </table:table-cell>
          <table:table-cell/>
          <table:table-cell office:value-type="float" office:value="60.1428571428571" calcext:value-type="float">
            <text:p>60.1428571428571</text:p>
          </table:table-cell>
        </table:table-row>
        <table:table-row table:style-name="ro1">
          <table:table-cell office:value-type="float" office:value="66.2666666666667" calcext:value-type="float">
            <text:p>66.2666666666667</text:p>
          </table:table-cell>
          <table:table-cell/>
          <table:table-cell office:value-type="float" office:value="60.1666666666667" calcext:value-type="float">
            <text:p>60.1666666666667</text:p>
          </table:table-cell>
        </table:table-row>
        <table:table-row table:style-name="ro1">
          <table:table-cell office:value-type="float" office:value="59.3571428571429" calcext:value-type="float">
            <text:p>59.3571428571429</text:p>
          </table:table-cell>
          <table:table-cell/>
          <table:table-cell office:value-type="float" office:value="60.1764705882353" calcext:value-type="float">
            <text:p>60.1764705882353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/>
          <table:table-cell office:value-type="float" office:value="60.1951219512195" calcext:value-type="float">
            <text:p>60.1951219512195</text:p>
          </table:table-cell>
        </table:table-row>
        <table:table-row table:style-name="ro1">
          <table:table-cell office:value-type="float" office:value="41.0285714285714" calcext:value-type="float">
            <text:p>41.0285714285714</text:p>
          </table:table-cell>
          <table:table-cell/>
          <table:table-cell office:value-type="float" office:value="60.2727272727273" calcext:value-type="float">
            <text:p>60.2727272727273</text:p>
          </table:table-cell>
        </table:table-row>
        <table:table-row table:style-name="ro1">
          <table:table-cell office:value-type="float" office:value="52.037037037037" calcext:value-type="float">
            <text:p>52.037037037037</text:p>
          </table:table-cell>
          <table:table-cell/>
          <table:table-cell office:value-type="float" office:value="60.2777777777778" calcext:value-type="float">
            <text:p>60.27777777777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0.3076923076923" calcext:value-type="float">
            <text:p>60.3076923076923</text:p>
          </table:table-cell>
        </table:table-row>
        <table:table-row table:style-name="ro1">
          <table:table-cell office:value-type="float" office:value="50.9444444444444" calcext:value-type="float">
            <text:p>50.9444444444444</text:p>
          </table:table-cell>
          <table:table-cell/>
          <table:table-cell office:value-type="float" office:value="60.3157894736842" calcext:value-type="float">
            <text:p>60.3157894736842</text:p>
          </table:table-cell>
        </table:table-row>
        <table:table-row table:style-name="ro1">
          <table:table-cell office:value-type="float" office:value="68.2222222222222" calcext:value-type="float">
            <text:p>68.2222222222222</text:p>
          </table:table-cell>
          <table:table-cell/>
          <table:table-cell office:value-type="float" office:value="60.3181818181818" calcext:value-type="float">
            <text:p>60.3181818181818</text:p>
          </table:table-cell>
        </table:table-row>
        <table:table-row table:style-name="ro1">
          <table:table-cell office:value-type="float" office:value="57.0625" calcext:value-type="float">
            <text:p>57.0625</text:p>
          </table:table-cell>
          <table:table-cell/>
          <table:table-cell office:value-type="float" office:value="60.3333333333333" calcext:value-type="float">
            <text:p>60.3333333333333</text:p>
          </table:table-cell>
        </table:table-row>
        <table:table-row table:style-name="ro1">
          <table:table-cell office:value-type="float" office:value="45.3809523809524" calcext:value-type="float">
            <text:p>45.3809523809524</text:p>
          </table:table-cell>
          <table:table-cell/>
          <table:table-cell office:value-type="float" office:value="60.3333333333333" calcext:value-type="float">
            <text:p>60.3333333333333</text:p>
          </table:table-cell>
        </table:table-row>
        <table:table-row table:style-name="ro1">
          <table:table-cell office:value-type="float" office:value="49.8979591836735" calcext:value-type="float">
            <text:p>49.8979591836735</text:p>
          </table:table-cell>
          <table:table-cell/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60.4166666666667" calcext:value-type="float">
            <text:p>60.4166666666667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/>
          <table:table-cell office:value-type="float" office:value="60.4186046511628" calcext:value-type="float">
            <text:p>60.4186046511628</text:p>
          </table:table-cell>
        </table:table-row>
        <table:table-row table:style-name="ro1">
          <table:table-cell office:value-type="float" office:value="56.9615384615385" calcext:value-type="float">
            <text:p>56.9615384615385</text:p>
          </table:table-cell>
          <table:table-cell/>
          <table:table-cell office:value-type="float" office:value="60.4347826086956" calcext:value-type="float">
            <text:p>60.4347826086956</text:p>
          </table:table-cell>
        </table:table-row>
        <table:table-row table:style-name="ro1">
          <table:table-cell office:value-type="float" office:value="42.1415094339623" calcext:value-type="float">
            <text:p>42.1415094339623</text:p>
          </table:table-cell>
          <table:table-cell/>
          <table:table-cell office:value-type="float" office:value="60.4545454545455" calcext:value-type="float">
            <text:p>60.4545454545455</text:p>
          </table:table-cell>
        </table:table-row>
        <table:table-row table:style-name="ro1">
          <table:table-cell office:value-type="float" office:value="43.2222222222222" calcext:value-type="float">
            <text:p>43.2222222222222</text:p>
          </table:table-cell>
          <table:table-cell/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50.2153846153846" calcext:value-type="float">
            <text:p>50.2153846153846</text:p>
          </table:table-cell>
          <table:table-cell/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52.2727272727273" calcext:value-type="float">
            <text:p>52.2727272727273</text:p>
          </table:table-cell>
          <table:table-cell/>
          <table:table-cell office:value-type="float" office:value="60.5333333333333" calcext:value-type="float">
            <text:p>60.5333333333333</text:p>
          </table:table-cell>
        </table:table-row>
        <table:table-row table:style-name="ro1">
          <table:table-cell office:value-type="float" office:value="47.3181818181818" calcext:value-type="float">
            <text:p>47.3181818181818</text:p>
          </table:table-cell>
          <table:table-cell/>
          <table:table-cell office:value-type="float" office:value="60.5454545454546" calcext:value-type="float">
            <text:p>60.5454545454546</text:p>
          </table:table-cell>
        </table:table-row>
        <table:table-row table:style-name="ro1">
          <table:table-cell office:value-type="float" office:value="51.0666666666667" calcext:value-type="float">
            <text:p>51.0666666666667</text:p>
          </table:table-cell>
          <table:table-cell/>
          <table:table-cell office:value-type="float" office:value="60.5555555555556" calcext:value-type="float">
            <text:p>60.5555555555556</text:p>
          </table:table-cell>
        </table:table-row>
        <table:table-row table:style-name="ro1">
          <table:table-cell office:value-type="float" office:value="61.625" calcext:value-type="float">
            <text:p>61.625</text:p>
          </table:table-cell>
          <table:table-cell/>
          <table:table-cell office:value-type="float" office:value="60.5833333333333" calcext:value-type="float">
            <text:p>60.5833333333333</text:p>
          </table:table-cell>
        </table:table-row>
        <table:table-row table:style-name="ro1">
          <table:table-cell office:value-type="float" office:value="43.4736842105263" calcext:value-type="float">
            <text:p>43.4736842105263</text:p>
          </table:table-cell>
          <table:table-cell/>
          <table:table-cell office:value-type="float" office:value="60.6153846153846" calcext:value-type="float">
            <text:p>60.6153846153846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/>
          <table:table-cell office:value-type="float" office:value="60.6363636363636" calcext:value-type="float">
            <text:p>60.6363636363636</text:p>
          </table:table-cell>
        </table:table-row>
        <table:table-row table:style-name="ro1">
          <table:table-cell office:value-type="float" office:value="53.2608695652174" calcext:value-type="float">
            <text:p>53.2608695652174</text:p>
          </table:table-cell>
          <table:table-cell/>
          <table:table-cell office:value-type="float" office:value="60.6470588235294" calcext:value-type="float">
            <text:p>60.64705882352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0.65" calcext:value-type="float">
            <text:p>60.65</text:p>
          </table:table-cell>
        </table:table-row>
        <table:table-row table:style-name="ro1">
          <table:table-cell office:value-type="float" office:value="29.7260273972603" calcext:value-type="float">
            <text:p>29.7260273972603</text:p>
          </table:table-cell>
          <table:table-cell/>
          <table:table-cell office:value-type="float" office:value="60.6666666666667" calcext:value-type="float">
            <text:p>60.6666666666667</text:p>
          </table:table-cell>
        </table:table-row>
        <table:table-row table:style-name="ro1">
          <table:table-cell office:value-type="float" office:value="66.7857142857143" calcext:value-type="float">
            <text:p>66.7857142857143</text:p>
          </table:table-cell>
          <table:table-cell/>
          <table:table-cell office:value-type="float" office:value="60.6666666666667" calcext:value-type="float">
            <text:p>60.6666666666667</text:p>
          </table:table-cell>
        </table:table-row>
        <table:table-row table:style-name="ro1">
          <table:table-cell office:value-type="float" office:value="53.5294117647059" calcext:value-type="float">
            <text:p>53.5294117647059</text:p>
          </table:table-cell>
          <table:table-cell/>
          <table:table-cell office:value-type="float" office:value="60.7096774193548" calcext:value-type="float">
            <text:p>60.7096774193548</text:p>
          </table:table-cell>
        </table:table-row>
        <table:table-row table:style-name="ro1">
          <table:table-cell office:value-type="float" office:value="55.4705882352941" calcext:value-type="float">
            <text:p>55.4705882352941</text:p>
          </table:table-cell>
          <table:table-cell/>
          <table:table-cell office:value-type="float" office:value="60.7279635258359" calcext:value-type="float">
            <text:p>60.7279635258359</text:p>
          </table:table-cell>
        </table:table-row>
        <table:table-row table:style-name="ro1">
          <table:table-cell office:value-type="float" office:value="43.4186046511628" calcext:value-type="float">
            <text:p>43.4186046511628</text:p>
          </table:table-cell>
          <table:table-cell/>
          <table:table-cell office:value-type="float" office:value="60.7777777777778" calcext:value-type="float">
            <text:p>60.7777777777778</text:p>
          </table:table-cell>
        </table:table-row>
        <table:table-row table:style-name="ro1">
          <table:table-cell office:value-type="float" office:value="36.1833333333333" calcext:value-type="float">
            <text:p>36.1833333333333</text:p>
          </table:table-cell>
          <table:table-cell/>
          <table:table-cell office:value-type="float" office:value="60.8064516129032" calcext:value-type="float">
            <text:p>60.806451612903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/>
          <table:table-cell office:value-type="float" office:value="60.8076923076923" calcext:value-type="float">
            <text:p>60.8076923076923</text:p>
          </table:table-cell>
        </table:table-row>
        <table:table-row table:style-name="ro1">
          <table:table-cell office:value-type="float" office:value="49.7096774193548" calcext:value-type="float">
            <text:p>49.7096774193548</text:p>
          </table:table-cell>
          <table:table-cell/>
          <table:table-cell office:value-type="float" office:value="60.8666666666667" calcext:value-type="float">
            <text:p>60.8666666666667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/>
          <table:table-cell office:value-type="float" office:value="60.8947368421053" calcext:value-type="float">
            <text:p>60.8947368421053</text:p>
          </table:table-cell>
        </table:table-row>
        <table:table-row table:style-name="ro1">
          <table:table-cell office:value-type="float" office:value="52.3478260869565" calcext:value-type="float">
            <text:p>52.3478260869565</text:p>
          </table:table-cell>
          <table:table-cell/>
          <table:table-cell office:value-type="float" office:value="60.9117647058824" calcext:value-type="float">
            <text:p>60.9117647058824</text:p>
          </table:table-cell>
        </table:table-row>
        <table:table-row table:style-name="ro1">
          <table:table-cell office:value-type="float" office:value="57.1935483870968" calcext:value-type="float">
            <text:p>57.1935483870968</text:p>
          </table:table-cell>
          <table:table-cell/>
          <table:table-cell office:value-type="float" office:value="60.9310344827586" calcext:value-type="float">
            <text:p>60.9310344827586</text:p>
          </table:table-cell>
        </table:table-row>
        <table:table-row table:style-name="ro1">
          <table:table-cell office:value-type="float" office:value="46.0526315789474" calcext:value-type="float">
            <text:p>46.0526315789474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.2857142857143" calcext:value-type="float">
            <text:p>22.2857142857143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6.2631578947368" calcext:value-type="float">
            <text:p>46.2631578947368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.7916666666667" calcext:value-type="float">
            <text:p>36.7916666666667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.1320754716981" calcext:value-type="float">
            <text:p>60.132075471698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.3030303030303" calcext:value-type="float">
            <text:p>69.3030303030303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/>
          <table:table-cell office:value-type="float" office:value="61.1029411764706" calcext:value-type="float">
            <text:p>61.1029411764706</text:p>
          </table:table-cell>
        </table:table-row>
        <table:table-row table:style-name="ro1">
          <table:table-cell office:value-type="float" office:value="53.7692307692308" calcext:value-type="float">
            <text:p>53.7692307692308</text:p>
          </table:table-cell>
          <table:table-cell/>
          <table:table-cell office:value-type="float" office:value="61.1612903225806" calcext:value-type="float">
            <text:p>61.161290322580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/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61.2417582417582" calcext:value-type="float">
            <text:p>61.2417582417582</text:p>
          </table:table-cell>
          <table:table-cell/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40.5434782608696" calcext:value-type="float">
            <text:p>40.5434782608696</text:p>
          </table:table-cell>
          <table:table-cell/>
          <table:table-cell office:value-type="float" office:value="61.2142857142857" calcext:value-type="float">
            <text:p>61.2142857142857</text:p>
          </table:table-cell>
        </table:table-row>
        <table:table-row table:style-name="ro1">
          <table:table-cell office:value-type="float" office:value="38.2790697674419" calcext:value-type="float">
            <text:p>38.2790697674419</text:p>
          </table:table-cell>
          <table:table-cell/>
          <table:table-cell office:value-type="float" office:value="61.2272727272727" calcext:value-type="float">
            <text:p>61.2272727272727</text:p>
          </table:table-cell>
        </table:table-row>
        <table:table-row table:style-name="ro1">
          <table:table-cell office:value-type="float" office:value="46.2727272727273" calcext:value-type="float">
            <text:p>46.2727272727273</text:p>
          </table:table-cell>
          <table:table-cell/>
          <table:table-cell office:value-type="float" office:value="61.2417582417582" calcext:value-type="float">
            <text:p>61.2417582417582</text:p>
          </table:table-cell>
        </table:table-row>
        <table:table-row table:style-name="ro1">
          <table:table-cell office:value-type="float" office:value="41.1842105263158" calcext:value-type="float">
            <text:p>41.1842105263158</text:p>
          </table:table-cell>
          <table:table-cell/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84.05" calcext:value-type="float">
            <text:p>84.05</text:p>
          </table:table-cell>
          <table:table-cell/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63.6875" calcext:value-type="float">
            <text:p>63.6875</text:p>
          </table:table-cell>
          <table:table-cell/>
          <table:table-cell office:value-type="float" office:value="61.28" calcext:value-type="float">
            <text:p>61.28</text:p>
          </table:table-cell>
        </table:table-row>
        <table:table-row table:style-name="ro1">
          <table:table-cell office:value-type="float" office:value="49.5217391304348" calcext:value-type="float">
            <text:p>49.5217391304348</text:p>
          </table:table-cell>
          <table:table-cell/>
          <table:table-cell office:value-type="float" office:value="61.2903225806452" calcext:value-type="float">
            <text:p>61.2903225806452</text:p>
          </table:table-cell>
        </table:table-row>
        <table:table-row table:style-name="ro1">
          <table:table-cell office:value-type="float" office:value="56.0693069306931" calcext:value-type="float">
            <text:p>56.0693069306931</text:p>
          </table:table-cell>
          <table:table-cell/>
          <table:table-cell office:value-type="float" office:value="61.2916666666667" calcext:value-type="float">
            <text:p>61.2916666666667</text:p>
          </table:table-cell>
        </table:table-row>
        <table:table-row table:style-name="ro1">
          <table:table-cell office:value-type="float" office:value="29.4739130434783" calcext:value-type="float">
            <text:p>29.4739130434783</text:p>
          </table:table-cell>
          <table:table-cell/>
          <table:table-cell office:value-type="float" office:value="61.304347826087" calcext:value-type="float">
            <text:p>61.304347826087</text:p>
          </table:table-cell>
        </table:table-row>
        <table:table-row table:style-name="ro1">
          <table:table-cell office:value-type="float" office:value="51.1818181818182" calcext:value-type="float">
            <text:p>51.1818181818182</text:p>
          </table:table-cell>
          <table:table-cell/>
          <table:table-cell office:value-type="float" office:value="61.3333333333333" calcext:value-type="float">
            <text:p>61.3333333333333</text:p>
          </table:table-cell>
        </table:table-row>
        <table:table-row table:style-name="ro1">
          <table:table-cell office:value-type="float" office:value="67.6086956521739" calcext:value-type="float">
            <text:p>67.6086956521739</text:p>
          </table:table-cell>
          <table:table-cell/>
          <table:table-cell office:value-type="float" office:value="61.3333333333333" calcext:value-type="float">
            <text:p>61.3333333333333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/>
          <table:table-cell office:value-type="float" office:value="61.3333333333333" calcext:value-type="float">
            <text:p>61.3333333333333</text:p>
          </table:table-cell>
        </table:table-row>
        <table:table-row table:style-name="ro1">
          <table:table-cell office:value-type="float" office:value="47.8333333333333" calcext:value-type="float">
            <text:p>47.8333333333333</text:p>
          </table:table-cell>
          <table:table-cell/>
          <table:table-cell office:value-type="float" office:value="61.34375" calcext:value-type="float">
            <text:p>61.34375</text:p>
          </table:table-cell>
        </table:table-row>
        <table:table-row table:style-name="ro1">
          <table:table-cell office:value-type="float" office:value="39.0952380952381" calcext:value-type="float">
            <text:p>39.0952380952381</text:p>
          </table:table-cell>
          <table:table-cell/>
          <table:table-cell office:value-type="float" office:value="61.3478260869565" calcext:value-type="float">
            <text:p>61.3478260869565</text:p>
          </table:table-cell>
        </table:table-row>
        <table:table-row table:style-name="ro1">
          <table:table-cell office:value-type="float" office:value="49.3488372093023" calcext:value-type="float">
            <text:p>49.3488372093023</text:p>
          </table:table-cell>
          <table:table-cell/>
          <table:table-cell office:value-type="float" office:value="61.3636363636364" calcext:value-type="float">
            <text:p>61.3636363636364</text:p>
          </table:table-cell>
        </table:table-row>
        <table:table-row table:style-name="ro1">
          <table:table-cell office:value-type="float" office:value="41.728813559322" calcext:value-type="float">
            <text:p>41.728813559322</text:p>
          </table:table-cell>
          <table:table-cell/>
          <table:table-cell office:value-type="float" office:value="61.3809523809524" calcext:value-type="float">
            <text:p>61.3809523809524</text:p>
          </table:table-cell>
        </table:table-row>
        <table:table-row table:style-name="ro1">
          <table:table-cell office:value-type="float" office:value="66.8983050847458" calcext:value-type="float">
            <text:p>66.8983050847458</text:p>
          </table:table-cell>
          <table:table-cell/>
          <table:table-cell office:value-type="float" office:value="61.4347826086957" calcext:value-type="float">
            <text:p>61.4347826086957</text:p>
          </table:table-cell>
        </table:table-row>
        <table:table-row table:style-name="ro1">
          <table:table-cell office:value-type="float" office:value="50.1666666666667" calcext:value-type="float">
            <text:p>50.1666666666667</text:p>
          </table:table-cell>
          <table:table-cell/>
          <table:table-cell office:value-type="float" office:value="61.4444444444444" calcext:value-type="float">
            <text:p>61.4444444444444</text:p>
          </table:table-cell>
        </table:table-row>
        <table:table-row table:style-name="ro1">
          <table:table-cell office:value-type="float" office:value="47.3333333333333" calcext:value-type="float">
            <text:p>47.3333333333333</text:p>
          </table:table-cell>
          <table:table-cell/>
          <table:table-cell office:value-type="float" office:value="61.5365853658537" calcext:value-type="float">
            <text:p>61.5365853658537</text:p>
          </table:table-cell>
        </table:table-row>
        <table:table-row table:style-name="ro1">
          <table:table-cell office:value-type="float" office:value="59.7333333333333" calcext:value-type="float">
            <text:p>59.7333333333333</text:p>
          </table:table-cell>
          <table:table-cell/>
          <table:table-cell office:value-type="float" office:value="61.5454545454545" calcext:value-type="float">
            <text:p>61.5454545454545</text:p>
          </table:table-cell>
        </table:table-row>
        <table:table-row table:style-name="ro1">
          <table:table-cell office:value-type="float" office:value="59.3157894736842" calcext:value-type="float">
            <text:p>59.3157894736842</text:p>
          </table:table-cell>
          <table:table-cell/>
          <table:table-cell office:value-type="float" office:value="61.5555555555556" calcext:value-type="float">
            <text:p>61.5555555555556</text:p>
          </table:table-cell>
        </table:table-row>
        <table:table-row table:style-name="ro1">
          <table:table-cell office:value-type="float" office:value="35.3636363636364" calcext:value-type="float">
            <text:p>35.3636363636364</text:p>
          </table:table-cell>
          <table:table-cell/>
          <table:table-cell office:value-type="float" office:value="61.6153846153846" calcext:value-type="float">
            <text:p>61.6153846153846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/>
          <table:table-cell office:value-type="float" office:value="61.6195652173913" calcext:value-type="float">
            <text:p>61.6195652173913</text:p>
          </table:table-cell>
        </table:table-row>
        <table:table-row table:style-name="ro1">
          <table:table-cell office:value-type="float" office:value="59.9333333333333" calcext:value-type="float">
            <text:p>59.9333333333333</text:p>
          </table:table-cell>
          <table:table-cell/>
          <table:table-cell office:value-type="float" office:value="61.625" calcext:value-type="float">
            <text:p>61.62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61.6470588235294" calcext:value-type="float">
            <text:p>61.6470588235294</text:p>
          </table:table-cell>
        </table:table-row>
        <table:table-row table:style-name="ro1">
          <table:table-cell office:value-type="float" office:value="37.7931034482759" calcext:value-type="float">
            <text:p>37.7931034482759</text:p>
          </table:table-cell>
          <table:table-cell/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1.7391304347826" calcext:value-type="float">
            <text:p>61.7391304347826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/>
          <table:table-cell office:value-type="float" office:value="61.8095238095238" calcext:value-type="float">
            <text:p>61.8095238095238</text:p>
          </table:table-cell>
        </table:table-row>
        <table:table-row table:style-name="ro1">
          <table:table-cell office:value-type="float" office:value="71.3333333333333" calcext:value-type="float">
            <text:p>71.3333333333333</text:p>
          </table:table-cell>
          <table:table-cell/>
          <table:table-cell office:value-type="float" office:value="61.8538461538462" calcext:value-type="float">
            <text:p>61.8538461538462</text:p>
          </table:table-cell>
        </table:table-row>
        <table:table-row table:style-name="ro1">
          <table:table-cell office:value-type="float" office:value="50.6666666666667" calcext:value-type="float">
            <text:p>50.6666666666667</text:p>
          </table:table-cell>
          <table:table-cell/>
          <table:table-cell office:value-type="float" office:value="61.875" calcext:value-type="float">
            <text:p>61.875</text:p>
          </table:table-cell>
        </table:table-row>
        <table:table-row table:style-name="ro1">
          <table:table-cell office:value-type="float" office:value="51.625" calcext:value-type="float">
            <text:p>51.625</text:p>
          </table:table-cell>
          <table:table-cell/>
          <table:table-cell office:value-type="float" office:value="61.8809523809524" calcext:value-type="float">
            <text:p>61.8809523809524</text:p>
          </table:table-cell>
        </table:table-row>
        <table:table-row table:style-name="ro1">
          <table:table-cell office:value-type="float" office:value="45.6190476190476" calcext:value-type="float">
            <text:p>45.6190476190476</text:p>
          </table:table-cell>
          <table:table-cell/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52.2857142857143" calcext:value-type="float">
            <text:p>52.2857142857143</text:p>
          </table:table-cell>
          <table:table-cell/>
          <table:table-cell office:value-type="float" office:value="61.9130434782609" calcext:value-type="float">
            <text:p>61.9130434782609</text:p>
          </table:table-cell>
        </table:table-row>
        <table:table-row table:style-name="ro1">
          <table:table-cell office:value-type="float" office:value="57.9411764705882" calcext:value-type="float">
            <text:p>57.9411764705882</text:p>
          </table:table-cell>
          <table:table-cell/>
          <table:table-cell office:value-type="float" office:value="61.9166666666667" calcext:value-type="float">
            <text:p>61.9166666666667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/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45.9047619047619" calcext:value-type="float">
            <text:p>45.9047619047619</text:p>
          </table:table-cell>
          <table:table-cell/>
          <table:table-cell office:value-type="float" office:value="61.9677419354839" calcext:value-type="float">
            <text:p>61.9677419354839</text:p>
          </table:table-cell>
        </table:table-row>
        <table:table-row table:style-name="ro1">
          <table:table-cell office:value-type="float" office:value="50.7352941176471" calcext:value-type="float">
            <text:p>50.7352941176471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.2857142857143" calcext:value-type="float">
            <text:p>69.2857142857143</text:p>
          </table:table-cell>
          <table:table-cell/>
          <table:table-cell office:value-type="float" office:value="62.0454545454546" calcext:value-type="float">
            <text:p>62.0454545454546</text:p>
          </table:table-cell>
        </table:table-row>
        <table:table-row table:style-name="ro1">
          <table:table-cell office:value-type="float" office:value="40.027027027027" calcext:value-type="float">
            <text:p>40.027027027027</text:p>
          </table:table-cell>
          <table:table-cell/>
          <table:table-cell office:value-type="float" office:value="62.125" calcext:value-type="float">
            <text:p>62.125</text:p>
          </table:table-cell>
        </table:table-row>
        <table:table-row table:style-name="ro1">
          <table:table-cell office:value-type="float" office:value="37.7586206896552" calcext:value-type="float">
            <text:p>37.7586206896552</text:p>
          </table:table-cell>
          <table:table-cell/>
          <table:table-cell office:value-type="float" office:value="62.1304347826087" calcext:value-type="float">
            <text:p>62.1304347826087</text:p>
          </table:table-cell>
        </table:table-row>
        <table:table-row table:style-name="ro1">
          <table:table-cell office:value-type="float" office:value="52.622641509434" calcext:value-type="float">
            <text:p>52.622641509434</text:p>
          </table:table-cell>
          <table:table-cell/>
          <table:table-cell office:value-type="float" office:value="62.1379310344828" calcext:value-type="float">
            <text:p>62.13793103448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48.5263157894737" calcext:value-type="float">
            <text:p>48.5263157894737</text:p>
          </table:table-cell>
          <table:table-cell/>
          <table:table-cell office:value-type="float" office:value="62.1904761904762" calcext:value-type="float">
            <text:p>62.190476190476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/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69.6666666666667" calcext:value-type="float">
            <text:p>69.6666666666667</text:p>
          </table:table-cell>
          <table:table-cell/>
          <table:table-cell office:value-type="float" office:value="62.2368421052632" calcext:value-type="float">
            <text:p>62.2368421052632</text:p>
          </table:table-cell>
        </table:table-row>
        <table:table-row table:style-name="ro1">
          <table:table-cell office:value-type="float" office:value="38.047619047619" calcext:value-type="float">
            <text:p>38.047619047619</text:p>
          </table:table-cell>
          <table:table-cell/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65.7272727272727" calcext:value-type="float">
            <text:p>65.7272727272727</text:p>
          </table:table-cell>
          <table:table-cell/>
          <table:table-cell office:value-type="float" office:value="62.2592592592593" calcext:value-type="float">
            <text:p>62.2592592592593</text:p>
          </table:table-cell>
        </table:table-row>
        <table:table-row table:style-name="ro1">
          <table:table-cell office:value-type="float" office:value="53.4090909090909" calcext:value-type="float">
            <text:p>53.4090909090909</text:p>
          </table:table-cell>
          <table:table-cell/>
          <table:table-cell office:value-type="float" office:value="62.2771739130435" calcext:value-type="float">
            <text:p>62.2771739130435</text:p>
          </table:table-cell>
        </table:table-row>
        <table:table-row table:style-name="ro1">
          <table:table-cell office:value-type="float" office:value="36.0096153846154" calcext:value-type="float">
            <text:p>36.0096153846154</text:p>
          </table:table-cell>
          <table:table-cell/>
          <table:table-cell office:value-type="float" office:value="62.3333333333333" calcext:value-type="float">
            <text:p>62.3333333333333</text:p>
          </table:table-cell>
        </table:table-row>
        <table:table-row table:style-name="ro1">
          <table:table-cell office:value-type="float" office:value="33.8571428571429" calcext:value-type="float">
            <text:p>33.8571428571429</text:p>
          </table:table-cell>
          <table:table-cell/>
          <table:table-cell office:value-type="float" office:value="62.3636363636364" calcext:value-type="float">
            <text:p>62.36363636363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2.3684210526316" calcext:value-type="float">
            <text:p>62.3684210526316</text:p>
          </table:table-cell>
        </table:table-row>
        <table:table-row table:style-name="ro1">
          <table:table-cell office:value-type="float" office:value="70.0869565217391" calcext:value-type="float">
            <text:p>70.0869565217391</text:p>
          </table:table-cell>
          <table:table-cell/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/>
          <table:table-cell office:value-type="float" office:value="62.4210526315789" calcext:value-type="float">
            <text:p>62.4210526315789</text:p>
          </table:table-cell>
        </table:table-row>
        <table:table-row table:style-name="ro1">
          <table:table-cell office:value-type="float" office:value="73.3333333333333" calcext:value-type="float">
            <text:p>73.3333333333333</text:p>
          </table:table-cell>
          <table:table-cell/>
          <table:table-cell office:value-type="float" office:value="62.4210526315789" calcext:value-type="float">
            <text:p>62.42105263157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6.4634146341463" calcext:value-type="float">
            <text:p>36.4634146341463</text:p>
          </table:table-cell>
          <table:table-cell/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54.675" calcext:value-type="float">
            <text:p>54.675</text:p>
          </table:table-cell>
          <table:table-cell/>
          <table:table-cell office:value-type="float" office:value="62.625" calcext:value-type="float">
            <text:p>62.625</text:p>
          </table:table-cell>
        </table:table-row>
        <table:table-row table:style-name="ro1">
          <table:table-cell office:value-type="float" office:value="67.0714285714286" calcext:value-type="float">
            <text:p>67.0714285714286</text:p>
          </table:table-cell>
          <table:table-cell/>
          <table:table-cell office:value-type="float" office:value="62.6538461538462" calcext:value-type="float">
            <text:p>62.6538461538462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/>
          <table:table-cell office:value-type="float" office:value="62.6666666666667" calcext:value-type="float">
            <text:p>62.6666666666667</text:p>
          </table:table-cell>
        </table:table-row>
        <table:table-row table:style-name="ro1">
          <table:table-cell office:value-type="float" office:value="74.1666666666667" calcext:value-type="float">
            <text:p>74.1666666666667</text:p>
          </table:table-cell>
          <table:table-cell/>
          <table:table-cell office:value-type="float" office:value="62.7333333333333" calcext:value-type="float">
            <text:p>62.7333333333333</text:p>
          </table:table-cell>
        </table:table-row>
        <table:table-row table:style-name="ro1">
          <table:table-cell office:value-type="float" office:value="67.3181818181818" calcext:value-type="float">
            <text:p>67.3181818181818</text:p>
          </table:table-cell>
          <table:table-cell/>
          <table:table-cell office:value-type="float" office:value="62.7777777777778" calcext:value-type="float">
            <text:p>62.7777777777778</text:p>
          </table:table-cell>
        </table:table-row>
        <table:table-row table:style-name="ro1">
          <table:table-cell office:value-type="float" office:value="67.4117647058823" calcext:value-type="float">
            <text:p>67.4117647058823</text:p>
          </table:table-cell>
          <table:table-cell/>
          <table:table-cell office:value-type="float" office:value="62.8260869565217" calcext:value-type="float">
            <text:p>62.8260869565217</text:p>
          </table:table-cell>
        </table:table-row>
        <table:table-row table:style-name="ro1">
          <table:table-cell office:value-type="float" office:value="42.7272727272727" calcext:value-type="float">
            <text:p>42.7272727272727</text:p>
          </table:table-cell>
          <table:table-cell/>
          <table:table-cell office:value-type="float" office:value="62.8571428571429" calcext:value-type="float">
            <text:p>62.85714285714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2.8888888888889" calcext:value-type="float">
            <text:p>62.8888888888889</text:p>
          </table:table-cell>
        </table:table-row>
        <table:table-row table:style-name="ro1">
          <table:table-cell office:value-type="float" office:value="67.9423076923077" calcext:value-type="float">
            <text:p>67.9423076923077</text:p>
          </table:table-cell>
          <table:table-cell/>
          <table:table-cell office:value-type="float" office:value="62.9230769230769" calcext:value-type="float">
            <text:p>62.9230769230769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/>
          <table:table-cell office:value-type="float" office:value="62.9285714285714" calcext:value-type="float">
            <text:p>62.92857142857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.9459459459459" calcext:value-type="float">
            <text:p>62.9459459459459</text:p>
          </table:table-cell>
        </table:table-row>
        <table:table-row table:style-name="ro1">
          <table:table-cell office:value-type="float" office:value="40.5185185185185" calcext:value-type="float">
            <text:p>40.5185185185185</text:p>
          </table:table-cell>
          <table:table-cell/>
          <table:table-cell office:value-type="float" office:value="62.9814814814815" calcext:value-type="float">
            <text:p>62.9814814814815</text:p>
          </table:table-cell>
        </table:table-row>
        <table:table-row table:style-name="ro1">
          <table:table-cell office:value-type="float" office:value="45.8305084745763" calcext:value-type="float">
            <text:p>45.8305084745763</text:p>
          </table:table-cell>
          <table:table-cell/>
          <table:table-cell office:value-type="float" office:value="62.984375" calcext:value-type="float">
            <text:p>62.9843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.9811320754717" calcext:value-type="float">
            <text:p>32.9811320754717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.7037037037037" calcext:value-type="float">
            <text:p>52.7037037037037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.5833333333333" calcext:value-type="float">
            <text:p>58.5833333333333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.96875" calcext:value-type="float">
            <text:p>48.96875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.4444444444444" calcext:value-type="float">
            <text:p>63.4444444444444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.4444444444444" calcext:value-type="float">
            <text:p>57.4444444444444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.5454545454545" calcext:value-type="float">
            <text:p>61.5454545454545</text:p>
          </table:table-cell>
          <table:table-cell/>
          <table:table-cell office:value-type="float" office:value="63.0454545454546" calcext:value-type="float">
            <text:p>63.0454545454546</text:p>
          </table:table-cell>
        </table:table-row>
        <table:table-row table:style-name="ro1">
          <table:table-cell office:value-type="float" office:value="35.9508196721311" calcext:value-type="float">
            <text:p>35.9508196721311</text:p>
          </table:table-cell>
          <table:table-cell/>
          <table:table-cell office:value-type="float" office:value="63.0555555555556" calcext:value-type="float">
            <text:p>63.05555555555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63.0689655172414" calcext:value-type="float">
            <text:p>63.0689655172414</text:p>
          </table:table-cell>
        </table:table-row>
        <table:table-row table:style-name="ro1">
          <table:table-cell office:value-type="float" office:value="49.5434782608696" calcext:value-type="float">
            <text:p>49.5434782608696</text:p>
          </table:table-cell>
          <table:table-cell/>
          <table:table-cell office:value-type="float" office:value="63.1304347826087" calcext:value-type="float">
            <text:p>63.1304347826087</text:p>
          </table:table-cell>
        </table:table-row>
        <table:table-row table:style-name="ro1">
          <table:table-cell office:value-type="float" office:value="61.3636363636364" calcext:value-type="float">
            <text:p>61.3636363636364</text:p>
          </table:table-cell>
          <table:table-cell/>
          <table:table-cell office:value-type="float" office:value="63.15625" calcext:value-type="float">
            <text:p>63.156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3.1818181818182" calcext:value-type="float">
            <text:p>63.1818181818182</text:p>
          </table:table-cell>
        </table:table-row>
        <table:table-row table:style-name="ro1">
          <table:table-cell office:value-type="float" office:value="58.0869565217391" calcext:value-type="float">
            <text:p>58.0869565217391</text:p>
          </table:table-cell>
          <table:table-cell/>
          <table:table-cell office:value-type="float" office:value="63.1904761904762" calcext:value-type="float">
            <text:p>63.1904761904762</text:p>
          </table:table-cell>
        </table:table-row>
        <table:table-row table:style-name="ro1">
          <table:table-cell office:value-type="float" office:value="37.5666666666667" calcext:value-type="float">
            <text:p>37.5666666666667</text:p>
          </table:table-cell>
          <table:table-cell/>
          <table:table-cell office:value-type="float" office:value="63.2666666666667" calcext:value-type="float">
            <text:p>63.2666666666667</text:p>
          </table:table-cell>
        </table:table-row>
        <table:table-row table:style-name="ro1">
          <table:table-cell office:value-type="float" office:value="54.4166666666667" calcext:value-type="float">
            <text:p>54.4166666666667</text:p>
          </table:table-cell>
          <table:table-cell/>
          <table:table-cell office:value-type="float" office:value="63.3157894736842" calcext:value-type="float">
            <text:p>63.3157894736842</text:p>
          </table:table-cell>
        </table:table-row>
        <table:table-row table:style-name="ro1">
          <table:table-cell office:value-type="float" office:value="63.5757575757576" calcext:value-type="float">
            <text:p>63.5757575757576</text:p>
          </table:table-cell>
          <table:table-cell/>
          <table:table-cell office:value-type="float" office:value="63.375" calcext:value-type="float">
            <text:p>63.375</text:p>
          </table:table-cell>
        </table:table-row>
        <table:table-row table:style-name="ro1">
          <table:table-cell office:value-type="float" office:value="42.5217391304348" calcext:value-type="float">
            <text:p>42.5217391304348</text:p>
          </table:table-cell>
          <table:table-cell/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54.3571428571429" calcext:value-type="float">
            <text:p>54.3571428571429</text:p>
          </table:table-cell>
          <table:table-cell/>
          <table:table-cell office:value-type="float" office:value="63.4285714285714" calcext:value-type="float">
            <text:p>63.4285714285714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/>
          <table:table-cell office:value-type="float" office:value="63.4444444444444" calcext:value-type="float">
            <text:p>63.4444444444444</text:p>
          </table:table-cell>
        </table:table-row>
        <table:table-row table:style-name="ro1">
          <table:table-cell office:value-type="float" office:value="45.2083333333333" calcext:value-type="float">
            <text:p>45.2083333333333</text:p>
          </table:table-cell>
          <table:table-cell/>
          <table:table-cell office:value-type="float" office:value="63.4583333333333" calcext:value-type="float">
            <text:p>63.4583333333333</text:p>
          </table:table-cell>
        </table:table-row>
        <table:table-row table:style-name="ro1">
          <table:table-cell office:value-type="float" office:value="58.3076923076923" calcext:value-type="float">
            <text:p>58.3076923076923</text:p>
          </table:table-cell>
          <table:table-cell/>
          <table:table-cell office:value-type="float" office:value="63.4634146341463" calcext:value-type="float">
            <text:p>63.4634146341463</text:p>
          </table:table-cell>
        </table:table-row>
        <table:table-row table:style-name="ro1">
          <table:table-cell office:value-type="float" office:value="26.2608695652174" calcext:value-type="float">
            <text:p>26.2608695652174</text:p>
          </table:table-cell>
          <table:table-cell/>
          <table:table-cell office:value-type="float" office:value="63.4716981132075" calcext:value-type="float">
            <text:p>63.4716981132075</text:p>
          </table:table-cell>
        </table:table-row>
        <table:table-row table:style-name="ro1">
          <table:table-cell office:value-type="float" office:value="55.0769230769231" calcext:value-type="float">
            <text:p>55.0769230769231</text:p>
          </table:table-cell>
          <table:table-cell/>
          <table:table-cell office:value-type="float" office:value="63.5757575757576" calcext:value-type="float">
            <text:p>63.5757575757576</text:p>
          </table:table-cell>
        </table:table-row>
        <table:table-row table:style-name="ro1">
          <table:table-cell office:value-type="float" office:value="27.6129032258064" calcext:value-type="float">
            <text:p>27.6129032258064</text:p>
          </table:table-cell>
          <table:table-cell/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53.0434782608696" calcext:value-type="float">
            <text:p>53.0434782608696</text:p>
          </table:table-cell>
          <table:table-cell/>
          <table:table-cell office:value-type="float" office:value="63.6190476190476" calcext:value-type="float">
            <text:p>63.6190476190476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/>
          <table:table-cell office:value-type="float" office:value="63.625" calcext:value-type="float">
            <text:p>63.625</text:p>
          </table:table-cell>
        </table:table-row>
        <table:table-row table:style-name="ro1">
          <table:table-cell office:value-type="float" office:value="68.2142857142857" calcext:value-type="float">
            <text:p>68.2142857142857</text:p>
          </table:table-cell>
          <table:table-cell/>
          <table:table-cell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3.6666666666667" calcext:value-type="float">
            <text:p>63.6666666666667</text:p>
          </table:table-cell>
        </table:table-row>
        <table:table-row table:style-name="ro1">
          <table:table-cell office:value-type="float" office:value="45.9148936170213" calcext:value-type="float">
            <text:p>45.9148936170213</text:p>
          </table:table-cell>
          <table:table-cell/>
          <table:table-cell office:value-type="float" office:value="63.6875" calcext:value-type="float">
            <text:p>63.6875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/>
          <table:table-cell office:value-type="float" office:value="63.7391304347826" calcext:value-type="float">
            <text:p>63.7391304347826</text:p>
          </table:table-cell>
        </table:table-row>
        <table:table-row table:style-name="ro1">
          <table:table-cell office:value-type="float" office:value="40.8571428571429" calcext:value-type="float">
            <text:p>40.8571428571429</text:p>
          </table:table-cell>
          <table:table-cell/>
          <table:table-cell office:value-type="float" office:value="63.7857142857143" calcext:value-type="float">
            <text:p>63.7857142857143</text:p>
          </table:table-cell>
        </table:table-row>
        <table:table-row table:style-name="ro1">
          <table:table-cell office:value-type="float" office:value="37.7777777777778" calcext:value-type="float">
            <text:p>37.7777777777778</text:p>
          </table:table-cell>
          <table:table-cell/>
          <table:table-cell office:value-type="float" office:value="63.8620689655172" calcext:value-type="float">
            <text:p>63.8620689655172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/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47.3548387096774" calcext:value-type="float">
            <text:p>47.3548387096774</text:p>
          </table:table-cell>
          <table:table-cell/>
          <table:table-cell office:value-type="float" office:value="63.9090909090909" calcext:value-type="float">
            <text:p>63.9090909090909</text:p>
          </table:table-cell>
        </table:table-row>
        <table:table-row table:style-name="ro1">
          <table:table-cell office:value-type="float" office:value="53.7105263157895" calcext:value-type="float">
            <text:p>53.7105263157895</text:p>
          </table:table-cell>
          <table:table-cell/>
          <table:table-cell office:value-type="float" office:value="63.9107142857143" calcext:value-type="float">
            <text:p>63.9107142857143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/>
          <table:table-cell office:value-type="float" office:value="63.9230769230769" calcext:value-type="float">
            <text:p>63.9230769230769</text:p>
          </table:table-cell>
        </table:table-row>
        <table:table-row table:style-name="ro1">
          <table:table-cell office:value-type="float" office:value="37.78125" calcext:value-type="float">
            <text:p>37.78125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.7096774193548" calcext:value-type="float">
            <text:p>60.7096774193548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.6046511627907" calcext:value-type="float">
            <text:p>51.6046511627907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.1388888888889" calcext:value-type="float">
            <text:p>47.1388888888889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.2857142857143" calcext:value-type="float">
            <text:p>29.2857142857143</text:p>
          </table:table-cell>
          <table:table-cell/>
          <table:table-cell office:value-type="float" office:value="64.0555555555556" calcext:value-type="float">
            <text:p>64.0555555555556</text:p>
          </table:table-cell>
        </table:table-row>
        <table:table-row table:style-name="ro1">
          <table:table-cell office:value-type="float" office:value="49.6981132075472" calcext:value-type="float">
            <text:p>49.6981132075472</text:p>
          </table:table-cell>
          <table:table-cell/>
          <table:table-cell office:value-type="float" office:value="64.1176470588235" calcext:value-type="float">
            <text:p>64.1176470588235</text:p>
          </table:table-cell>
        </table:table-row>
        <table:table-row table:style-name="ro1">
          <table:table-cell office:value-type="float" office:value="61.2272727272727" calcext:value-type="float">
            <text:p>61.2272727272727</text:p>
          </table:table-cell>
          <table:table-cell/>
          <table:table-cell office:value-type="float" office:value="64.125" calcext:value-type="float">
            <text:p>64.125</text:p>
          </table:table-cell>
        </table:table-row>
        <table:table-row table:style-name="ro1">
          <table:table-cell office:value-type="float" office:value="48.7058823529412" calcext:value-type="float">
            <text:p>48.7058823529412</text:p>
          </table:table-cell>
          <table:table-cell/>
          <table:table-cell office:value-type="float" office:value="64.1428571428571" calcext:value-type="float">
            <text:p>64.1428571428571</text:p>
          </table:table-cell>
        </table:table-row>
        <table:table-row table:style-name="ro1">
          <table:table-cell office:value-type="float" office:value="57.9583333333333" calcext:value-type="float">
            <text:p>57.9583333333333</text:p>
          </table:table-cell>
          <table:table-cell/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35.8571428571429" calcext:value-type="float">
            <text:p>35.8571428571429</text:p>
          </table:table-cell>
          <table:table-cell/>
          <table:table-cell office:value-type="float" office:value="64.1764705882353" calcext:value-type="float">
            <text:p>64.1764705882353</text:p>
          </table:table-cell>
        </table:table-row>
        <table:table-row table:style-name="ro1">
          <table:table-cell office:value-type="float" office:value="68.21875" calcext:value-type="float">
            <text:p>68.21875</text:p>
          </table:table-cell>
          <table:table-cell/>
          <table:table-cell office:value-type="float" office:value="64.1818181818182" calcext:value-type="float">
            <text:p>64.1818181818182</text:p>
          </table:table-cell>
        </table:table-row>
        <table:table-row table:style-name="ro1">
          <table:table-cell office:value-type="float" office:value="36.2857142857143" calcext:value-type="float">
            <text:p>36.2857142857143</text:p>
          </table:table-cell>
          <table:table-cell/>
          <table:table-cell office:value-type="float" office:value="64.1818181818182" calcext:value-type="float">
            <text:p>64.1818181818182</text:p>
          </table:table-cell>
        </table:table-row>
        <table:table-row table:style-name="ro1">
          <table:table-cell office:value-type="float" office:value="45.7619047619048" calcext:value-type="float">
            <text:p>45.7619047619048</text:p>
          </table:table-cell>
          <table:table-cell/>
          <table:table-cell office:value-type="float" office:value="64.1935483870968" calcext:value-type="float">
            <text:p>64.1935483870968</text:p>
          </table:table-cell>
        </table:table-row>
        <table:table-row table:style-name="ro1">
          <table:table-cell office:value-type="float" office:value="99.6666666666667" calcext:value-type="float">
            <text:p>99.6666666666667</text:p>
          </table:table-cell>
          <table:table-cell/>
          <table:table-cell office:value-type="float" office:value="64.2083333333333" calcext:value-type="float">
            <text:p>64.2083333333333</text:p>
          </table:table-cell>
        </table:table-row>
        <table:table-row table:style-name="ro1">
          <table:table-cell office:value-type="float" office:value="48.9459459459459" calcext:value-type="float">
            <text:p>48.9459459459459</text:p>
          </table:table-cell>
          <table:table-cell/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66.4428571428571" calcext:value-type="float">
            <text:p>66.4428571428571</text:p>
          </table:table-cell>
          <table:table-cell/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/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/>
          <table:table-cell office:value-type="float" office:value="64.3548387096774" calcext:value-type="float">
            <text:p>64.3548387096774</text:p>
          </table:table-cell>
        </table:table-row>
        <table:table-row table:style-name="ro1">
          <table:table-cell office:value-type="float" office:value="48.2931726907631" calcext:value-type="float">
            <text:p>48.2931726907631</text:p>
          </table:table-cell>
          <table:table-cell/>
          <table:table-cell office:value-type="float" office:value="64.3636363636364" calcext:value-type="float">
            <text:p>64.3636363636364</text:p>
          </table:table-cell>
        </table:table-row>
        <table:table-row table:style-name="ro1">
          <table:table-cell office:value-type="float" office:value="53.1578947368421" calcext:value-type="float">
            <text:p>53.1578947368421</text:p>
          </table:table-cell>
          <table:table-cell/>
          <table:table-cell office:value-type="float" office:value="64.375" calcext:value-type="float">
            <text:p>64.375</text:p>
          </table:table-cell>
        </table:table-row>
        <table:table-row table:style-name="ro1">
          <table:table-cell office:value-type="float" office:value="67.9473684210526" calcext:value-type="float">
            <text:p>67.9473684210526</text:p>
          </table:table-cell>
          <table:table-cell/>
          <table:table-cell office:value-type="float" office:value="64.3958333333333" calcext:value-type="float">
            <text:p>64.3958333333333</text:p>
          </table:table-cell>
        </table:table-row>
        <table:table-row table:style-name="ro1">
          <table:table-cell office:value-type="float" office:value="42.5294117647059" calcext:value-type="float">
            <text:p>42.5294117647059</text:p>
          </table:table-cell>
          <table:table-cell/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50.4583333333333" calcext:value-type="float">
            <text:p>50.4583333333333</text:p>
          </table:table-cell>
          <table:table-cell/>
          <table:table-cell office:value-type="float" office:value="64.4347826086957" calcext:value-type="float">
            <text:p>64.4347826086957</text:p>
          </table:table-cell>
        </table:table-row>
        <table:table-row table:style-name="ro1">
          <table:table-cell office:value-type="float" office:value="65.4137931034483" calcext:value-type="float">
            <text:p>65.4137931034483</text:p>
          </table:table-cell>
          <table:table-cell/>
          <table:table-cell office:value-type="float" office:value="64.4444444444444" calcext:value-type="float">
            <text:p>64.4444444444444</text:p>
          </table:table-cell>
        </table:table-row>
        <table:table-row table:style-name="ro1">
          <table:table-cell office:value-type="float" office:value="56.1052631578947" calcext:value-type="float">
            <text:p>56.1052631578947</text:p>
          </table:table-cell>
          <table:table-cell/>
          <table:table-cell office:value-type="float" office:value="64.4444444444444" calcext:value-type="float">
            <text:p>64.4444444444444</text:p>
          </table:table-cell>
        </table:table-row>
        <table:table-row table:style-name="ro1">
          <table:table-cell office:value-type="float" office:value="63.9230769230769" calcext:value-type="float">
            <text:p>63.9230769230769</text:p>
          </table:table-cell>
          <table:table-cell/>
          <table:table-cell office:value-type="float" office:value="64.4545454545455" calcext:value-type="float">
            <text:p>64.4545454545455</text:p>
          </table:table-cell>
        </table:table-row>
        <table:table-row table:style-name="ro1">
          <table:table-cell office:value-type="float" office:value="54.0714285714286" calcext:value-type="float">
            <text:p>54.0714285714286</text:p>
          </table:table-cell>
          <table:table-cell/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/>
          <table:table-cell office:value-type="float" office:value="64.5714285714286" calcext:value-type="float">
            <text:p>64.5714285714286</text:p>
          </table:table-cell>
        </table:table-row>
        <table:table-row table:style-name="ro1">
          <table:table-cell office:value-type="float" office:value="46.625" calcext:value-type="float">
            <text:p>46.625</text:p>
          </table:table-cell>
          <table:table-cell/>
          <table:table-cell office:value-type="float" office:value="64.6065573770492" calcext:value-type="float">
            <text:p>64.6065573770492</text:p>
          </table:table-cell>
        </table:table-row>
        <table:table-row table:style-name="ro1">
          <table:table-cell office:value-type="float" office:value="65.7547169811321" calcext:value-type="float">
            <text:p>65.7547169811321</text:p>
          </table:table-cell>
          <table:table-cell/>
          <table:table-cell office:value-type="float" office:value="64.6190476190476" calcext:value-type="float">
            <text:p>64.6190476190476</text:p>
          </table:table-cell>
        </table:table-row>
        <table:table-row table:style-name="ro1">
          <table:table-cell office:value-type="float" office:value="52.76" calcext:value-type="float">
            <text:p>52.76</text:p>
          </table:table-cell>
          <table:table-cell/>
          <table:table-cell office:value-type="float" office:value="64.6363636363636" calcext:value-type="float">
            <text:p>64.6363636363636</text:p>
          </table:table-cell>
        </table:table-row>
        <table:table-row table:style-name="ro1">
          <table:table-cell office:value-type="float" office:value="62.8888888888889" calcext:value-type="float">
            <text:p>62.8888888888889</text:p>
          </table:table-cell>
          <table:table-cell/>
          <table:table-cell office:value-type="float" office:value="64.7058823529412" calcext:value-type="float">
            <text:p>64.7058823529412</text:p>
          </table:table-cell>
        </table:table-row>
        <table:table-row table:style-name="ro1">
          <table:table-cell office:value-type="float" office:value="42.3809523809524" calcext:value-type="float">
            <text:p>42.3809523809524</text:p>
          </table:table-cell>
          <table:table-cell/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/>
          <table:table-cell office:value-type="float" office:value="64.7692307692308" calcext:value-type="float">
            <text:p>64.7692307692308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/>
          <table:table-cell office:value-type="float" office:value="64.7857142857143" calcext:value-type="float">
            <text:p>64.7857142857143</text:p>
          </table:table-cell>
        </table:table-row>
        <table:table-row table:style-name="ro1">
          <table:table-cell office:value-type="float" office:value="55.88" calcext:value-type="float">
            <text:p>55.88</text:p>
          </table:table-cell>
          <table:table-cell/>
          <table:table-cell office:value-type="float" office:value="64.9230769230769" calcext:value-type="float">
            <text:p>64.9230769230769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.4347826086957" calcext:value-type="float">
            <text:p>48.4347826086957</text:p>
          </table:table-cell>
          <table:table-cell/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49.5263157894737" calcext:value-type="float">
            <text:p>49.5263157894737</text:p>
          </table:table-cell>
          <table:table-cell/>
          <table:table-cell office:value-type="float" office:value="65.125" calcext:value-type="float">
            <text:p>65.125</text:p>
          </table:table-cell>
        </table:table-row>
        <table:table-row table:style-name="ro1">
          <table:table-cell office:value-type="float" office:value="61.9677419354839" calcext:value-type="float">
            <text:p>61.9677419354839</text:p>
          </table:table-cell>
          <table:table-cell/>
          <table:table-cell office:value-type="float" office:value="65.1363636363636" calcext:value-type="float">
            <text:p>65.1363636363636</text:p>
          </table:table-cell>
        </table:table-row>
        <table:table-row table:style-name="ro1">
          <table:table-cell office:value-type="float" office:value="66.4285714285714" calcext:value-type="float">
            <text:p>66.4285714285714</text:p>
          </table:table-cell>
          <table:table-cell/>
          <table:table-cell office:value-type="float" office:value="65.1428571428571" calcext:value-type="float">
            <text:p>65.1428571428571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/>
          <table:table-cell office:value-type="float" office:value="65.2222222222222" calcext:value-type="float">
            <text:p>65.2222222222222</text:p>
          </table:table-cell>
        </table:table-row>
        <table:table-row table:style-name="ro1">
          <table:table-cell office:value-type="float" office:value="38.5828571428571" calcext:value-type="float">
            <text:p>38.5828571428571</text:p>
          </table:table-cell>
          <table:table-cell/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63.0689655172414" calcext:value-type="float">
            <text:p>63.0689655172414</text:p>
          </table:table-cell>
          <table:table-cell/>
          <table:table-cell office:value-type="float" office:value="65.2857142857143" calcext:value-type="float">
            <text:p>65.2857142857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5.3333333333333" calcext:value-type="float">
            <text:p>65.33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5.3571428571429" calcext:value-type="float">
            <text:p>65.357142857142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/>
          <table:table-cell office:value-type="float" office:value="65.4137931034483" calcext:value-type="float">
            <text:p>65.4137931034483</text:p>
          </table:table-cell>
        </table:table-row>
        <table:table-row table:style-name="ro1">
          <table:table-cell office:value-type="float" office:value="32.5217391304348" calcext:value-type="float">
            <text:p>32.5217391304348</text:p>
          </table:table-cell>
          <table:table-cell/>
          <table:table-cell office:value-type="float" office:value="65.4444444444444" calcext:value-type="float">
            <text:p>65.4444444444444</text:p>
          </table:table-cell>
        </table:table-row>
        <table:table-row table:style-name="ro1">
          <table:table-cell office:value-type="float" office:value="31.7037037037037" calcext:value-type="float">
            <text:p>31.7037037037037</text:p>
          </table:table-cell>
          <table:table-cell/>
          <table:table-cell office:value-type="float" office:value="65.4864864864865" calcext:value-type="float">
            <text:p>65.4864864864865</text:p>
          </table:table-cell>
        </table:table-row>
        <table:table-row table:style-name="ro1">
          <table:table-cell office:value-type="float" office:value="45.2142857142857" calcext:value-type="float">
            <text:p>45.2142857142857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50.7699115044248" calcext:value-type="float">
            <text:p>50.7699115044248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50.5555555555556" calcext:value-type="float">
            <text:p>50.5555555555556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54.4545454545455" calcext:value-type="float">
            <text:p>54.4545454545455</text:p>
          </table:table-cell>
          <table:table-cell/>
          <table:table-cell office:value-type="float" office:value="65.5454545454546" calcext:value-type="float">
            <text:p>65.5454545454546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65.5833333333333" calcext:value-type="float">
            <text:p>65.5833333333333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/>
          <table:table-cell office:value-type="float" office:value="65.5882352941177" calcext:value-type="float">
            <text:p>65.588235294117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/>
          <table:table-cell office:value-type="float" office:value="65.5909090909091" calcext:value-type="float">
            <text:p>65.5909090909091</text:p>
          </table:table-cell>
        </table:table-row>
        <table:table-row table:style-name="ro1">
          <table:table-cell office:value-type="float" office:value="66.125" calcext:value-type="float">
            <text:p>66.125</text:p>
          </table:table-cell>
          <table:table-cell/>
          <table:table-cell office:value-type="float" office:value="65.6060606060606" calcext:value-type="float">
            <text:p>65.6060606060606</text:p>
          </table:table-cell>
        </table:table-row>
        <table:table-row table:style-name="ro1">
          <table:table-cell office:value-type="float" office:value="26.8928571428571" calcext:value-type="float">
            <text:p>26.8928571428571</text:p>
          </table:table-cell>
          <table:table-cell/>
          <table:table-cell office:value-type="float" office:value="65.6666666666667" calcext:value-type="float">
            <text:p>65.6666666666667</text:p>
          </table:table-cell>
        </table:table-row>
        <table:table-row table:style-name="ro1">
          <table:table-cell office:value-type="float" office:value="64.4444444444444" calcext:value-type="float">
            <text:p>64.4444444444444</text:p>
          </table:table-cell>
          <table:table-cell/>
          <table:table-cell office:value-type="float" office:value="65.6666666666667" calcext:value-type="float">
            <text:p>65.6666666666667</text:p>
          </table:table-cell>
        </table:table-row>
        <table:table-row table:style-name="ro1">
          <table:table-cell office:value-type="float" office:value="48.2878787878788" calcext:value-type="float">
            <text:p>48.2878787878788</text:p>
          </table:table-cell>
          <table:table-cell/>
          <table:table-cell office:value-type="float" office:value="65.7058823529412" calcext:value-type="float">
            <text:p>65.70588235294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65.7272727272727" calcext:value-type="float">
            <text:p>65.7272727272727</text:p>
          </table:table-cell>
        </table:table-row>
        <table:table-row table:style-name="ro1">
          <table:table-cell office:value-type="float" office:value="36.6666666666667" calcext:value-type="float">
            <text:p>36.6666666666667</text:p>
          </table:table-cell>
          <table:table-cell/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51.6785714285714" calcext:value-type="float">
            <text:p>51.6785714285714</text:p>
          </table:table-cell>
          <table:table-cell/>
          <table:table-cell office:value-type="float" office:value="65.7547169811321" calcext:value-type="float">
            <text:p>65.75471698113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65.7916666666667" calcext:value-type="float">
            <text:p>65.7916666666667</text:p>
          </table:table-cell>
        </table:table-row>
        <table:table-row table:style-name="ro1">
          <table:table-cell office:value-type="float" office:value="60.7279635258359" calcext:value-type="float">
            <text:p>60.7279635258359</text:p>
          </table:table-cell>
          <table:table-cell/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50.9393939393939" calcext:value-type="float">
            <text:p>50.9393939393939</text:p>
          </table:table-cell>
          <table:table-cell/>
          <table:table-cell office:value-type="float" office:value="65.8064516129032" calcext:value-type="float">
            <text:p>65.8064516129032</text:p>
          </table:table-cell>
        </table:table-row>
        <table:table-row table:style-name="ro1">
          <table:table-cell office:value-type="float" office:value="23.9166666666667" calcext:value-type="float">
            <text:p>23.916666666666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66.0714285714286" calcext:value-type="float">
            <text:p>66.0714285714286</text:p>
          </table:table-cell>
        </table:table-row>
        <table:table-row table:style-name="ro1">
          <table:table-cell office:value-type="float" office:value="33.2068965517241" calcext:value-type="float">
            <text:p>33.2068965517241</text:p>
          </table:table-cell>
          <table:table-cell/>
          <table:table-cell office:value-type="float" office:value="66.0909090909091" calcext:value-type="float">
            <text:p>66.09090909090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1.3962962962963" calcext:value-type="float">
            <text:p>21.3962962962963</text:p>
          </table:table-cell>
          <table:table-cell/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6.125" calcext:value-type="float">
            <text:p>66.125</text:p>
          </table:table-cell>
        </table:table-row>
        <table:table-row table:style-name="ro1">
          <table:table-cell office:value-type="float" office:value="12.3170731707317" calcext:value-type="float">
            <text:p>12.3170731707317</text:p>
          </table:table-cell>
          <table:table-cell/>
          <table:table-cell office:value-type="float" office:value="66.1363636363636" calcext:value-type="float">
            <text:p>66.1363636363636</text:p>
          </table:table-cell>
        </table:table-row>
        <table:table-row table:style-name="ro1">
          <table:table-cell office:value-type="float" office:value="75.3571428571429" calcext:value-type="float">
            <text:p>75.3571428571429</text:p>
          </table:table-cell>
          <table:table-cell/>
          <table:table-cell office:value-type="float" office:value="66.2173913043478" calcext:value-type="float">
            <text:p>66.2173913043478</text:p>
          </table:table-cell>
        </table:table-row>
        <table:table-row table:style-name="ro1">
          <table:table-cell office:value-type="float" office:value="65.1363636363636" calcext:value-type="float">
            <text:p>65.1363636363636</text:p>
          </table:table-cell>
          <table:table-cell/>
          <table:table-cell office:value-type="float" office:value="66.2307692307692" calcext:value-type="float">
            <text:p>66.2307692307692</text:p>
          </table:table-cell>
        </table:table-row>
        <table:table-row table:style-name="ro1">
          <table:table-cell office:value-type="float" office:value="64.0555555555556" calcext:value-type="float">
            <text:p>64.0555555555556</text:p>
          </table:table-cell>
          <table:table-cell/>
          <table:table-cell office:value-type="float" office:value="66.2307692307692" calcext:value-type="float">
            <text:p>66.23076923076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66.2666666666667" calcext:value-type="float">
            <text:p>66.2666666666667</text:p>
          </table:table-cell>
        </table:table-row>
        <table:table-row table:style-name="ro1">
          <table:table-cell office:value-type="float" office:value="48.531914893617" calcext:value-type="float">
            <text:p>48.531914893617</text:p>
          </table:table-cell>
          <table:table-cell/>
          <table:table-cell office:value-type="float" office:value="66.2916666666667" calcext:value-type="float">
            <text:p>66.2916666666667</text:p>
          </table:table-cell>
        </table:table-row>
        <table:table-row table:style-name="ro1">
          <table:table-cell office:value-type="float" office:value="56.7826086956522" calcext:value-type="float">
            <text:p>56.7826086956522</text:p>
          </table:table-cell>
          <table:table-cell/>
          <table:table-cell office:value-type="float" office:value="66.304347826087" calcext:value-type="float">
            <text:p>66.304347826087</text:p>
          </table:table-cell>
        </table:table-row>
        <table:table-row table:style-name="ro1">
          <table:table-cell office:value-type="float" office:value="87.375" calcext:value-type="float">
            <text:p>87.375</text:p>
          </table:table-cell>
          <table:table-cell/>
          <table:table-cell office:value-type="float" office:value="66.3478260869565" calcext:value-type="float">
            <text:p>66.3478260869565</text:p>
          </table:table-cell>
        </table:table-row>
        <table:table-row table:style-name="ro1">
          <table:table-cell office:value-type="float" office:value="53.695652173913" calcext:value-type="float">
            <text:p>53.695652173913</text:p>
          </table:table-cell>
          <table:table-cell/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45.6111111111111" calcext:value-type="float">
            <text:p>45.6111111111111</text:p>
          </table:table-cell>
          <table:table-cell/>
          <table:table-cell office:value-type="float" office:value="66.4285714285714" calcext:value-type="float">
            <text:p>66.4285714285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6.4428571428571" calcext:value-type="float">
            <text:p>66.4428571428571</text:p>
          </table:table-cell>
        </table:table-row>
        <table:table-row table:style-name="ro1">
          <table:table-cell office:value-type="float" office:value="48.6315789473684" calcext:value-type="float">
            <text:p>48.6315789473684</text:p>
          </table:table-cell>
          <table:table-cell/>
          <table:table-cell office:value-type="float" office:value="66.52" calcext:value-type="float">
            <text:p>66.52</text:p>
          </table:table-cell>
        </table:table-row>
        <table:table-row table:style-name="ro1">
          <table:table-cell office:value-type="float" office:value="61.304347826087" calcext:value-type="float">
            <text:p>61.304347826087</text:p>
          </table:table-cell>
          <table:table-cell/>
          <table:table-cell office:value-type="float" office:value="66.5652173913044" calcext:value-type="float">
            <text:p>66.5652173913044</text:p>
          </table:table-cell>
        </table:table-row>
        <table:table-row table:style-name="ro1">
          <table:table-cell office:value-type="float" office:value="68.4545454545455" calcext:value-type="float">
            <text:p>68.4545454545455</text:p>
          </table:table-cell>
          <table:table-cell/>
          <table:table-cell office:value-type="float" office:value="66.5882352941177" calcext:value-type="float">
            <text:p>66.5882352941177</text:p>
          </table:table-cell>
        </table:table-row>
        <table:table-row table:style-name="ro1">
          <table:table-cell office:value-type="float" office:value="49.1714285714286" calcext:value-type="float">
            <text:p>49.1714285714286</text:p>
          </table:table-cell>
          <table:table-cell/>
          <table:table-cell office:value-type="float" office:value="66.6153846153846" calcext:value-type="float">
            <text:p>66.6153846153846</text:p>
          </table:table-cell>
        </table:table-row>
        <table:table-row table:style-name="ro1">
          <table:table-cell office:value-type="float" office:value="53.28125" calcext:value-type="float">
            <text:p>53.28125</text:p>
          </table:table-cell>
          <table:table-cell/>
          <table:table-cell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float" office:value="71.625" calcext:value-type="float">
            <text:p>71.625</text:p>
          </table:table-cell>
          <table:table-cell/>
          <table:table-cell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float" office:value="76.6111111111111" calcext:value-type="float">
            <text:p>76.6111111111111</text:p>
          </table:table-cell>
          <table:table-cell/>
          <table:table-cell office:value-type="float" office:value="66.7142857142857" calcext:value-type="float">
            <text:p>66.7142857142857</text:p>
          </table:table-cell>
        </table:table-row>
        <table:table-row table:style-name="ro1">
          <table:table-cell office:value-type="float" office:value="46.1136363636364" calcext:value-type="float">
            <text:p>46.1136363636364</text:p>
          </table:table-cell>
          <table:table-cell/>
          <table:table-cell office:value-type="float" office:value="66.7142857142857" calcext:value-type="float">
            <text:p>66.714285714285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/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67.6818181818182" calcext:value-type="float">
            <text:p>67.6818181818182</text:p>
          </table:table-cell>
          <table:table-cell/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29.7777777777778" calcext:value-type="float">
            <text:p>29.7777777777778</text:p>
          </table:table-cell>
          <table:table-cell/>
          <table:table-cell office:value-type="float" office:value="66.7727272727273" calcext:value-type="float">
            <text:p>66.772727272727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/>
          <table:table-cell office:value-type="float" office:value="66.7777777777778" calcext:value-type="float">
            <text:p>66.7777777777778</text:p>
          </table:table-cell>
        </table:table-row>
        <table:table-row table:style-name="ro1">
          <table:table-cell office:value-type="float" office:value="40.5692307692308" calcext:value-type="float">
            <text:p>40.5692307692308</text:p>
          </table:table-cell>
          <table:table-cell/>
          <table:table-cell office:value-type="float" office:value="66.7857142857143" calcext:value-type="float">
            <text:p>66.7857142857143</text:p>
          </table:table-cell>
        </table:table-row>
        <table:table-row table:style-name="ro1">
          <table:table-cell office:value-type="float" office:value="50.9583333333333" calcext:value-type="float">
            <text:p>50.9583333333333</text:p>
          </table:table-cell>
          <table:table-cell/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44.1219512195122" calcext:value-type="float">
            <text:p>44.1219512195122</text:p>
          </table:table-cell>
          <table:table-cell/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77.1111111111111" calcext:value-type="float">
            <text:p>77.1111111111111</text:p>
          </table:table-cell>
          <table:table-cell/>
          <table:table-cell office:value-type="float" office:value="66.8571428571429" calcext:value-type="float">
            <text:p>66.8571428571429</text:p>
          </table:table-cell>
        </table:table-row>
        <table:table-row table:style-name="ro1">
          <table:table-cell office:value-type="float" office:value="32.6341463414634" calcext:value-type="float">
            <text:p>32.6341463414634</text:p>
          </table:table-cell>
          <table:table-cell/>
          <table:table-cell office:value-type="float" office:value="66.8983050847458" calcext:value-type="float">
            <text:p>66.898305084745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.9166666666667" calcext:value-type="float">
            <text:p>81.9166666666667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.6976744186047" calcext:value-type="float">
            <text:p>14.6976744186047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.5375" calcext:value-type="float">
            <text:p>45.5375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.9032258064516" calcext:value-type="float">
            <text:p>48.9032258064516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/>
          <table:table-cell office:value-type="float" office:value="67.0714285714286" calcext:value-type="float">
            <text:p>67.0714285714286</text:p>
          </table:table-cell>
        </table:table-row>
        <table:table-row table:style-name="ro1">
          <table:table-cell office:value-type="float" office:value="57.8888888888889" calcext:value-type="float">
            <text:p>57.8888888888889</text:p>
          </table:table-cell>
          <table:table-cell/>
          <table:table-cell office:value-type="float" office:value="67.0769230769231" calcext:value-type="float">
            <text:p>67.0769230769231</text:p>
          </table:table-cell>
        </table:table-row>
        <table:table-row table:style-name="ro1">
          <table:table-cell office:value-type="float" office:value="54.2631578947368" calcext:value-type="float">
            <text:p>54.2631578947368</text:p>
          </table:table-cell>
          <table:table-cell/>
          <table:table-cell office:value-type="float" office:value="67.1666666666667" calcext:value-type="float">
            <text:p>67.1666666666667</text:p>
          </table:table-cell>
        </table:table-row>
        <table:table-row table:style-name="ro1">
          <table:table-cell office:value-type="float" office:value="44.2666666666667" calcext:value-type="float">
            <text:p>44.2666666666667</text:p>
          </table:table-cell>
          <table:table-cell/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62.6666666666667" calcext:value-type="float">
            <text:p>62.6666666666667</text:p>
          </table:table-cell>
          <table:table-cell/>
          <table:table-cell office:value-type="float" office:value="67.2380952380952" calcext:value-type="float">
            <text:p>67.2380952380952</text:p>
          </table:table-cell>
        </table:table-row>
        <table:table-row table:style-name="ro1">
          <table:table-cell office:value-type="float" office:value="50.9545454545455" calcext:value-type="float">
            <text:p>50.9545454545455</text:p>
          </table:table-cell>
          <table:table-cell/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41.6923076923077" calcext:value-type="float">
            <text:p>41.6923076923077</text:p>
          </table:table-cell>
          <table:table-cell/>
          <table:table-cell office:value-type="float" office:value="67.2727272727273" calcext:value-type="float">
            <text:p>67.2727272727273</text:p>
          </table:table-cell>
        </table:table-row>
        <table:table-row table:style-name="ro1">
          <table:table-cell office:value-type="float" office:value="51.84375" calcext:value-type="float">
            <text:p>51.84375</text:p>
          </table:table-cell>
          <table:table-cell/>
          <table:table-cell office:value-type="float" office:value="67.2857142857143" calcext:value-type="float">
            <text:p>67.2857142857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7.2941176470588" calcext:value-type="float">
            <text:p>67.2941176470588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/>
          <table:table-cell office:value-type="float" office:value="67.2941176470588" calcext:value-type="float">
            <text:p>67.2941176470588</text:p>
          </table:table-cell>
        </table:table-row>
        <table:table-row table:style-name="ro1">
          <table:table-cell office:value-type="float" office:value="58.3157894736842" calcext:value-type="float">
            <text:p>58.3157894736842</text:p>
          </table:table-cell>
          <table:table-cell/>
          <table:table-cell office:value-type="float" office:value="67.3181818181818" calcext:value-type="float">
            <text:p>67.3181818181818</text:p>
          </table:table-cell>
        </table:table-row>
        <table:table-row table:style-name="ro1">
          <table:table-cell office:value-type="float" office:value="42.8653846153846" calcext:value-type="float">
            <text:p>42.8653846153846</text:p>
          </table:table-cell>
          <table:table-cell/>
          <table:table-cell office:value-type="float" office:value="67.3636363636364" calcext:value-type="float">
            <text:p>67.3636363636364</text:p>
          </table:table-cell>
        </table:table-row>
        <table:table-row table:style-name="ro1">
          <table:table-cell office:value-type="float" office:value="43.5714285714286" calcext:value-type="float">
            <text:p>43.5714285714286</text:p>
          </table:table-cell>
          <table:table-cell/>
          <table:table-cell office:value-type="float" office:value="67.375" calcext:value-type="float">
            <text:p>67.375</text:p>
          </table:table-cell>
        </table:table-row>
        <table:table-row table:style-name="ro1">
          <table:table-cell office:value-type="float" office:value="50.0571428571429" calcext:value-type="float">
            <text:p>50.0571428571429</text:p>
          </table:table-cell>
          <table:table-cell/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37.8333333333333" calcext:value-type="float">
            <text:p>37.8333333333333</text:p>
          </table:table-cell>
          <table:table-cell/>
          <table:table-cell office:value-type="float" office:value="67.4117647058823" calcext:value-type="float">
            <text:p>67.4117647058823</text:p>
          </table:table-cell>
        </table:table-row>
        <table:table-row table:style-name="ro1">
          <table:table-cell office:value-type="float" office:value="68.3333333333333" calcext:value-type="float">
            <text:p>68.3333333333333</text:p>
          </table:table-cell>
          <table:table-cell/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6.8409090909091" calcext:value-type="float">
            <text:p>26.8409090909091</text:p>
          </table:table-cell>
          <table:table-cell/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53.90625" calcext:value-type="float">
            <text:p>53.90625</text:p>
          </table:table-cell>
          <table:table-cell/>
          <table:table-cell office:value-type="float" office:value="67.5625" calcext:value-type="float">
            <text:p>67.5625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/>
          <table:table-cell office:value-type="float" office:value="67.5714285714286" calcext:value-type="float">
            <text:p>67.5714285714286</text:p>
          </table:table-cell>
        </table:table-row>
        <table:table-row table:style-name="ro1">
          <table:table-cell office:value-type="float" office:value="41.9545454545455" calcext:value-type="float">
            <text:p>41.9545454545455</text:p>
          </table:table-cell>
          <table:table-cell/>
          <table:table-cell office:value-type="float" office:value="67.5789473684211" calcext:value-type="float">
            <text:p>67.5789473684211</text:p>
          </table:table-cell>
        </table:table-row>
        <table:table-row table:style-name="ro1">
          <table:table-cell office:value-type="float" office:value="78.7142857142857" calcext:value-type="float">
            <text:p>78.7142857142857</text:p>
          </table:table-cell>
          <table:table-cell/>
          <table:table-cell office:value-type="float" office:value="67.6086956521739" calcext:value-type="float">
            <text:p>67.6086956521739</text:p>
          </table:table-cell>
        </table:table-row>
        <table:table-row table:style-name="ro1">
          <table:table-cell office:value-type="float" office:value="59.6111111111111" calcext:value-type="float">
            <text:p>59.6111111111111</text:p>
          </table:table-cell>
          <table:table-cell/>
          <table:table-cell office:value-type="float" office:value="67.625" calcext:value-type="float">
            <text:p>67.625</text:p>
          </table:table-cell>
        </table:table-row>
        <table:table-row table:style-name="ro1">
          <table:table-cell office:value-type="float" office:value="67.1666666666667" calcext:value-type="float">
            <text:p>67.1666666666667</text:p>
          </table:table-cell>
          <table:table-cell/>
          <table:table-cell office:value-type="float" office:value="67.6315789473684" calcext:value-type="float">
            <text:p>67.6315789473684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/>
          <table:table-cell office:value-type="float" office:value="67.6666666666667" calcext:value-type="float">
            <text:p>67.6666666666667</text:p>
          </table:table-cell>
        </table:table-row>
        <table:table-row table:style-name="ro1">
          <table:table-cell office:value-type="float" office:value="67.7368421052632" calcext:value-type="float">
            <text:p>67.7368421052632</text:p>
          </table:table-cell>
          <table:table-cell/>
          <table:table-cell office:value-type="float" office:value="67.6666666666667" calcext:value-type="float">
            <text:p>67.6666666666667</text:p>
          </table:table-cell>
        </table:table-row>
        <table:table-row table:style-name="ro1">
          <table:table-cell office:value-type="float" office:value="42.3684210526316" calcext:value-type="float">
            <text:p>42.3684210526316</text:p>
          </table:table-cell>
          <table:table-cell/>
          <table:table-cell office:value-type="float" office:value="67.6818181818182" calcext:value-type="float">
            <text:p>67.6818181818182</text:p>
          </table:table-cell>
        </table:table-row>
        <table:table-row table:style-name="ro1">
          <table:table-cell office:value-type="float" office:value="27.6136363636364" calcext:value-type="float">
            <text:p>27.6136363636364</text:p>
          </table:table-cell>
          <table:table-cell/>
          <table:table-cell office:value-type="float" office:value="67.7368421052632" calcext:value-type="float">
            <text:p>67.73684210526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5.3207547169811" calcext:value-type="float">
            <text:p>25.3207547169811</text:p>
          </table:table-cell>
          <table:table-cell/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64.4444444444444" calcext:value-type="float">
            <text:p>64.4444444444444</text:p>
          </table:table-cell>
          <table:table-cell/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/>
          <table:table-cell office:value-type="float" office:value="67.85" calcext:value-type="float">
            <text:p>67.85</text:p>
          </table:table-cell>
        </table:table-row>
        <table:table-row table:style-name="ro1">
          <table:table-cell office:value-type="float" office:value="38.5789473684211" calcext:value-type="float">
            <text:p>38.5789473684211</text:p>
          </table:table-cell>
          <table:table-cell/>
          <table:table-cell office:value-type="float" office:value="67.8510638297872" calcext:value-type="float">
            <text:p>67.8510638297872</text:p>
          </table:table-cell>
        </table:table-row>
        <table:table-row table:style-name="ro1">
          <table:table-cell office:value-type="float" office:value="47.4444444444444" calcext:value-type="float">
            <text:p>47.4444444444444</text:p>
          </table:table-cell>
          <table:table-cell/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7.9090909090909" calcext:value-type="float">
            <text:p>67.9090909090909</text:p>
          </table:table-cell>
        </table:table-row>
        <table:table-row table:style-name="ro1">
          <table:table-cell office:value-type="float" office:value="47.28125" calcext:value-type="float">
            <text:p>47.28125</text:p>
          </table:table-cell>
          <table:table-cell/>
          <table:table-cell office:value-type="float" office:value="67.9423076923077" calcext:value-type="float">
            <text:p>67.9423076923077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/>
          <table:table-cell office:value-type="float" office:value="67.9473684210526" calcext:value-type="float">
            <text:p>67.9473684210526</text:p>
          </table:table-cell>
        </table:table-row>
        <table:table-row table:style-name="ro1">
          <table:table-cell office:value-type="float" office:value="42.1846153846154" calcext:value-type="float">
            <text:p>42.184615384615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.8448275862069" calcext:value-type="float">
            <text:p>45.8448275862069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.9047619047619" calcext:value-type="float">
            <text:p>46.9047619047619</text:p>
          </table:table-cell>
          <table:table-cell/>
          <table:table-cell office:value-type="float" office:value="68.0625" calcext:value-type="float">
            <text:p>68.0625</text:p>
          </table:table-cell>
        </table:table-row>
        <table:table-row table:style-name="ro1">
          <table:table-cell office:value-type="float" office:value="58.0196078431373" calcext:value-type="float">
            <text:p>58.0196078431373</text:p>
          </table:table-cell>
          <table:table-cell/>
          <table:table-cell office:value-type="float" office:value="68.0666666666667" calcext:value-type="float">
            <text:p>68.0666666666667</text:p>
          </table:table-cell>
        </table:table-row>
        <table:table-row table:style-name="ro1">
          <table:table-cell office:value-type="float" office:value="49.4186046511628" calcext:value-type="float">
            <text:p>49.4186046511628</text:p>
          </table:table-cell>
          <table:table-cell/>
          <table:table-cell office:value-type="float" office:value="68.0909090909091" calcext:value-type="float">
            <text:p>68.0909090909091</text:p>
          </table:table-cell>
        </table:table-row>
        <table:table-row table:style-name="ro1">
          <table:table-cell office:value-type="float" office:value="49.8125" calcext:value-type="float">
            <text:p>49.8125</text:p>
          </table:table-cell>
          <table:table-cell/>
          <table:table-cell office:value-type="float" office:value="68.1052631578947" calcext:value-type="float">
            <text:p>68.1052631578947</text:p>
          </table:table-cell>
        </table:table-row>
        <table:table-row table:style-name="ro1">
          <table:table-cell office:value-type="float" office:value="52.6818181818182" calcext:value-type="float">
            <text:p>52.6818181818182</text:p>
          </table:table-cell>
          <table:table-cell/>
          <table:table-cell office:value-type="float" office:value="68.1666666666667" calcext:value-type="float">
            <text:p>68.1666666666667</text:p>
          </table:table-cell>
        </table:table-row>
        <table:table-row table:style-name="ro1">
          <table:table-cell office:value-type="float" office:value="45.4615384615385" calcext:value-type="float">
            <text:p>45.4615384615385</text:p>
          </table:table-cell>
          <table:table-cell/>
          <table:table-cell office:value-type="float" office:value="68.1764705882353" calcext:value-type="float">
            <text:p>68.1764705882353</text:p>
          </table:table-cell>
        </table:table-row>
        <table:table-row table:style-name="ro1">
          <table:table-cell office:value-type="float" office:value="64.375" calcext:value-type="float">
            <text:p>64.375</text:p>
          </table:table-cell>
          <table:table-cell/>
          <table:table-cell office:value-type="float" office:value="68.2142857142857" calcext:value-type="float">
            <text:p>68.2142857142857</text:p>
          </table:table-cell>
        </table:table-row>
        <table:table-row table:style-name="ro1">
          <table:table-cell office:value-type="float" office:value="42.3636363636364" calcext:value-type="float">
            <text:p>42.3636363636364</text:p>
          </table:table-cell>
          <table:table-cell/>
          <table:table-cell office:value-type="float" office:value="68.21875" calcext:value-type="float">
            <text:p>68.21875</text:p>
          </table:table-cell>
        </table:table-row>
        <table:table-row table:style-name="ro1">
          <table:table-cell office:value-type="float" office:value="46.7777777777778" calcext:value-type="float">
            <text:p>46.7777777777778</text:p>
          </table:table-cell>
          <table:table-cell/>
          <table:table-cell office:value-type="float" office:value="68.2222222222222" calcext:value-type="float">
            <text:p>68.2222222222222</text:p>
          </table:table-cell>
        </table:table-row>
        <table:table-row table:style-name="ro1">
          <table:table-cell office:value-type="float" office:value="38.1071428571429" calcext:value-type="float">
            <text:p>38.1071428571429</text:p>
          </table:table-cell>
          <table:table-cell/>
          <table:table-cell office:value-type="float" office:value="68.2941176470588" calcext:value-type="float">
            <text:p>68.2941176470588</text:p>
          </table:table-cell>
        </table:table-row>
        <table:table-row table:style-name="ro1">
          <table:table-cell office:value-type="float" office:value="32.4893617021277" calcext:value-type="float">
            <text:p>32.4893617021277</text:p>
          </table:table-cell>
          <table:table-cell/>
          <table:table-cell office:value-type="float" office:value="68.3333333333333" calcext:value-type="float">
            <text:p>68.3333333333333</text:p>
          </table:table-cell>
        </table:table-row>
        <table:table-row table:style-name="ro1">
          <table:table-cell office:value-type="float" office:value="46.4047619047619" calcext:value-type="float">
            <text:p>46.4047619047619</text:p>
          </table:table-cell>
          <table:table-cell/>
          <table:table-cell office:value-type="float" office:value="68.3571428571429" calcext:value-type="float">
            <text:p>68.3571428571429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/>
          <table:table-cell office:value-type="float" office:value="68.4285714285714" calcext:value-type="float">
            <text:p>68.4285714285714</text:p>
          </table:table-cell>
        </table:table-row>
        <table:table-row table:style-name="ro1">
          <table:table-cell office:value-type="float" office:value="52.3333333333333" calcext:value-type="float">
            <text:p>52.3333333333333</text:p>
          </table:table-cell>
          <table:table-cell/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/>
          <table:table-cell office:value-type="float" office:value="68.4545454545455" calcext:value-type="float">
            <text:p>68.4545454545455</text:p>
          </table:table-cell>
        </table:table-row>
        <table:table-row table:style-name="ro1">
          <table:table-cell office:value-type="float" office:value="43.7727272727273" calcext:value-type="float">
            <text:p>43.7727272727273</text:p>
          </table:table-cell>
          <table:table-cell/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46.8695652173913" calcext:value-type="float">
            <text:p>46.8695652173913</text:p>
          </table:table-cell>
          <table:table-cell/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66.7142857142857" calcext:value-type="float">
            <text:p>66.7142857142857</text:p>
          </table:table-cell>
          <table:table-cell/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94.6666666666667" calcext:value-type="float">
            <text:p>94.6666666666667</text:p>
          </table:table-cell>
          <table:table-cell/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/>
          <table:table-cell office:value-type="float" office:value="68.6428571428571" calcext:value-type="float">
            <text:p>68.6428571428571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/>
          <table:table-cell office:value-type="float" office:value="68.6818181818182" calcext:value-type="float">
            <text:p>68.6818181818182</text:p>
          </table:table-cell>
        </table:table-row>
        <table:table-row table:style-name="ro1">
          <table:table-cell office:value-type="float" office:value="40.3333333333333" calcext:value-type="float">
            <text:p>40.3333333333333</text:p>
          </table:table-cell>
          <table:table-cell/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50.7058823529412" calcext:value-type="float">
            <text:p>50.7058823529412</text:p>
          </table:table-cell>
          <table:table-cell/>
          <table:table-cell office:value-type="float" office:value="68.8888888888889" calcext:value-type="float">
            <text:p>68.8888888888889</text:p>
          </table:table-cell>
        </table:table-row>
        <table:table-row table:style-name="ro1">
          <table:table-cell office:value-type="float" office:value="56.1875" calcext:value-type="float">
            <text:p>56.18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.0508474576271" calcext:value-type="float">
            <text:p>41.050847457627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.9565217391304" calcext:value-type="float">
            <text:p>35.956521739130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.5238095238095" calcext:value-type="float">
            <text:p>42.523809523809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.68" calcext:value-type="float">
            <text:p>54.68</text:p>
          </table:table-cell>
          <table:table-cell/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51.8181818181818" calcext:value-type="float">
            <text:p>51.8181818181818</text:p>
          </table:table-cell>
          <table:table-cell/>
          <table:table-cell office:value-type="float" office:value="69.1818181818182" calcext:value-type="float">
            <text:p>69.1818181818182</text:p>
          </table:table-cell>
        </table:table-row>
        <table:table-row table:style-name="ro1">
          <table:table-cell office:value-type="float" office:value="39.6428571428571" calcext:value-type="float">
            <text:p>39.6428571428571</text:p>
          </table:table-cell>
          <table:table-cell/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40.24" calcext:value-type="float">
            <text:p>40.24</text:p>
          </table:table-cell>
          <table:table-cell/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/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26.0721649484536" calcext:value-type="float">
            <text:p>26.0721649484536</text:p>
          </table:table-cell>
          <table:table-cell/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14.0392156862745" calcext:value-type="float">
            <text:p>14.0392156862745</text:p>
          </table:table-cell>
          <table:table-cell/>
          <table:table-cell office:value-type="float" office:value="69.2307692307692" calcext:value-type="float">
            <text:p>69.2307692307692</text:p>
          </table:table-cell>
        </table:table-row>
        <table:table-row table:style-name="ro1">
          <table:table-cell office:value-type="float" office:value="61.7391304347826" calcext:value-type="float">
            <text:p>61.7391304347826</text:p>
          </table:table-cell>
          <table:table-cell/>
          <table:table-cell office:value-type="float" office:value="69.2424242424243" calcext:value-type="float">
            <text:p>69.2424242424243</text:p>
          </table:table-cell>
        </table:table-row>
        <table:table-row table:style-name="ro1">
          <table:table-cell office:value-type="float" office:value="53.7391304347826" calcext:value-type="float">
            <text:p>53.7391304347826</text:p>
          </table:table-cell>
          <table:table-cell/>
          <table:table-cell office:value-type="float" office:value="69.25" calcext:value-type="float">
            <text:p>69.25</text:p>
          </table:table-cell>
        </table:table-row>
        <table:table-row table:style-name="ro1">
          <table:table-cell office:value-type="float" office:value="48.5744680851064" calcext:value-type="float">
            <text:p>48.5744680851064</text:p>
          </table:table-cell>
          <table:table-cell/>
          <table:table-cell office:value-type="float" office:value="69.2631578947368" calcext:value-type="float">
            <text:p>69.2631578947368</text:p>
          </table:table-cell>
        </table:table-row>
        <table:table-row table:style-name="ro1">
          <table:table-cell office:value-type="float" office:value="49.8829787234043" calcext:value-type="float">
            <text:p>49.8829787234043</text:p>
          </table:table-cell>
          <table:table-cell/>
          <table:table-cell office:value-type="float" office:value="69.2857142857143" calcext:value-type="float">
            <text:p>69.2857142857143</text:p>
          </table:table-cell>
        </table:table-row>
        <table:table-row table:style-name="ro1">
          <table:table-cell office:value-type="float" office:value="38.1609195402299" calcext:value-type="float">
            <text:p>38.1609195402299</text:p>
          </table:table-cell>
          <table:table-cell/>
          <table:table-cell office:value-type="float" office:value="69.3030303030303" calcext:value-type="float">
            <text:p>69.3030303030303</text:p>
          </table:table-cell>
        </table:table-row>
        <table:table-row table:style-name="ro1">
          <table:table-cell office:value-type="float" office:value="53.6666666666667" calcext:value-type="float">
            <text:p>53.6666666666667</text:p>
          </table:table-cell>
          <table:table-cell/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44.5862068965517" calcext:value-type="float">
            <text:p>44.5862068965517</text:p>
          </table:table-cell>
          <table:table-cell/>
          <table:table-cell office:value-type="float" office:value="69.4166666666667" calcext:value-type="float">
            <text:p>69.4166666666667</text:p>
          </table:table-cell>
        </table:table-row>
        <table:table-row table:style-name="ro1">
          <table:table-cell office:value-type="float" office:value="42.1923076923077" calcext:value-type="float">
            <text:p>42.1923076923077</text:p>
          </table:table-cell>
          <table:table-cell/>
          <table:table-cell office:value-type="float" office:value="69.4285714285714" calcext:value-type="float">
            <text:p>69.4285714285714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/>
          <table:table-cell office:value-type="float" office:value="69.4761904761905" calcext:value-type="float">
            <text:p>69.4761904761905</text:p>
          </table:table-cell>
        </table:table-row>
        <table:table-row table:style-name="ro1">
          <table:table-cell office:value-type="float" office:value="31.5157894736842" calcext:value-type="float">
            <text:p>31.5157894736842</text:p>
          </table:table-cell>
          <table:table-cell/>
          <table:table-cell office:value-type="float" office:value="69.6666666666667" calcext:value-type="float">
            <text:p>69.6666666666667</text:p>
          </table:table-cell>
        </table:table-row>
        <table:table-row table:style-name="ro1">
          <table:table-cell office:value-type="float" office:value="55.2857142857143" calcext:value-type="float">
            <text:p>55.2857142857143</text:p>
          </table:table-cell>
          <table:table-cell/>
          <table:table-cell office:value-type="float" office:value="69.6666666666667" calcext:value-type="float">
            <text:p>69.6666666666667</text:p>
          </table:table-cell>
        </table:table-row>
        <table:table-row table:style-name="ro1">
          <table:table-cell office:value-type="float" office:value="50.5909090909091" calcext:value-type="float">
            <text:p>50.5909090909091</text:p>
          </table:table-cell>
          <table:table-cell/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/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39.6741573033708" calcext:value-type="float">
            <text:p>39.6741573033708</text:p>
          </table:table-cell>
          <table:table-cell/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5.3333333333333" calcext:value-type="float">
            <text:p>15.3333333333333</text:p>
          </table:table-cell>
          <table:table-cell/>
          <table:table-cell office:value-type="float" office:value="69.9047619047619" calcext:value-type="float">
            <text:p>69.90476190476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.9166666666667" calcext:value-type="float">
            <text:p>69.9166666666667</text:p>
          </table:table-cell>
        </table:table-row>
        <table:table-row table:style-name="ro1">
          <table:table-cell office:value-type="float" office:value="52.925" calcext:value-type="float">
            <text:p>52.925</text:p>
          </table:table-cell>
          <table:table-cell/>
          <table:table-cell office:value-type="float" office:value="69.9583333333333" calcext:value-type="float">
            <text:p>69.9583333333333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.7684210526316" calcext:value-type="float">
            <text:p>31.768421052631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.6923076923077" calcext:value-type="float">
            <text:p>39.6923076923077</text:p>
          </table:table-cell>
          <table:table-cell/>
          <table:table-cell office:value-type="float" office:value="70.04" calcext:value-type="float">
            <text:p>70.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0.0869565217391" calcext:value-type="float">
            <text:p>70.0869565217391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/>
          <table:table-cell office:value-type="float" office:value="70.1176470588235" calcext:value-type="float">
            <text:p>70.1176470588235</text:p>
          </table:table-cell>
        </table:table-row>
        <table:table-row table:style-name="ro1">
          <table:table-cell office:value-type="float" office:value="45.5384615384615" calcext:value-type="float">
            <text:p>45.5384615384615</text:p>
          </table:table-cell>
          <table:table-cell/>
          <table:table-cell office:value-type="float" office:value="70.1851851851852" calcext:value-type="float">
            <text:p>70.1851851851852</text:p>
          </table:table-cell>
        </table:table-row>
        <table:table-row table:style-name="ro1">
          <table:table-cell office:value-type="float" office:value="56.3636363636364" calcext:value-type="float">
            <text:p>56.3636363636364</text:p>
          </table:table-cell>
          <table:table-cell/>
          <table:table-cell office:value-type="float" office:value="70.2173913043478" calcext:value-type="float">
            <text:p>70.2173913043478</text:p>
          </table:table-cell>
        </table:table-row>
        <table:table-row table:style-name="ro1">
          <table:table-cell office:value-type="float" office:value="51.3703703703704" calcext:value-type="float">
            <text:p>51.3703703703704</text:p>
          </table:table-cell>
          <table:table-cell/>
          <table:table-cell office:value-type="float" office:value="70.2222222222222" calcext:value-type="float">
            <text:p>70.2222222222222</text:p>
          </table:table-cell>
        </table:table-row>
        <table:table-row table:style-name="ro1">
          <table:table-cell office:value-type="float" office:value="53.5625" calcext:value-type="float">
            <text:p>53.5625</text:p>
          </table:table-cell>
          <table:table-cell/>
          <table:table-cell office:value-type="float" office:value="70.3333333333333" calcext:value-type="float">
            <text:p>70.3333333333333</text:p>
          </table:table-cell>
        </table:table-row>
        <table:table-row table:style-name="ro1">
          <table:table-cell office:value-type="float" office:value="42.9047619047619" calcext:value-type="float">
            <text:p>42.9047619047619</text:p>
          </table:table-cell>
          <table:table-cell/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53.8095238095238" calcext:value-type="float">
            <text:p>53.8095238095238</text:p>
          </table:table-cell>
          <table:table-cell/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/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42.7777777777778" calcext:value-type="float">
            <text:p>42.7777777777778</text:p>
          </table:table-cell>
          <table:table-cell/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/>
          <table:table-cell office:value-type="float" office:value="70.5555555555556" calcext:value-type="float">
            <text:p>70.5555555555556</text:p>
          </table:table-cell>
        </table:table-row>
        <table:table-row table:style-name="ro1">
          <table:table-cell office:value-type="float" office:value="38.3888888888889" calcext:value-type="float">
            <text:p>38.3888888888889</text:p>
          </table:table-cell>
          <table:table-cell/>
          <table:table-cell office:value-type="float" office:value="70.5714285714286" calcext:value-type="float">
            <text:p>70.5714285714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0.6086956521739" calcext:value-type="float">
            <text:p>70.6086956521739</text:p>
          </table:table-cell>
        </table:table-row>
        <table:table-row table:style-name="ro1">
          <table:table-cell office:value-type="float" office:value="43.0769230769231" calcext:value-type="float">
            <text:p>43.0769230769231</text:p>
          </table:table-cell>
          <table:table-cell/>
          <table:table-cell office:value-type="float" office:value="70.7647058823529" calcext:value-type="float">
            <text:p>70.7647058823529</text:p>
          </table:table-cell>
        </table:table-row>
        <table:table-row table:style-name="ro1">
          <table:table-cell office:value-type="float" office:value="28.8101265822785" calcext:value-type="float">
            <text:p>28.8101265822785</text:p>
          </table:table-cell>
          <table:table-cell/>
          <table:table-cell office:value-type="float" office:value="70.7777777777778" calcext:value-type="float">
            <text:p>70.7777777777778</text:p>
          </table:table-cell>
        </table:table-row>
        <table:table-row table:style-name="ro1">
          <table:table-cell office:value-type="float" office:value="40.3793103448276" calcext:value-type="float">
            <text:p>40.3793103448276</text:p>
          </table:table-cell>
          <table:table-cell/>
          <table:table-cell office:value-type="float" office:value="70.7777777777778" calcext:value-type="float">
            <text:p>70.7777777777778</text:p>
          </table:table-cell>
        </table:table-row>
        <table:table-row table:style-name="ro1">
          <table:table-cell office:value-type="float" office:value="48.0277777777778" calcext:value-type="float">
            <text:p>48.0277777777778</text:p>
          </table:table-cell>
          <table:table-cell/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71.0833333333333" calcext:value-type="float">
            <text:p>71.0833333333333</text:p>
          </table:table-cell>
          <table:table-cell/>
          <table:table-cell office:value-type="float" office:value="70.952380952381" calcext:value-type="float">
            <text:p>70.952380952381</text:p>
          </table:table-cell>
        </table:table-row>
        <table:table-row table:style-name="ro1">
          <table:table-cell office:value-type="float" office:value="35.6315789473684" calcext:value-type="float">
            <text:p>35.631578947368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.7727272727273" calcext:value-type="float">
            <text:p>42.7727272727273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.3333333333333" calcext:value-type="float">
            <text:p>61.3333333333333</text:p>
          </table:table-cell>
          <table:table-cell/>
          <table:table-cell office:value-type="float" office:value="71.0526315789474" calcext:value-type="float">
            <text:p>71.0526315789474</text:p>
          </table:table-cell>
        </table:table-row>
        <table:table-row table:style-name="ro1">
          <table:table-cell office:value-type="float" office:value="59.0222222222222" calcext:value-type="float">
            <text:p>59.0222222222222</text:p>
          </table:table-cell>
          <table:table-cell/>
          <table:table-cell office:value-type="float" office:value="71.0833333333333" calcext:value-type="float">
            <text:p>71.0833333333333</text:p>
          </table:table-cell>
        </table:table-row>
        <table:table-row table:style-name="ro1">
          <table:table-cell office:value-type="float" office:value="70.2222222222222" calcext:value-type="float">
            <text:p>70.2222222222222</text:p>
          </table:table-cell>
          <table:table-cell/>
          <table:table-cell office:value-type="float" office:value="71.0833333333333" calcext:value-type="float">
            <text:p>71.0833333333333</text:p>
          </table:table-cell>
        </table:table-row>
        <table:table-row table:style-name="ro1">
          <table:table-cell office:value-type="float" office:value="55.2083333333333" calcext:value-type="float">
            <text:p>55.2083333333333</text:p>
          </table:table-cell>
          <table:table-cell/>
          <table:table-cell office:value-type="float" office:value="71.1111111111111" calcext:value-type="float">
            <text:p>71.1111111111111</text:p>
          </table:table-cell>
        </table:table-row>
        <table:table-row table:style-name="ro1">
          <table:table-cell office:value-type="float" office:value="44.4333333333333" calcext:value-type="float">
            <text:p>44.4333333333333</text:p>
          </table:table-cell>
          <table:table-cell/>
          <table:table-cell office:value-type="float" office:value="71.1333333333333" calcext:value-type="float">
            <text:p>71.1333333333333</text:p>
          </table:table-cell>
        </table:table-row>
        <table:table-row table:style-name="ro1">
          <table:table-cell office:value-type="float" office:value="57.6859504132231" calcext:value-type="float">
            <text:p>57.6859504132231</text:p>
          </table:table-cell>
          <table:table-cell/>
          <table:table-cell office:value-type="float" office:value="71.2777777777778" calcext:value-type="float">
            <text:p>71.2777777777778</text:p>
          </table:table-cell>
        </table:table-row>
        <table:table-row table:style-name="ro1">
          <table:table-cell office:value-type="float" office:value="42.0384615384615" calcext:value-type="float">
            <text:p>42.0384615384615</text:p>
          </table:table-cell>
          <table:table-cell/>
          <table:table-cell office:value-type="float" office:value="71.2857142857143" calcext:value-type="float">
            <text:p>71.2857142857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71.3333333333333" calcext:value-type="float">
            <text:p>71.3333333333333</text:p>
          </table:table-cell>
        </table:table-row>
        <table:table-row table:style-name="ro1">
          <table:table-cell office:value-type="float" office:value="20.3181818181818" calcext:value-type="float">
            <text:p>20.3181818181818</text:p>
          </table:table-cell>
          <table:table-cell/>
          <table:table-cell office:value-type="float" office:value="71.4545454545455" calcext:value-type="float">
            <text:p>71.4545454545455</text:p>
          </table:table-cell>
        </table:table-row>
        <table:table-row table:style-name="ro1">
          <table:table-cell office:value-type="float" office:value="28.5405405405405" calcext:value-type="float">
            <text:p>28.5405405405405</text:p>
          </table:table-cell>
          <table:table-cell/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/>
          <table:table-cell office:value-type="float" office:value="71.5714285714286" calcext:value-type="float">
            <text:p>71.5714285714286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/>
          <table:table-cell office:value-type="float" office:value="71.625" calcext:value-type="float">
            <text:p>71.625</text:p>
          </table:table-cell>
        </table:table-row>
        <table:table-row table:style-name="ro1">
          <table:table-cell office:value-type="float" office:value="36.7272727272727" calcext:value-type="float">
            <text:p>36.7272727272727</text:p>
          </table:table-cell>
          <table:table-cell/>
          <table:table-cell office:value-type="float" office:value="71.625" calcext:value-type="float">
            <text:p>71.625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/>
          <table:table-cell office:value-type="float" office:value="71.7222222222222" calcext:value-type="float">
            <text:p>71.7222222222222</text:p>
          </table:table-cell>
        </table:table-row>
        <table:table-row table:style-name="ro1">
          <table:table-cell office:value-type="float" office:value="46.8823529411765" calcext:value-type="float">
            <text:p>46.8823529411765</text:p>
          </table:table-cell>
          <table:table-cell/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47.2978723404255" calcext:value-type="float">
            <text:p>47.2978723404255</text:p>
          </table:table-cell>
          <table:table-cell/>
          <table:table-cell office:value-type="float" office:value="71.8125" calcext:value-type="float">
            <text:p>71.8125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/>
          <table:table-cell office:value-type="float" office:value="71.9487179487179" calcext:value-type="float">
            <text:p>71.9487179487179</text:p>
          </table:table-cell>
        </table:table-row>
        <table:table-row table:style-name="ro1">
          <table:table-cell office:value-type="float" office:value="53.1746031746032" calcext:value-type="float">
            <text:p>53.1746031746032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.6101694915254" calcext:value-type="float">
            <text:p>40.610169491525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.1904761904762" calcext:value-type="float">
            <text:p>56.1904761904762</text:p>
          </table:table-cell>
          <table:table-cell/>
          <table:table-cell office:value-type="float" office:value="72.0588235294118" calcext:value-type="float">
            <text:p>72.0588235294118</text:p>
          </table:table-cell>
        </table:table-row>
        <table:table-row table:style-name="ro1">
          <table:table-cell office:value-type="float" office:value="41.8333333333333" calcext:value-type="float">
            <text:p>41.8333333333333</text:p>
          </table:table-cell>
          <table:table-cell/>
          <table:table-cell office:value-type="float" office:value="72.1578947368421" calcext:value-type="float">
            <text:p>72.1578947368421</text:p>
          </table:table-cell>
        </table:table-row>
        <table:table-row table:style-name="ro1">
          <table:table-cell office:value-type="float" office:value="45.4329896907217" calcext:value-type="float">
            <text:p>45.4329896907217</text:p>
          </table:table-cell>
          <table:table-cell/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46.1428571428572" calcext:value-type="float">
            <text:p>46.1428571428572</text:p>
          </table:table-cell>
          <table:table-cell/>
          <table:table-cell office:value-type="float" office:value="72.2916666666667" calcext:value-type="float">
            <text:p>72.2916666666667</text:p>
          </table:table-cell>
        </table:table-row>
        <table:table-row table:style-name="ro1">
          <table:table-cell office:value-type="float" office:value="42.8518518518519" calcext:value-type="float">
            <text:p>42.8518518518519</text:p>
          </table:table-cell>
          <table:table-cell/>
          <table:table-cell office:value-type="float" office:value="72.4782608695652" calcext:value-type="float">
            <text:p>72.4782608695652</text:p>
          </table:table-cell>
        </table:table-row>
        <table:table-row table:style-name="ro1">
          <table:table-cell office:value-type="float" office:value="64.1818181818182" calcext:value-type="float">
            <text:p>64.1818181818182</text:p>
          </table:table-cell>
          <table:table-cell/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56.5238095238095" calcext:value-type="float">
            <text:p>56.5238095238095</text:p>
          </table:table-cell>
          <table:table-cell/>
          <table:table-cell office:value-type="float" office:value="72.5454545454546" calcext:value-type="float">
            <text:p>72.5454545454546</text:p>
          </table:table-cell>
        </table:table-row>
        <table:table-row table:style-name="ro1">
          <table:table-cell office:value-type="float" office:value="46.3448275862069" calcext:value-type="float">
            <text:p>46.3448275862069</text:p>
          </table:table-cell>
          <table:table-cell/>
          <table:table-cell office:value-type="float" office:value="72.5945945945946" calcext:value-type="float">
            <text:p>72.594594594594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/>
          <table:table-cell office:value-type="float" office:value="72.7142857142857" calcext:value-type="float">
            <text:p>72.7142857142857</text:p>
          </table:table-cell>
        </table:table-row>
        <table:table-row table:style-name="ro1">
          <table:table-cell office:value-type="float" office:value="47.9438202247191" calcext:value-type="float">
            <text:p>47.9438202247191</text:p>
          </table:table-cell>
          <table:table-cell/>
          <table:table-cell office:value-type="float" office:value="72.7291666666667" calcext:value-type="float">
            <text:p>72.7291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2.8333333333333" calcext:value-type="float">
            <text:p>72.8333333333333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.7857142857143" calcext:value-type="float">
            <text:p>44.7857142857143</text:p>
          </table:table-cell>
          <table:table-cell/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/>
          <table:table-cell office:value-type="float" office:value="73.125" calcext:value-type="float">
            <text:p>73.125</text:p>
          </table:table-cell>
        </table:table-row>
        <table:table-row table:style-name="ro1">
          <table:table-cell office:value-type="float" office:value="45.2962962962963" calcext:value-type="float">
            <text:p>45.2962962962963</text:p>
          </table:table-cell>
          <table:table-cell/>
          <table:table-cell office:value-type="float" office:value="73.125" calcext:value-type="float">
            <text:p>73.125</text:p>
          </table:table-cell>
        </table:table-row>
        <table:table-row table:style-name="ro1">
          <table:table-cell office:value-type="float" office:value="36.0591715976331" calcext:value-type="float">
            <text:p>36.0591715976331</text:p>
          </table:table-cell>
          <table:table-cell/>
          <table:table-cell office:value-type="float" office:value="73.2222222222222" calcext:value-type="float">
            <text:p>73.2222222222222</text:p>
          </table:table-cell>
        </table:table-row>
        <table:table-row table:style-name="ro1">
          <table:table-cell office:value-type="float" office:value="50.0476190476191" calcext:value-type="float">
            <text:p>50.0476190476191</text:p>
          </table:table-cell>
          <table:table-cell/>
          <table:table-cell office:value-type="float" office:value="73.2432432432432" calcext:value-type="float">
            <text:p>73.2432432432432</text:p>
          </table:table-cell>
        </table:table-row>
        <table:table-row table:style-name="ro1">
          <table:table-cell office:value-type="float" office:value="45.6829268292683" calcext:value-type="float">
            <text:p>45.6829268292683</text:p>
          </table:table-cell>
          <table:table-cell/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/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35.9833333333333" calcext:value-type="float">
            <text:p>35.9833333333333</text:p>
          </table:table-cell>
          <table:table-cell/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52.4615384615385" calcext:value-type="float">
            <text:p>52.4615384615385</text:p>
          </table:table-cell>
          <table:table-cell/>
          <table:table-cell office:value-type="float" office:value="73.2857142857143" calcext:value-type="float">
            <text:p>73.2857142857143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30.5925925925926" calcext:value-type="float">
            <text:p>30.5925925925926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7.551724137931" calcext:value-type="float">
            <text:p>47.551724137931</text:p>
          </table:table-cell>
          <table:table-cell/>
          <table:table-cell office:value-type="float" office:value="73.4285714285714" calcext:value-type="float">
            <text:p>73.4285714285714</text:p>
          </table:table-cell>
        </table:table-row>
        <table:table-row table:style-name="ro1">
          <table:table-cell office:value-type="float" office:value="28.325" calcext:value-type="float">
            <text:p>28.325</text:p>
          </table:table-cell>
          <table:table-cell/>
          <table:table-cell office:value-type="float" office:value="73.5555555555556" calcext:value-type="float">
            <text:p>73.555555555555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/>
          <table:table-cell office:value-type="float" office:value="73.5555555555556" calcext:value-type="float">
            <text:p>73.5555555555556</text:p>
          </table:table-cell>
        </table:table-row>
        <table:table-row table:style-name="ro1">
          <table:table-cell office:value-type="float" office:value="38.390243902439" calcext:value-type="float">
            <text:p>38.390243902439</text:p>
          </table:table-cell>
          <table:table-cell/>
          <table:table-cell office:value-type="float" office:value="73.6666666666667" calcext:value-type="float">
            <text:p>73.6666666666667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/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3.7857142857143" calcext:value-type="float">
            <text:p>73.7857142857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3.8571428571429" calcext:value-type="float">
            <text:p>73.8571428571429</text:p>
          </table:table-cell>
        </table:table-row>
        <table:table-row table:style-name="ro1">
          <table:table-cell office:value-type="float" office:value="43.2666666666667" calcext:value-type="float">
            <text:p>43.266666666666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4.125" calcext:value-type="float">
            <text:p>74.125</text:p>
          </table:table-cell>
        </table:table-row>
        <table:table-row table:style-name="ro1">
          <table:table-cell office:value-type="float" office:value="53.1086956521739" calcext:value-type="float">
            <text:p>53.1086956521739</text:p>
          </table:table-cell>
          <table:table-cell/>
          <table:table-cell office:value-type="float" office:value="74.1666666666667" calcext:value-type="float">
            <text:p>74.1666666666667</text:p>
          </table:table-cell>
        </table:table-row>
        <table:table-row table:style-name="ro1">
          <table:table-cell office:value-type="float" office:value="30.1739130434783" calcext:value-type="float">
            <text:p>30.1739130434783</text:p>
          </table:table-cell>
          <table:table-cell/>
          <table:table-cell office:value-type="float" office:value="74.1785714285714" calcext:value-type="float">
            <text:p>74.1785714285714</text:p>
          </table:table-cell>
        </table:table-row>
        <table:table-row table:style-name="ro1">
          <table:table-cell office:value-type="float" office:value="54.3333333333333" calcext:value-type="float">
            <text:p>54.3333333333333</text:p>
          </table:table-cell>
          <table:table-cell/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14.7777777777778" calcext:value-type="float">
            <text:p>14.7777777777778</text:p>
          </table:table-cell>
          <table:table-cell/>
          <table:table-cell office:value-type="float" office:value="74.2608695652174" calcext:value-type="float">
            <text:p>74.2608695652174</text:p>
          </table:table-cell>
        </table:table-row>
        <table:table-row table:style-name="ro1">
          <table:table-cell office:value-type="float" office:value="44.4523809523809" calcext:value-type="float">
            <text:p>44.4523809523809</text:p>
          </table:table-cell>
          <table:table-cell/>
          <table:table-cell office:value-type="float" office:value="74.4814814814815" calcext:value-type="float">
            <text:p>74.48148148148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65.5909090909091" calcext:value-type="float">
            <text:p>65.5909090909091</text:p>
          </table:table-cell>
          <table:table-cell/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62.2771739130435" calcext:value-type="float">
            <text:p>62.2771739130435</text:p>
          </table:table-cell>
          <table:table-cell/>
          <table:table-cell office:value-type="float" office:value="74.5555555555556" calcext:value-type="float">
            <text:p>74.5555555555556</text:p>
          </table:table-cell>
        </table:table-row>
        <table:table-row table:style-name="ro1">
          <table:table-cell office:value-type="float" office:value="41.5238095238095" calcext:value-type="float">
            <text:p>41.5238095238095</text:p>
          </table:table-cell>
          <table:table-cell/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33.6428571428571" calcext:value-type="float">
            <text:p>33.6428571428571</text:p>
          </table:table-cell>
          <table:table-cell/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44.7916666666667" calcext:value-type="float">
            <text:p>44.7916666666667</text:p>
          </table:table-cell>
          <table:table-cell/>
          <table:table-cell office:value-type="float" office:value="74.8333333333333" calcext:value-type="float">
            <text:p>74.8333333333333</text:p>
          </table:table-cell>
        </table:table-row>
        <table:table-row table:style-name="ro1">
          <table:table-cell office:value-type="float" office:value="61.6470588235294" calcext:value-type="float">
            <text:p>61.647058823529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/>
          <table:table-cell office:value-type="float" office:value="75.1052631578947" calcext:value-type="float">
            <text:p>75.1052631578947</text:p>
          </table:table-cell>
        </table:table-row>
        <table:table-row table:style-name="ro1">
          <table:table-cell office:value-type="float" office:value="9.54237288135593" calcext:value-type="float">
            <text:p>9.54237288135593</text:p>
          </table:table-cell>
          <table:table-cell/>
          <table:table-cell office:value-type="float" office:value="75.1666666666667" calcext:value-type="float">
            <text:p>75.1666666666667</text:p>
          </table:table-cell>
        </table:table-row>
        <table:table-row table:style-name="ro1">
          <table:table-cell office:value-type="float" office:value="44.8660714285714" calcext:value-type="float">
            <text:p>44.8660714285714</text:p>
          </table:table-cell>
          <table:table-cell/>
          <table:table-cell office:value-type="float" office:value="75.1666666666667" calcext:value-type="float">
            <text:p>75.1666666666667</text:p>
          </table:table-cell>
        </table:table-row>
        <table:table-row table:style-name="ro1">
          <table:table-cell office:value-type="float" office:value="48.3571428571429" calcext:value-type="float">
            <text:p>48.3571428571429</text:p>
          </table:table-cell>
          <table:table-cell/>
          <table:table-cell office:value-type="float" office:value="75.2142857142857" calcext:value-type="float">
            <text:p>75.2142857142857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/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42.9259259259259" calcext:value-type="float">
            <text:p>42.9259259259259</text:p>
          </table:table-cell>
          <table:table-cell/>
          <table:table-cell office:value-type="float" office:value="75.3333333333333" calcext:value-type="float">
            <text:p>75.3333333333333</text:p>
          </table:table-cell>
        </table:table-row>
        <table:table-row table:style-name="ro1">
          <table:table-cell office:value-type="float" office:value="29.9032258064516" calcext:value-type="float">
            <text:p>29.9032258064516</text:p>
          </table:table-cell>
          <table:table-cell/>
          <table:table-cell office:value-type="float" office:value="75.3571428571429" calcext:value-type="float">
            <text:p>75.35714285714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75.3846153846154" calcext:value-type="float">
            <text:p>75.3846153846154</text:p>
          </table:table-cell>
        </table:table-row>
        <table:table-row table:style-name="ro1">
          <table:table-cell office:value-type="float" office:value="53.7619047619048" calcext:value-type="float">
            <text:p>53.7619047619048</text:p>
          </table:table-cell>
          <table:table-cell/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47.9545454545455" calcext:value-type="float">
            <text:p>47.9545454545455</text:p>
          </table:table-cell>
          <table:table-cell/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/>
          <table:table-cell office:value-type="float" office:value="75.5652173913043" calcext:value-type="float">
            <text:p>75.5652173913043</text:p>
          </table:table-cell>
        </table:table-row>
        <table:table-row table:style-name="ro1">
          <table:table-cell office:value-type="float" office:value="43.225" calcext:value-type="float">
            <text:p>43.225</text:p>
          </table:table-cell>
          <table:table-cell/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46.7254901960784" calcext:value-type="float">
            <text:p>46.725490196078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.2941176470588" calcext:value-type="float">
            <text:p>16.2941176470588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.1666666666667" calcext:value-type="float">
            <text:p>46.1666666666667</text:p>
          </table:table-cell>
          <table:table-cell/>
          <table:table-cell office:value-type="float" office:value="76.2272727272727" calcext:value-type="float">
            <text:p>76.2272727272727</text:p>
          </table:table-cell>
        </table:table-row>
        <table:table-row table:style-name="ro1">
          <table:table-cell office:value-type="float" office:value="39.7222222222222" calcext:value-type="float">
            <text:p>39.7222222222222</text:p>
          </table:table-cell>
          <table:table-cell/>
          <table:table-cell office:value-type="float" office:value="76.3157894736842" calcext:value-type="float">
            <text:p>76.3157894736842</text:p>
          </table:table-cell>
        </table:table-row>
        <table:table-row table:style-name="ro1">
          <table:table-cell office:value-type="float" office:value="70.952380952381" calcext:value-type="float">
            <text:p>70.952380952381</text:p>
          </table:table-cell>
          <table:table-cell/>
          <table:table-cell office:value-type="float" office:value="76.4545454545455" calcext:value-type="float">
            <text:p>76.4545454545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6.6111111111111" calcext:value-type="float">
            <text:p>76.6111111111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36.9166666666667" calcext:value-type="float">
            <text:p>36.9166666666667</text:p>
          </table:table-cell>
          <table:table-cell/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46.6538461538462" calcext:value-type="float">
            <text:p>46.653846153846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.2325581395349" calcext:value-type="float">
            <text:p>31.232558139534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.1578947368421" calcext:value-type="float">
            <text:p>49.157894736842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.7793103448276" calcext:value-type="float">
            <text:p>12.7793103448276</text:p>
          </table:table-cell>
          <table:table-cell/>
          <table:table-cell office:value-type="float" office:value="77.1111111111111" calcext:value-type="float">
            <text:p>77.11111111111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/>
          <table:table-cell office:value-type="float" office:value="77.1111111111111" calcext:value-type="float">
            <text:p>77.1111111111111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/>
          <table:table-cell office:value-type="float" office:value="77.2222222222222" calcext:value-type="float">
            <text:p>77.22222222222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46.7555555555556" calcext:value-type="float">
            <text:p>46.7555555555556</text:p>
          </table:table-cell>
          <table:table-cell/>
          <table:table-cell office:value-type="float" office:value="77.5714285714286" calcext:value-type="float">
            <text:p>77.5714285714286</text:p>
          </table:table-cell>
        </table:table-row>
        <table:table-row table:style-name="ro1">
          <table:table-cell office:value-type="float" office:value="46.625" calcext:value-type="float">
            <text:p>46.625</text:p>
          </table:table-cell>
          <table:table-cell/>
          <table:table-cell office:value-type="float" office:value="77.5833333333333" calcext:value-type="float">
            <text:p>77.5833333333333</text:p>
          </table:table-cell>
        </table:table-row>
        <table:table-row table:style-name="ro1">
          <table:table-cell office:value-type="float" office:value="58.2272727272727" calcext:value-type="float">
            <text:p>58.227272727272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.515625" calcext:value-type="float">
            <text:p>33.51562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.2272727272727" calcext:value-type="float">
            <text:p>54.227272727272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.1842105263158" calcext:value-type="float">
            <text:p>57.1842105263158</text:p>
          </table:table-cell>
          <table:table-cell/>
          <table:table-cell office:value-type="float" office:value="78.0833333333333" calcext:value-type="float">
            <text:p>78.0833333333333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/>
          <table:table-cell office:value-type="float" office:value="78.6666666666667" calcext:value-type="float">
            <text:p>78.6666666666667</text:p>
          </table:table-cell>
        </table:table-row>
        <table:table-row table:style-name="ro1">
          <table:table-cell office:value-type="float" office:value="39.5730337078652" calcext:value-type="float">
            <text:p>39.5730337078652</text:p>
          </table:table-cell>
          <table:table-cell/>
          <table:table-cell office:value-type="float" office:value="78.7142857142857" calcext:value-type="float">
            <text:p>78.71428571428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.10204081632653" calcext:value-type="float">
            <text:p>5.10204081632653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.6985074626866" calcext:value-type="float">
            <text:p>36.6985074626866</text:p>
          </table:table-cell>
          <table:table-cell/>
          <table:table-cell office:value-type="float" office:value="79.0909090909091" calcext:value-type="float">
            <text:p>79.0909090909091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/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/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/>
          <table:table-cell office:value-type="float" office:value="79.2727272727273" calcext:value-type="float">
            <text:p>79.2727272727273</text:p>
          </table:table-cell>
        </table:table-row>
        <table:table-row table:style-name="ro1">
          <table:table-cell office:value-type="float" office:value="35.0434782608696" calcext:value-type="float">
            <text:p>35.0434782608696</text:p>
          </table:table-cell>
          <table:table-cell/>
          <table:table-cell office:value-type="float" office:value="79.3333333333333" calcext:value-type="float">
            <text:p>79.3333333333333</text:p>
          </table:table-cell>
        </table:table-row>
        <table:table-row table:style-name="ro1">
          <table:table-cell office:value-type="float" office:value="46.6190476190476" calcext:value-type="float">
            <text:p>46.6190476190476</text:p>
          </table:table-cell>
          <table:table-cell/>
          <table:table-cell office:value-type="float" office:value="79.4666666666667" calcext:value-type="float">
            <text:p>79.4666666666667</text:p>
          </table:table-cell>
        </table:table-row>
        <table:table-row table:style-name="ro1">
          <table:table-cell office:value-type="float" office:value="21.6666666666667" calcext:value-type="float">
            <text:p>21.6666666666667</text:p>
          </table:table-cell>
          <table:table-cell/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/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74.5555555555556" calcext:value-type="float">
            <text:p>74.5555555555556</text:p>
          </table:table-cell>
          <table:table-cell/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56.1764705882353" calcext:value-type="float">
            <text:p>56.1764705882353</text:p>
          </table:table-cell>
          <table:table-cell/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34.9649122807018" calcext:value-type="float">
            <text:p>34.9649122807018</text:p>
          </table:table-cell>
          <table:table-cell/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57.8636363636364" calcext:value-type="float">
            <text:p>57.8636363636364</text:p>
          </table:table-cell>
          <table:table-cell/>
          <table:table-cell office:value-type="float" office:value="80.1538461538462" calcext:value-type="float">
            <text:p>80.1538461538462</text:p>
          </table:table-cell>
        </table:table-row>
        <table:table-row table:style-name="ro1">
          <table:table-cell office:value-type="float" office:value="46.5454545454545" calcext:value-type="float">
            <text:p>46.5454545454545</text:p>
          </table:table-cell>
          <table:table-cell/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36.5777777777778" calcext:value-type="float">
            <text:p>36.5777777777778</text:p>
          </table:table-cell>
          <table:table-cell/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51.8809523809524" calcext:value-type="float">
            <text:p>51.8809523809524</text:p>
          </table:table-cell>
          <table:table-cell/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60.8076923076923" calcext:value-type="float">
            <text:p>60.8076923076923</text:p>
          </table:table-cell>
          <table:table-cell/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0.6363636363636" calcext:value-type="float">
            <text:p>80.63636363636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27.6046511627907" calcext:value-type="float">
            <text:p>27.6046511627907</text:p>
          </table:table-cell>
          <table:table-cell/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26.5103244837758" calcext:value-type="float">
            <text:p>26.5103244837758</text:p>
          </table:table-cell>
          <table:table-cell/>
          <table:table-cell office:value-type="float" office:value="80.8571428571429" calcext:value-type="float">
            <text:p>80.8571428571429</text:p>
          </table:table-cell>
        </table:table-row>
        <table:table-row table:style-name="ro1">
          <table:table-cell office:value-type="float" office:value="51.3023255813954" calcext:value-type="float">
            <text:p>51.302325581395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.5416666666667" calcext:value-type="float">
            <text:p>45.5416666666667</text:p>
          </table:table-cell>
          <table:table-cell/>
          <table:table-cell office:value-type="float" office:value="81.2857142857143" calcext:value-type="float">
            <text:p>81.2857142857143</text:p>
          </table:table-cell>
        </table:table-row>
        <table:table-row table:style-name="ro1">
          <table:table-cell office:value-type="float" office:value="34.2916666666667" calcext:value-type="float">
            <text:p>34.2916666666667</text:p>
          </table:table-cell>
          <table:table-cell/>
          <table:table-cell office:value-type="float" office:value="81.375" calcext:value-type="float">
            <text:p>81.375</text:p>
          </table:table-cell>
        </table:table-row>
        <table:table-row table:style-name="ro1">
          <table:table-cell office:value-type="float" office:value="58.4090909090909" calcext:value-type="float">
            <text:p>58.4090909090909</text:p>
          </table:table-cell>
          <table:table-cell/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81.9166666666667" calcext:value-type="float">
            <text:p>81.9166666666667</text:p>
          </table:table-cell>
        </table:table-row>
        <table:table-row table:style-name="ro1">
          <table:table-cell office:value-type="float" office:value="61.1612903225806" calcext:value-type="float">
            <text:p>61.1612903225806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.4583333333333" calcext:value-type="float">
            <text:p>55.4583333333333</text:p>
          </table:table-cell>
          <table:table-cell/>
          <table:table-cell office:value-type="float" office:value="82.3333333333333" calcext:value-type="float">
            <text:p>82.3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1.2352941176471" calcext:value-type="float">
            <text:p>21.2352941176471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.3333333333333" calcext:value-type="float">
            <text:p>15.3333333333333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.1611374407583" calcext:value-type="float">
            <text:p>44.1611374407583</text:p>
          </table:table-cell>
          <table:table-cell/>
          <table:table-cell office:value-type="float" office:value="83.1666666666667" calcext:value-type="float">
            <text:p>83.1666666666667</text:p>
          </table:table-cell>
        </table:table-row>
        <table:table-row table:style-name="ro1">
          <table:table-cell office:value-type="float" office:value="12.8571428571429" calcext:value-type="float">
            <text:p>12.8571428571429</text:p>
          </table:table-cell>
          <table:table-cell/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21.9473684210526" calcext:value-type="float">
            <text:p>21.9473684210526</text:p>
          </table:table-cell>
          <table:table-cell/>
          <table:table-cell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/>
          <table:table-cell office:value-type="float" office:value="83.3846153846154" calcext:value-type="float">
            <text:p>83.3846153846154</text:p>
          </table:table-cell>
        </table:table-row>
        <table:table-row table:style-name="ro1">
          <table:table-cell office:value-type="float" office:value="42.0243902439024" calcext:value-type="float">
            <text:p>42.0243902439024</text:p>
          </table:table-cell>
          <table:table-cell/>
          <table:table-cell office:value-type="float" office:value="83.4285714285714" calcext:value-type="float">
            <text:p>83.4285714285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83.5555555555556" calcext:value-type="float">
            <text:p>83.55555555555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3.6666666666667" calcext:value-type="float">
            <text:p>83.6666666666667</text:p>
          </table:table-cell>
        </table:table-row>
        <table:table-row table:style-name="ro1">
          <table:table-cell office:value-type="float" office:value="40.0833333333333" calcext:value-type="float">
            <text:p>40.0833333333333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.45" calcext:value-type="float">
            <text:p>68.45</text:p>
          </table:table-cell>
          <table:table-cell/>
          <table:table-cell office:value-type="float" office:value="84.05" calcext:value-type="float">
            <text:p>84.05</text:p>
          </table:table-cell>
        </table:table-row>
        <table:table-row table:style-name="ro1">
          <table:table-cell office:value-type="float" office:value="54.3827160493827" calcext:value-type="float">
            <text:p>54.3827160493827</text:p>
          </table:table-cell>
          <table:table-cell/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44.0952380952381" calcext:value-type="float">
            <text:p>44.0952380952381</text:p>
          </table:table-cell>
          <table:table-cell/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4.5714285714286" calcext:value-type="float">
            <text:p>84.5714285714286</text:p>
          </table:table-cell>
        </table:table-row>
        <table:table-row table:style-name="ro1">
          <table:table-cell office:value-type="float" office:value="13.4318181818182" calcext:value-type="float">
            <text:p>13.4318181818182</text:p>
          </table:table-cell>
          <table:table-cell/>
          <table:table-cell office:value-type="float" office:value="84.6666666666667" calcext:value-type="float">
            <text:p>84.6666666666667</text:p>
          </table:table-cell>
        </table:table-row>
        <table:table-row table:style-name="ro1">
          <table:table-cell office:value-type="float" office:value="40.5714285714286" calcext:value-type="float">
            <text:p>40.5714285714286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/>
          <table:table-cell office:value-type="float" office:value="85.3333333333333" calcext:value-type="float">
            <text:p>85.3333333333333</text:p>
          </table:table-cell>
        </table:table-row>
        <table:table-row table:style-name="ro1">
          <table:table-cell office:value-type="float" office:value="58.3157894736842" calcext:value-type="float">
            <text:p>58.3157894736842</text:p>
          </table:table-cell>
          <table:table-cell/>
          <table:table-cell office:value-type="float" office:value="85.3333333333333" calcext:value-type="float">
            <text:p>85.3333333333333</text:p>
          </table:table-cell>
        </table:table-row>
        <table:table-row table:style-name="ro1">
          <table:table-cell office:value-type="float" office:value="54.7142857142857" calcext:value-type="float">
            <text:p>54.7142857142857</text:p>
          </table:table-cell>
          <table:table-cell/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51.3855421686747" calcext:value-type="float">
            <text:p>51.3855421686747</text:p>
          </table:table-cell>
          <table:table-cell/>
          <table:table-cell office:value-type="float" office:value="85.5555555555556" calcext:value-type="float">
            <text:p>85.5555555555556</text:p>
          </table:table-cell>
        </table:table-row>
        <table:table-row table:style-name="ro1">
          <table:table-cell office:value-type="float" office:value="43.2105263157895" calcext:value-type="float">
            <text:p>43.2105263157895</text:p>
          </table:table-cell>
          <table:table-cell/>
          <table:table-cell office:value-type="float" office:value="85.6666666666667" calcext:value-type="float">
            <text:p>85.6666666666667</text:p>
          </table:table-cell>
        </table:table-row>
        <table:table-row table:style-name="ro1">
          <table:table-cell office:value-type="float" office:value="55.8571428571429" calcext:value-type="float">
            <text:p>55.8571428571429</text:p>
          </table:table-cell>
          <table:table-cell/>
          <table:table-cell office:value-type="float" office:value="85.7777777777778" calcext:value-type="float">
            <text:p>85.7777777777778</text:p>
          </table:table-cell>
        </table:table-row>
        <table:table-row table:style-name="ro1">
          <table:table-cell office:value-type="float" office:value="43.7894736842105" calcext:value-type="float">
            <text:p>43.7894736842105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.8837209302326" calcext:value-type="float">
            <text:p>25.8837209302326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.8571428571429" calcext:value-type="float">
            <text:p>55.8571428571429</text:p>
          </table:table-cell>
          <table:table-cell/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float" office:value="29.2272727272727" calcext:value-type="float">
            <text:p>29.2272727272727</text:p>
          </table:table-cell>
          <table:table-cell/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39.5675675675676" calcext:value-type="float">
            <text:p>39.5675675675676</text:p>
          </table:table-cell>
          <table:table-cell/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47.5555555555556" calcext:value-type="float">
            <text:p>47.5555555555556</text:p>
          </table:table-cell>
          <table:table-cell/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86.8571428571429" calcext:value-type="float">
            <text:p>86.8571428571429</text:p>
          </table:table-cell>
        </table:table-row>
        <table:table-row table:style-name="ro1">
          <table:table-cell office:value-type="float" office:value="22.8684210526316" calcext:value-type="float">
            <text:p>22.8684210526316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.4615384615385" calcext:value-type="float">
            <text:p>46.4615384615385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7.1666666666667" calcext:value-type="float">
            <text:p>87.1666666666667</text:p>
          </table:table-cell>
        </table:table-row>
        <table:table-row table:style-name="ro1">
          <table:table-cell office:value-type="float" office:value="79.3333333333333" calcext:value-type="float">
            <text:p>79.3333333333333</text:p>
          </table:table-cell>
          <table:table-cell/>
          <table:table-cell office:value-type="float" office:value="87.3333333333333" calcext:value-type="float">
            <text:p>87.3333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7.375" calcext:value-type="float">
            <text:p>87.375</text:p>
          </table:table-cell>
        </table:table-row>
        <table:table-row table:style-name="ro1">
          <table:table-cell office:value-type="float" office:value="4.84615384615385" calcext:value-type="float">
            <text:p>4.84615384615385</text:p>
          </table:table-cell>
          <table:table-cell/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.3255813953488" calcext:value-type="float">
            <text:p>49.325581395348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.3636363636364" calcext:value-type="float">
            <text:p>39.3636363636364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8.6666666666667" calcext:value-type="float">
            <text:p>38.6666666666667</text:p>
          </table:table-cell>
          <table:table-cell/>
          <table:table-cell office:value-type="float" office:value="88.1428571428571" calcext:value-type="float">
            <text:p>88.1428571428571</text:p>
          </table:table-cell>
        </table:table-row>
        <table:table-row table:style-name="ro1">
          <table:table-cell office:value-type="float" office:value="72.0588235294118" calcext:value-type="float">
            <text:p>72.0588235294118</text:p>
          </table:table-cell>
          <table:table-cell/>
          <table:table-cell office:value-type="float" office:value="88.3333333333333" calcext:value-type="float">
            <text:p>88.3333333333333</text:p>
          </table:table-cell>
        </table:table-row>
        <table:table-row table:style-name="ro1">
          <table:table-cell office:value-type="float" office:value="51.4347826086957" calcext:value-type="float">
            <text:p>51.4347826086957</text:p>
          </table:table-cell>
          <table:table-cell/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74.2608695652174" calcext:value-type="float">
            <text:p>74.2608695652174</text:p>
          </table:table-cell>
          <table:table-cell/>
          <table:table-cell office:value-type="float" office:value="88.6666666666667" calcext:value-type="float">
            <text:p>88.6666666666667</text:p>
          </table:table-cell>
        </table:table-row>
        <table:table-row table:style-name="ro1">
          <table:table-cell office:value-type="float" office:value="39.6857142857143" calcext:value-type="float">
            <text:p>39.6857142857143</text:p>
          </table:table-cell>
          <table:table-cell/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/>
          <table:table-cell office:value-type="float" office:value="89.2857142857143" calcext:value-type="float">
            <text:p>89.2857142857143</text:p>
          </table:table-cell>
        </table:table-row>
        <table:table-row table:style-name="ro1">
          <table:table-cell office:value-type="float" office:value="42.5952380952381" calcext:value-type="float">
            <text:p>42.5952380952381</text:p>
          </table:table-cell>
          <table:table-cell/>
          <table:table-cell office:value-type="float" office:value="89.3333333333333" calcext:value-type="float">
            <text:p>89.3333333333333</text:p>
          </table:table-cell>
        </table:table-row>
        <table:table-row table:style-name="ro1">
          <table:table-cell office:value-type="float" office:value="45.4736842105263" calcext:value-type="float">
            <text:p>45.4736842105263</text:p>
          </table:table-cell>
          <table:table-cell/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/>
          <table:table-cell office:value-type="float" office:value="89.6363636363637" calcext:value-type="float">
            <text:p>89.6363636363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.7804878048781" calcext:value-type="float">
            <text:p>42.780487804878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/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31.5714285714286" calcext:value-type="float">
            <text:p>31.5714285714286</text:p>
          </table:table-cell>
          <table:table-cell/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44.377358490566" calcext:value-type="float">
            <text:p>44.377358490566</text:p>
          </table:table-cell>
          <table:table-cell/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/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40.7692307692308" calcext:value-type="float">
            <text:p>40.7692307692308</text:p>
          </table:table-cell>
          <table:table-cell/>
          <table:table-cell office:value-type="float" office:value="90.6666666666667" calcext:value-type="float">
            <text:p>90.6666666666667</text:p>
          </table:table-cell>
        </table:table-row>
        <table:table-row table:style-name="ro1">
          <table:table-cell office:value-type="float" office:value="25.9130434782609" calcext:value-type="float">
            <text:p>25.9130434782609</text:p>
          </table:table-cell>
          <table:table-cell/>
          <table:table-cell office:value-type="float" office:value="90.75" calcext:value-type="float">
            <text:p>90.75</text:p>
          </table:table-cell>
        </table:table-row>
        <table:table-row table:style-name="ro1">
          <table:table-cell office:value-type="float" office:value="41.3695652173913" calcext:value-type="float">
            <text:p>41.3695652173913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.8157894736842" calcext:value-type="float">
            <text:p>40.8157894736842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/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50.6666666666667" calcext:value-type="float">
            <text:p>50.6666666666667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.8636363636364" calcext:value-type="float">
            <text:p>49.8636363636364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.7263157894737" calcext:value-type="float">
            <text:p>49.7263157894737</text:p>
          </table:table-cell>
          <table:table-cell/>
          <table:table-cell office:value-type="float" office:value="92.75" calcext:value-type="float">
            <text:p>92.75</text:p>
          </table:table-cell>
        </table:table-row>
        <table:table-row table:style-name="ro1">
          <table:table-cell office:value-type="float" office:value="55.0666666666667" calcext:value-type="float">
            <text:p>55.0666666666667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/>
          <table:table-cell office:value-type="float" office:value="93.3333333333333" calcext:value-type="float">
            <text:p>93.3333333333333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/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41.1785714285714" calcext:value-type="float">
            <text:p>41.1785714285714</text:p>
          </table:table-cell>
          <table:table-cell/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49.2972972972973" calcext:value-type="float">
            <text:p>49.2972972972973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.2222222222222" calcext:value-type="float">
            <text:p>53.2222222222222</text:p>
          </table:table-cell>
          <table:table-cell/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64.1818181818182" calcext:value-type="float">
            <text:p>64.1818181818182</text:p>
          </table:table-cell>
          <table:table-cell/>
          <table:table-cell office:value-type="float" office:value="94.6666666666667" calcext:value-type="float">
            <text:p>94.6666666666667</text:p>
          </table:table-cell>
        </table:table-row>
        <table:table-row table:style-name="ro1">
          <table:table-cell office:value-type="float" office:value="57.8648648648649" calcext:value-type="float">
            <text:p>57.8648648648649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/>
          <table:table-cell office:value-type="float" office:value="95.6666666666667" calcext:value-type="float">
            <text:p>95.6666666666667</text:p>
          </table:table-cell>
        </table:table-row>
        <table:table-row table:style-name="ro1">
          <table:table-cell office:value-type="float" office:value="47.9615384615385" calcext:value-type="float">
            <text:p>47.9615384615385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.5555555555556" calcext:value-type="float">
            <text:p>61.5555555555556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.8571428571429" calcext:value-type="float">
            <text:p>62.8571428571429</text:p>
          </table:table-cell>
          <table:table-cell/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62.1379310344828" calcext:value-type="float">
            <text:p>62.1379310344828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.7692307692308" calcext:value-type="float">
            <text:p>58.7692307692308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.125" calcext:value-type="float">
            <text:p>74.125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.5714285714286" calcext:value-type="float">
            <text:p>34.5714285714286</text:p>
          </table:table-cell>
          <table:table-cell/>
          <table:table-cell office:value-type="float" office:value="97.3333333333333" calcext:value-type="float">
            <text:p>97.3333333333333</text:p>
          </table:table-cell>
        </table:table-row>
        <table:table-row table:style-name="ro1">
          <table:table-cell office:value-type="float" office:value="35.2727272727273" calcext:value-type="float">
            <text:p>35.2727272727273</text:p>
          </table:table-cell>
          <table:table-cell/>
          <table:table-cell office:value-type="float" office:value="97.6666666666667" calcext:value-type="float">
            <text:p>97.6666666666667</text:p>
          </table:table-cell>
        </table:table-row>
        <table:table-row table:style-name="ro1">
          <table:table-cell office:value-type="float" office:value="35.8285714285714" calcext:value-type="float">
            <text:p>35.8285714285714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.7368421052632" calcext:value-type="float">
            <text:p>35.7368421052632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.3684210526316" calcext:value-type="float">
            <text:p>62.3684210526316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.5909090909091" calcext:value-type="float">
            <text:p>55.5909090909091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.3671875" calcext:value-type="float">
            <text:p>36.3671875</text:p>
          </table:table-cell>
          <table:table-cell/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/>
          <table:table-cell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float" office:value="22.2777777777778" calcext:value-type="float">
            <text:p>22.2777777777778</text:p>
          </table:table-cell>
          <table:table-cell/>
          <table:table-cell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float" office:value="52.0869565217391" calcext:value-type="float">
            <text:p>52.08695652173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.1843971631206" calcext:value-type="float">
            <text:p>26.184397163120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.8095238095238" calcext:value-type="float">
            <text:p>42.80952380952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3636363636364" calcext:value-type="float">
            <text:p>57.36363636363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.7727272727273" calcext:value-type="float">
            <text:p>35.77272727272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.6615384615385" calcext:value-type="float">
            <text:p>34.661538461538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.0952380952381" calcext:value-type="float">
            <text:p>44.09523809523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.1073825503356" calcext:value-type="float">
            <text:p>32.10738255033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.8636363636364" calcext:value-type="float">
            <text:p>37.86363636363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.7894736842105" calcext:value-type="float">
            <text:p>53.78947368421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.9285714285714" calcext:value-type="float">
            <text:p>62.92857142857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.0862068965517" calcext:value-type="float">
            <text:p>46.08620689655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.6538461538462" calcext:value-type="float">
            <text:p>62.653846153846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.7731092436975" calcext:value-type="float">
            <text:p>56.77310924369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.969696969697" calcext:value-type="float">
            <text:p>39.9696969696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.8636363636364" calcext:value-type="float">
            <text:p>36.86363636363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.9444444444444" calcext:value-type="float">
            <text:p>47.944444444444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.0666666666667" calcext:value-type="float">
            <text:p>68.066666666666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.1428571428571" calcext:value-type="float">
            <text:p>88.142857142857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.6153846153846" calcext:value-type="float">
            <text:p>39.61538461538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.2857142857143" calcext:value-type="float">
            <text:p>37.285714285714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4006514657981" calcext:value-type="float">
            <text:p>51.40065146579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.5789473684211" calcext:value-type="float">
            <text:p>25.57894736842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.1764705882353" calcext:value-type="float">
            <text:p>64.17647058823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.45" calcext:value-type="float">
            <text:p>53.45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table table:name="histo" table:style-name="ta1">
        <table:shapes>
          <draw:frame draw:z-index="0" draw:style-name="gr1" draw:text-style-name="P1" svg:width="25.43cm" svg:height="15.002cm" svg:x="14.49cm" svg:y="0.678cm">
            <draw:object draw:notify-on-update-of-ranges="histo.A2:histo.A13 histo.B2:histo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5.728cm" svg:height="14.471cm" svg:x="0.2cm" svg:y="0.351cm">
            <draw:object draw:notify-on-update-of-ranges="histo.A2:histo.A13 histo.C2:histo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table:formula="of:=[.B2]/[.B14]" office:value-type="float" office:value="0.0982953447942824" calcext:value-type="float">
            <text:p>0.0982953447942824</text:p>
          </table:table-cell>
        </table:table-row>
        <table:table-row table:style-name="ro1">
          <table:table-cell table:style-name="ce2" office:value-type="string" calcext:value-type="string">
            <text:p>1-9</text:p>
          </table:table-cell>
          <table:table-cell office:value-type="float" office:value="12609" calcext:value-type="float">
            <text:p>12609</text:p>
          </table:table-cell>
          <table:table-cell table:formula="of:=[.B3]/[.B14]" office:value-type="float" office:value="0.152223778249952" calcext:value-type="float">
            <text:p>0.152223778249952</text:p>
          </table:table-cell>
        </table:table-row>
        <table:table-row table:style-name="ro1">
          <table:table-cell table:style-name="ce2" office:value-type="string" calcext:value-type="string">
            <text:p>10-19</text:p>
          </table:table-cell>
          <table:table-cell office:value-type="float" office:value="8330" calcext:value-type="float">
            <text:p>8330</text:p>
          </table:table-cell>
          <table:table-cell table:formula="of:=[.B4]/[.B14]" office:value-type="float" office:value="0.10056499903419" calcext:value-type="float">
            <text:p>0.10056499903419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6721" calcext:value-type="float">
            <text:p>6721</text:p>
          </table:table-cell>
          <table:table-cell table:formula="of:=[.B5]/[.B14]" office:value-type="float" office:value="0.0811401390766853" calcext:value-type="float">
            <text:p>0.0811401390766853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6248" calcext:value-type="float">
            <text:p>6248</text:p>
          </table:table-cell>
          <table:table-cell table:formula="of:=[.B6]/[.B14]" office:value-type="float" office:value="0.0754297855901101" calcext:value-type="float">
            <text:p>0.0754297855901101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5611" calcext:value-type="float">
            <text:p>5611</text:p>
          </table:table-cell>
          <table:table-cell table:formula="of:=[.B7]/[.B14]" office:value-type="float" office:value="0.0677395209580838" calcext:value-type="float">
            <text:p>0.0677395209580838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5559" calcext:value-type="float">
            <text:p>5559</text:p>
          </table:table-cell>
          <table:table-cell table:formula="of:=[.B8]/[.B14]" office:value-type="float" office:value="0.0671117442534286" calcext:value-type="float">
            <text:p>0.0671117442534286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5583" calcext:value-type="float">
            <text:p>5583</text:p>
          </table:table-cell>
          <table:table-cell table:formula="of:=[.B9]/[.B14]" office:value-type="float" office:value="0.0674014873478849" calcext:value-type="float">
            <text:p>0.0674014873478849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5355" calcext:value-type="float">
            <text:p>5355</text:p>
          </table:table-cell>
          <table:table-cell table:formula="of:=[.B10]/[.B14]" office:value-type="float" office:value="0.0646489279505505" calcext:value-type="float">
            <text:p>0.064648927950550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float" office:value="5769" calcext:value-type="float">
            <text:p>5769</text:p>
          </table:table-cell>
          <table:table-cell table:formula="of:=[.B11]/[.B14]" office:value-type="float" office:value="0.0696469963299208" calcext:value-type="float">
            <text:p>0.0696469963299208</text:p>
          </table:table-cell>
        </table:table-row>
        <table:table-row table:style-name="ro1">
          <table:table-cell office:value-type="string" calcext:value-type="string">
            <text:p>90-99</text:p>
          </table:table-cell>
          <table:table-cell office:value-type="float" office:value="9506" calcext:value-type="float">
            <text:p>9506</text:p>
          </table:table-cell>
          <table:table-cell table:formula="of:=[.B12]/[.B14]" office:value-type="float" office:value="0.114762410662546" calcext:value-type="float">
            <text:p>0.114762410662546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3399" calcext:value-type="float">
            <text:p>3399</text:p>
          </table:table-cell>
          <table:table-cell table:formula="of:=[.B13]/[.B14]" office:value-type="float" office:value="0.0410348657523662" calcext:value-type="float">
            <text:p>0.0410348657523662</text:p>
          </table:table-cell>
        </table:table-row>
        <table:table-row table:style-name="ro1">
          <table:table-cell/>
          <table:table-cell table:formula="of:=SUM([.B2:.B13])" office:value-type="float" office:value="82832" calcext:value-type="float">
            <text:p>82832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avg_support.C1:all_avg_support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9T09:54:35.453111937</dc:date>
    <meta:editing-duration>PT12M42S</meta:editing-duration>
    <meta:editing-cycles>2</meta:editing-cycles>
    <meta:generator>LibreOffice/7.3.7.2$Linux_X86_64 LibreOffice_project/30$Build-2</meta:generator>
    <meta:document-statistic meta:table-count="2" meta:cell-count="48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18cm" svg:height="17.737cm" xlink:href=".." xlink:type="simple" chart:class="chart:bar" chart:style-name="ch1">
        <chart:title svg:x="11.578cm" svg:y="0.49cm" chart:style-name="ch2">
          <text:p>Average branch support per tree (sorted)</text:p>
        </chart:title>
        <chart:plot-area chart:style-name="ch3" table:cell-range-address="all_avg_support.C1:all_avg_support.C2407" svg:x="1.639cm" svg:y="1.623cm" svg:width="29.151cm" svg:height="14.779cm">
          <chart:coordinate-region svg:x="2.445cm" svg:y="1.822cm" svg:width="28.268cm" svg:height="13.526cm"/>
          <chart:axis chart:dimension="x" chart:name="primary-x" chart:style-name="ch4">
            <chart:title svg:x="15.826cm" svg:y="16.756cm" chart:style-name="ch5">
              <text:p>Tree</text:p>
            </chart:title>
          </chart:axis>
          <chart:axis chart:dimension="y" chart:name="primary-y" chart:style-name="ch6">
            <chart:title svg:x="0.451cm" svg:y="10.26cm" chart:style-name="ch7">
              <text:p>Average support</text:p>
            </chart:title>
            <chart:grid chart:style-name="ch8" chart:class="major"/>
          </chart:axis>
          <chart:series chart:style-name="ch9" chart:values-cell-range-address="all_avg_support.C1:all_avg_support.C2407" chart:class="chart:bar">
            <chart:data-point chart:repeated="24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185185185185">
                <text:p>0.0185185185185185</text:p>
                <draw:g>
                  <svg:desc>all_avg_support.C1:all_avg_support.C24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204081632653">
                <text:p>5.10204081632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5882352941176">
                <text:p>6.05882352941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9047619047619">
                <text:p>6.7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3125">
                <text:p>7.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4237288135593">
                <text:p>9.54237288135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647058823529">
                <text:p>12.2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170731707317">
                <text:p>12.3170731707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793103448276">
                <text:p>12.7793103448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8205128205128">
                <text:p>12.8205128205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8571428571429">
                <text:p>12.8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379310344828">
                <text:p>13.1379310344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318181818182">
                <text:p>13.4318181818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7777777777778">
                <text:p>13.777777777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392156862745">
                <text:p>14.0392156862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142857142857">
                <text:p>14.414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6976744186047">
                <text:p>14.6976744186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7014925373134">
                <text:p>14.7014925373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777777777778">
                <text:p>14.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886178861789">
                <text:p>14.7886178861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379310344828">
                <text:p>15.1379310344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909090909091">
                <text:p>15.5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695652173913">
                <text:p>15.86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30769230769">
                <text:p>15.92307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677966101695">
                <text:p>16.0677966101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258064516129">
                <text:p>16.225806451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2941176470588">
                <text:p>16.2941176470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6428571428571">
                <text:p>16.64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473684210526">
                <text:p>16.9473684210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571428571429">
                <text:p>17.2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9583333333333">
                <text:p>17.958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3478260869565">
                <text:p>18.3478260869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6896551724138">
                <text:p>18.6896551724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9261744966443">
                <text:p>19.9261744966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9545454545455">
                <text:p>19.954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3181818181818">
                <text:p>20.3181818181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4761904761905">
                <text:p>20.4761904761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5084745762712">
                <text:p>20.5084745762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5428571428571">
                <text:p>20.5428571428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7777777777778">
                <text:p>20.7777777777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9634146341463">
                <text:p>20.9634146341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041666666667">
                <text:p>21.1041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2222222222222">
                <text:p>21.222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352941176471">
                <text:p>21.2352941176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3962962962963">
                <text:p>21.396296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4444444444444">
                <text:p>21.444444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6428571428571">
                <text:p>21.6428571428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7878787878788">
                <text:p>21.7878787878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940119760479">
                <text:p>21.940119760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9473684210526">
                <text:p>21.9473684210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2777777777778">
                <text:p>22.27777777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857142857143">
                <text:p>22.2857142857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3617021276596">
                <text:p>22.3617021276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7586206896552">
                <text:p>22.7586206896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8684210526316">
                <text:p>22.8684210526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8813559322034">
                <text:p>22.8813559322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4117647058823">
                <text:p>23.4117647058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4827586206897">
                <text:p>23.48275862068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5405405405405">
                <text:p>23.5405405405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7777777777778">
                <text:p>23.7777777777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8474576271186">
                <text:p>23.8474576271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8823529411765">
                <text:p>23.8823529411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9056603773585">
                <text:p>23.9056603773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9166666666667">
                <text:p>23.91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0384615384615">
                <text:p>24.038461538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1025641025641">
                <text:p>24.10256410256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1739130434783">
                <text:p>24.1739130434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1951219512195">
                <text:p>24.1951219512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3846153846154">
                <text:p>24.3846153846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.3846153846154">
                <text:p>24.3846153846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.6610169491525">
                <text:p>24.6610169491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7446808510638">
                <text:p>24.74468085106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8529411764706">
                <text:p>24.8529411764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3207547169811">
                <text:p>25.32075471698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.531914893617">
                <text:p>25.5319148936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5789473684211">
                <text:p>25.57894736842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6222222222222">
                <text:p>25.6222222222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6352941176471">
                <text:p>25.6352941176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363636363636">
                <text:p>25.6363636363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6818181818182">
                <text:p>25.6818181818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8484848484848">
                <text:p>25.84848484848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8636363636364">
                <text:p>25.8636363636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.8780487804878">
                <text:p>25.8780487804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8837209302326">
                <text:p>25.8837209302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9130434782609">
                <text:p>25.9130434782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9259259259259">
                <text:p>25.9259259259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9444444444444">
                <text:p>25.9444444444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721649484536">
                <text:p>26.0721649484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0909090909091">
                <text:p>26.0909090909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1843971631206">
                <text:p>26.18439716312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2608695652174">
                <text:p>26.2608695652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3125">
                <text:p>26.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3538461538462">
                <text:p>26.35384615384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210526315789">
                <text:p>26.4210526315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5103244837758">
                <text:p>26.5103244837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6806722689076">
                <text:p>26.6806722689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6969696969697">
                <text:p>26.6969696969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7692307692308">
                <text:p>26.7692307692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8409090909091">
                <text:p>26.84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8928571428571">
                <text:p>26.8928571428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375">
                <text:p>26.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9565217391304">
                <text:p>26.9565217391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1052631578947">
                <text:p>27.10526315789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4736842105263">
                <text:p>27.47368421052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5333333333333">
                <text:p>27.5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6041666666667">
                <text:p>27.6041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6046511627907">
                <text:p>27.6046511627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6129032258064">
                <text:p>27.6129032258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.6136363636364">
                <text:p>27.61363636363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7368421052632">
                <text:p>27.73684210526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7446808510638">
                <text:p>27.74468085106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7586206896552">
                <text:p>27.75862068965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9016393442623">
                <text:p>27.90163934426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9285714285714">
                <text:p>27.9285714285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1851851851852">
                <text:p>28.1851851851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1851851851852">
                <text:p>28.1851851851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325">
                <text:p>28.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4090909090909">
                <text:p>28.4090909090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525">
                <text:p>28.5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5405405405405">
                <text:p>28.5405405405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5592105263158">
                <text:p>28.5592105263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5625">
                <text:p>28.5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7670454545455">
                <text:p>28.7670454545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8101265822785">
                <text:p>28.81012658227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9230769230769">
                <text:p>28.9230769230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365079365079">
                <text:p>28.9365079365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9444444444444">
                <text:p>28.9444444444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0333333333333">
                <text:p>29.0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0526315789474">
                <text:p>29.0526315789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0657894736842">
                <text:p>29.06578947368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0909090909091">
                <text:p>29.0909090909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1219512195122">
                <text:p>29.1219512195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1363636363636">
                <text:p>29.13636363636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1481481481481">
                <text:p>29.14814814814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2272727272727">
                <text:p>29.22727272727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2857142857143">
                <text:p>29.2857142857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3048780487805">
                <text:p>29.3048780487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4739130434783">
                <text:p>29.4739130434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5119047619048">
                <text:p>29.5119047619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6153846153846">
                <text:p>29.61538461538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6603773584906">
                <text:p>29.66037735849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7260273972603">
                <text:p>29.7260273972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.7777777777778">
                <text:p>29.7777777777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.8421052631579">
                <text:p>29.84210526315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.9032258064516">
                <text:p>29.9032258064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1363636363636">
                <text:p>30.13636363636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1388888888889">
                <text:p>30.1388888888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1481481481481">
                <text:p>30.1481481481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1739130434783">
                <text:p>30.17391304347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3728813559322">
                <text:p>30.37288135593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.4202898550725">
                <text:p>30.42028985507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.53125">
                <text:p>30.5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.5416666666667">
                <text:p>30.541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5925925925926">
                <text:p>30.5925925925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.6086956521739">
                <text:p>30.60869565217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6153846153846">
                <text:p>30.61538461538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7866666666667">
                <text:p>30.78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7916666666667">
                <text:p>30.791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.7931034482759">
                <text:p>30.79310344827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.0434782608696">
                <text:p>31.0434782608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1521739130435">
                <text:p>31.15217391304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.2325581395349">
                <text:p>31.23255813953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.2474226804124">
                <text:p>31.24742268041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.2903225806452">
                <text:p>31.29032258064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.4273504273504">
                <text:p>31.42735042735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.4761904761905">
                <text:p>31.47619047619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.5157894736842">
                <text:p>31.5157894736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7037037037037">
                <text:p>31.70370370370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7272727272727">
                <text:p>31.72727272727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7684210526316">
                <text:p>31.76842105263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9230769230769">
                <text:p>31.92307692307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.1016949152542">
                <text:p>32.10169491525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.1073825503356">
                <text:p>32.10738255033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.1904761904762">
                <text:p>32.19047619047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2727272727273">
                <text:p>32.27272727272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.3163265306122">
                <text:p>32.3163265306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3181818181818">
                <text:p>32.3181818181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.3559322033898">
                <text:p>32.35593220338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3928571428571">
                <text:p>32.39285714285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4864864864865">
                <text:p>32.48648648648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4893617021277">
                <text:p>32.48936170212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5217391304348">
                <text:p>32.5217391304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5217391304348">
                <text:p>32.52173913043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5909090909091">
                <text:p>32.5909090909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6341463414634">
                <text:p>32.63414634146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6363636363636">
                <text:p>32.63636363636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6363636363636">
                <text:p>32.6363636363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6585365853659">
                <text:p>32.65853658536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7808219178082">
                <text:p>32.7808219178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7931034482759">
                <text:p>32.79310344827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.8288288288288">
                <text:p>32.82882882882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.8936170212766">
                <text:p>32.8936170212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.9333333333333">
                <text:p>32.93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.953488372093">
                <text:p>32.9534883720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.978021978022">
                <text:p>32.9780219780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.9811320754717">
                <text:p>32.98113207547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8">
                <text:p>33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2068965517241">
                <text:p>33.20689655172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2380952380952">
                <text:p>33.2380952380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3913043478261">
                <text:p>33.39130434782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4137168141593">
                <text:p>33.41371681415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4166666666667">
                <text:p>33.4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4285714285714">
                <text:p>33.4285714285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4642857142857">
                <text:p>33.46428571428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4814814814815">
                <text:p>33.48148148148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4842767295597">
                <text:p>33.48427672955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515625">
                <text:p>33.515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.6296296296296">
                <text:p>33.6296296296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6428571428571">
                <text:p>33.64285714285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6780487804878">
                <text:p>33.6780487804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6896551724138">
                <text:p>33.6896551724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7142857142857">
                <text:p>33.71428571428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72">
                <text:p>33.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741935483871">
                <text:p>33.7419354838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7555555555556">
                <text:p>33.75555555555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.7794871794872">
                <text:p>33.77948717948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8461538461538">
                <text:p>33.84615384615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8571428571429">
                <text:p>33.85714285714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8648648648649">
                <text:p>33.86486486486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.8833333333333">
                <text:p>33.88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.8947368421053">
                <text:p>33.8947368421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.9047619047619">
                <text:p>33.90476190476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.9252577319588">
                <text:p>33.92525773195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.9444444444444">
                <text:p>33.94444444444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.9852941176471">
                <text:p>33.98529411764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.1116504854369">
                <text:p>34.11165048543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.1621621621622">
                <text:p>34.16216216216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.1794871794872">
                <text:p>34.17948717948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.2417582417582">
                <text:p>34.24175824175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.2631578947368">
                <text:p>34.26315789473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.2794117647059">
                <text:p>34.27941176470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.2916666666667">
                <text:p>34.291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.3636363636364">
                <text:p>34.36363636363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.4375">
                <text:p>34.4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.4479166666667">
                <text:p>34.44791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5714285714286">
                <text:p>34.57142857142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046511627907">
                <text:p>34.60465116279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615384615385">
                <text:p>34.6615384615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272727272727">
                <text:p>34.72727272727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7674418604651">
                <text:p>34.76744186046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775">
                <text:p>34.7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7876712328767">
                <text:p>34.78767123287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8266666666667">
                <text:p>34.82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8333333333333">
                <text:p>34.8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9649122807018">
                <text:p>34.96491228070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0281690140845">
                <text:p>35.0281690140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0434782608696">
                <text:p>35.04347826086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0434782608696">
                <text:p>35.04347826086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0481927710843">
                <text:p>35.04819277108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0689655172414">
                <text:p>35.0689655172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1538461538462">
                <text:p>35.15384615384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2727272727273">
                <text:p>35.27272727272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2727272727273">
                <text:p>35.27272727272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.3636363636364">
                <text:p>35.36363636363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.4464285714286">
                <text:p>35.44642857142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.4803921568627">
                <text:p>35.48039215686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.5245901639344">
                <text:p>35.52459016393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.5384615384615">
                <text:p>35.53846153846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.5384615384615">
                <text:p>35.53846153846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.5454545454545">
                <text:p>35.5454545454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.625">
                <text:p>35.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.6315789473684">
                <text:p>35.6315789473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.6444444444444">
                <text:p>35.64444444444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.7037037037037">
                <text:p>35.7037037037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.7111111111111">
                <text:p>35.7111111111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.7368421052632">
                <text:p>35.73684210526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.7666666666667">
                <text:p>35.7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.7727272727273">
                <text:p>35.77272727272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.7777777777778">
                <text:p>35.7777777777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.8285714285714">
                <text:p>35.8285714285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.8571428571429">
                <text:p>35.8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.8928571428571">
                <text:p>35.8928571428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.9508196721311">
                <text:p>35.95081967213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.9565217391304">
                <text:p>35.95652173913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.9714285714286">
                <text:p>35.97142857142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.9833333333333">
                <text:p>35.983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.0096153846154">
                <text:p>36.0096153846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.0277777777778">
                <text:p>36.0277777777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037037037037">
                <text:p>36.0370370370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0454545454545">
                <text:p>36.0454545454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.0588235294118">
                <text:p>36.05882352941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.0591715976331">
                <text:p>36.05917159763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.06">
                <text:p>36.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.0645161290323">
                <text:p>36.06451612903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.0833333333333">
                <text:p>36.08333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.0952380952381">
                <text:p>36.0952380952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.1354166666667">
                <text:p>36.13541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.1627906976744">
                <text:p>36.16279069767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.1833333333333">
                <text:p>36.18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.2142857142857">
                <text:p>36.21428571428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.2444444444444">
                <text:p>36.2444444444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2975460122699">
                <text:p>36.29754601226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3230769230769">
                <text:p>36.32307692307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3333333333333">
                <text:p>36.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3671875">
                <text:p>36.3671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3758865248227">
                <text:p>36.37588652482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4634146341463">
                <text:p>36.46341463414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46875">
                <text:p>36.46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4736842105263">
                <text:p>36.47368421052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5625">
                <text:p>36.56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5777777777778">
                <text:p>36.57777777777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.5833333333333">
                <text:p>36.5833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.6985074626866">
                <text:p>36.69850746268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.7083333333333">
                <text:p>36.708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.7272727272727">
                <text:p>36.72727272727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.7272727272727">
                <text:p>36.72727272727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.746835443038">
                <text:p>36.7468354430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.7619047619048">
                <text:p>36.76190476190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.7727272727273">
                <text:p>36.77272727272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.7894736842105">
                <text:p>36.78947368421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.7916666666667">
                <text:p>36.791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.8181818181818">
                <text:p>36.81818181818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.8421052631579">
                <text:p>36.84210526315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.8636363636364">
                <text:p>36.86363636363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.9032258064516">
                <text:p>36.90322580645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.9166666666667">
                <text:p>36.916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.9285714285714">
                <text:p>36.9285714285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.9565217391304">
                <text:p>36.95652173913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.1666666666667">
                <text:p>37.1666666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.1764705882353">
                <text:p>37.17647058823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.2058823529412">
                <text:p>37.20588235294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.2727272727273">
                <text:p>37.27272727272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.2857142857143">
                <text:p>37.28571428571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.2916666666667">
                <text:p>37.291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.3478260869565">
                <text:p>37.3478260869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.3636363636364">
                <text:p>37.3636363636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.3953488372093">
                <text:p>37.39534883720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.4137931034483">
                <text:p>37.41379310344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.4166666666667">
                <text:p>37.41666666666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.4571428571429">
                <text:p>37.45714285714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.5178571428571">
                <text:p>37.51785714285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.5454545454545">
                <text:p>37.54545454545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.5666666666667">
                <text:p>37.5666666666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.6086956521739">
                <text:p>37.60869565217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.6333333333333">
                <text:p>37.633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.6923076923077">
                <text:p>37.69230769230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.71">
                <text:p>37.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.7586206896552">
                <text:p>37.75862068965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.7777777777778">
                <text:p>37.77777777777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.78125">
                <text:p>37.78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.78125">
                <text:p>37.78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.7931034482759">
                <text:p>37.79310344827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.8333333333333">
                <text:p>37.8333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.8421052631579">
                <text:p>37.84210526315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.8636363636364">
                <text:p>37.86363636363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.8846153846154">
                <text:p>37.88461538461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.8932384341637">
                <text:p>37.89323843416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9333333333333">
                <text:p>37.933333333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.0189873417722">
                <text:p>38.01898734177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8.047619047619">
                <text:p>38.0476190476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.047619047619">
                <text:p>38.0476190476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.0925925925926">
                <text:p>38.09259259259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.1071428571429">
                <text:p>38.10714285714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.1363636363636">
                <text:p>38.13636363636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.1609195402299">
                <text:p>38.16091954022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.1714285714286">
                <text:p>38.17142857142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.1724137931034">
                <text:p>38.17241379310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8.2578125">
                <text:p>38.2578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.2592592592593">
                <text:p>38.25925925925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.2790697674419">
                <text:p>38.27906976744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.3181818181818">
                <text:p>38.31818181818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.3448275862069">
                <text:p>38.34482758620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.3888888888889">
                <text:p>38.38888888888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.390243902439">
                <text:p>38.390243902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.4137931034483">
                <text:p>38.41379310344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.4166666666667">
                <text:p>38.41666666666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.4677419354839">
                <text:p>38.46774193548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.5294117647059">
                <text:p>38.52941176470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8.5573770491803">
                <text:p>38.55737704918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.5789473684211">
                <text:p>38.5789473684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8.5828571428571">
                <text:p>38.58285714285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.6315789473684">
                <text:p>38.63157894736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8.7894736842105">
                <text:p>38.78947368421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.8095238095238">
                <text:p>38.80952380952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.8148148148148">
                <text:p>38.81481481481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.8461538461538">
                <text:p>38.84615384615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.88">
                <text:p>38.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.8833333333333">
                <text:p>38.8833333333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.9047619047619">
                <text:p>38.90476190476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.9375">
                <text:p>38.93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.9523809523809">
                <text:p>38.95238095238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.9661016949153">
                <text:p>38.96610169491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.0384615384615">
                <text:p>39.03846153846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9.0571428571429">
                <text:p>39.05714285714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9.0952380952381">
                <text:p>39.09523809523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.1538461538462">
                <text:p>39.15384615384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.16">
                <text:p>39.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.169014084507">
                <text:p>39.1690140845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.1785714285714">
                <text:p>39.1785714285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.1860465116279">
                <text:p>39.18604651162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9.2142857142857">
                <text:p>39.21428571428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9.2222222222222">
                <text:p>39.22222222222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9.2413793103448">
                <text:p>39.24137931034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9.2926829268293">
                <text:p>39.29268292682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.3529411764706">
                <text:p>39.35294117647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.3636363636364">
                <text:p>39.36363636363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.4444444444444">
                <text:p>39.44444444444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.4782608695652">
                <text:p>39.47826086956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.5675675675676">
                <text:p>39.56756756756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.5730337078652">
                <text:p>39.57303370786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.5988372093023">
                <text:p>39.59883720930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.6153846153846">
                <text:p>39.61538461538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.6428571428571">
                <text:p>39.64285714285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.6470588235294">
                <text:p>39.64705882352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9.6741573033708">
                <text:p>39.67415730337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.6857142857143">
                <text:p>39.68571428571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.6923076923077">
                <text:p>39.69230769230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.7222222222222">
                <text:p>39.72222222222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.9090909090909">
                <text:p>39.90909090909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.9230769230769">
                <text:p>39.9230769230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.9375">
                <text:p>39.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.9387755102041">
                <text:p>39.93877551020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.9444444444444">
                <text:p>39.94444444444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.9487179487179">
                <text:p>39.94871794871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.969696969697">
                <text:p>39.9696969696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.027027027027">
                <text:p>40.0270270270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.0833333333333">
                <text:p>40.083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.1176470588235">
                <text:p>40.11764705882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1538461538462">
                <text:p>40.1538461538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.168">
                <text:p>40.1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.1818181818182">
                <text:p>40.18181818181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.1818181818182">
                <text:p>40.18181818181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.1875">
                <text:p>40.1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2222222222222">
                <text:p>40.22222222222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2413793103448">
                <text:p>40.24137931034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.2592592592593">
                <text:p>40.25925925925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.3777777777778">
                <text:p>40.37777777777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0.3793103448276">
                <text:p>40.37931034482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.3846153846154">
                <text:p>40.38461538461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3888888888889">
                <text:p>40.38888888888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4545454545455">
                <text:p>40.4545454545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.4705882352941">
                <text:p>40.47058823529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.5185185185185">
                <text:p>40.51851851851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.5434782608696">
                <text:p>40.5434782608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.5625">
                <text:p>40.5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.5692307692308">
                <text:p>40.56923076923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.6071428571429">
                <text:p>40.60714285714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.6101694915254">
                <text:p>40.61016949152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.6336633663366">
                <text:p>40.63366336633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0.6410256410256">
                <text:p>40.64102564102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0.7380952380952">
                <text:p>40.73809523809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.7619047619048">
                <text:p>40.76190476190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.7692307692308">
                <text:p>40.76923076923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8157894736842">
                <text:p>40.81578947368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8571428571429">
                <text:p>40.85714285714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8666666666667">
                <text:p>40.8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8666666666667">
                <text:p>40.866666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9272727272727">
                <text:p>40.92727272727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952380952381">
                <text:p>40.9523809523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.9545454545455">
                <text:p>40.9545454545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.9666666666667">
                <text:p>40.966666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0212765957447">
                <text:p>41.02127659574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0285714285714">
                <text:p>41.02857142857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0508474576271">
                <text:p>41.05084745762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0666666666667">
                <text:p>41.06666666666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0882352941176">
                <text:p>41.08823529411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1066666666667">
                <text:p>41.10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1395348837209">
                <text:p>41.13953488372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1785714285714">
                <text:p>41.17857142857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1842105263158">
                <text:p>41.18421052631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.2631578947368">
                <text:p>41.26315789473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1.2631578947368">
                <text:p>41.26315789473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.2727272727273">
                <text:p>41.27272727272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.2894736842105">
                <text:p>41.28947368421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.2941176470588">
                <text:p>41.29411764705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.3125">
                <text:p>41.3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.3426573426573">
                <text:p>41.34265734265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.3564356435644">
                <text:p>41.35643564356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.3695652173913">
                <text:p>41.36956521739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.3725490196079">
                <text:p>41.37254901960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.4166666666667">
                <text:p>41.416666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1.4166666666667">
                <text:p>41.4166666666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.4179104477612">
                <text:p>41.41791044776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1.4594594594595">
                <text:p>41.45945945945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.5238095238095">
                <text:p>41.52380952380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1.5365853658537">
                <text:p>41.53658536585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1.5476190476191">
                <text:p>41.54761904761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1.6052631578947">
                <text:p>41.60526315789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1.6595744680851">
                <text:p>41.65957446808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1.6619718309859">
                <text:p>41.66197183098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1.6842105263158">
                <text:p>41.68421052631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1.6923076923077">
                <text:p>41.69230769230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.7272727272727">
                <text:p>41.7272727272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1.728813559322">
                <text:p>41.7288135593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1.8125">
                <text:p>41.81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1.8333333333333">
                <text:p>41.833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.8333333333333">
                <text:p>41.83333333333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.8823529411765">
                <text:p>41.88235294117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.8918918918919">
                <text:p>41.89189189189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.9444444444444">
                <text:p>41.94444444444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1.9545454545455">
                <text:p>41.9545454545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.0057803468208">
                <text:p>42.00578034682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.0243902439024">
                <text:p>42.02439024390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.0294117647059">
                <text:p>42.029411764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.0384615384615">
                <text:p>42.03846153846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.0384615384615">
                <text:p>42.03846153846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.0909090909091">
                <text:p>42.09090909090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.0983606557377">
                <text:p>42.09836065573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.109375">
                <text:p>42.10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.1415094339623">
                <text:p>42.14150943396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.1785714285714">
                <text:p>42.17857142857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.1846153846154">
                <text:p>42.18461538461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.1923076923077">
                <text:p>42.19230769230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.2162162162162">
                <text:p>42.21621621621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.2380952380952">
                <text:p>42.23809523809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.2564102564103">
                <text:p>42.25641025641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.2727272727273">
                <text:p>42.27272727272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.3636363636364">
                <text:p>42.36363636363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.3684210526316">
                <text:p>42.36842105263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.3777777777778">
                <text:p>42.37777777777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.3809523809524">
                <text:p>42.38095238095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.3846153846154">
                <text:p>42.38461538461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.4117647058824">
                <text:p>42.41176470588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.4615384615385">
                <text:p>42.46153846153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.484375">
                <text:p>42.484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.5217391304348">
                <text:p>42.52173913043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.5238095238095">
                <text:p>42.52380952380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.5294117647059">
                <text:p>42.52941176470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.551724137931">
                <text:p>42.5517241379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.5952380952381">
                <text:p>42.59523809523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.7272727272727">
                <text:p>42.72727272727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.7368421052632">
                <text:p>42.73684210526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2.7727272727273">
                <text:p>42.77272727272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2.7777777777778">
                <text:p>42.77777777777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2.7804878048781">
                <text:p>42.78048780487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2.8095238095238">
                <text:p>42.80952380952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.8125">
                <text:p>42.81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.8181818181818">
                <text:p>42.81818181818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.8481012658228">
                <text:p>42.84810126582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.8518518518519">
                <text:p>42.85185185185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.8653846153846">
                <text:p>42.86538461538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.9047619047619">
                <text:p>42.90476190476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.9130434782609">
                <text:p>42.91304347826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.925">
                <text:p>42.9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.9259259259259">
                <text:p>42.92592592592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.952380952381">
                <text:p>42.9523809523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.953488372093">
                <text:p>42.9534883720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3.0718232044199">
                <text:p>43.07182320441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3.0952380952381">
                <text:p>43.09523809523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3.1071428571429">
                <text:p>43.10714285714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3.1428571428572">
                <text:p>43.14285714285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.2105263157895">
                <text:p>43.21052631578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.2222222222222">
                <text:p>43.22222222222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.2222222222222">
                <text:p>43.2222222222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.2222222222222">
                <text:p>43.22222222222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.225">
                <text:p>43.2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.2666666666667">
                <text:p>43.266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.3076923076923">
                <text:p>43.30769230769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.3913043478261">
                <text:p>43.39130434782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.4186046511628">
                <text:p>43.41860465116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.4615384615385">
                <text:p>43.46153846153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.4736842105263">
                <text:p>43.47368421052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.5220125786164">
                <text:p>43.52201257861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3.5531914893617">
                <text:p>43.55319148936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3.5652173913044">
                <text:p>43.56521739130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3.5686274509804">
                <text:p>43.56862745098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3.5714285714286">
                <text:p>43.57142857142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3.5882352941176">
                <text:p>43.5882352941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.5909090909091">
                <text:p>43.59090909090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3.5952380952381">
                <text:p>43.59523809523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3.6206896551724">
                <text:p>43.62068965517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3.6279069767442">
                <text:p>43.62790697674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3.6818181818182">
                <text:p>43.68181818181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3.6923076923077">
                <text:p>43.69230769230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3.7254901960784">
                <text:p>43.72549019607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3.7692307692308">
                <text:p>43.76923076923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3.7727272727273">
                <text:p>43.77272727272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3.7865168539326">
                <text:p>43.78651685393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3.7894736842105">
                <text:p>43.78947368421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3.7916666666667">
                <text:p>43.791666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3.8305084745763">
                <text:p>43.83050847457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3.8823529411765">
                <text:p>43.88235294117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3.9090909090909">
                <text:p>43.90909090909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3.9365079365079">
                <text:p>43.93650793650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4.0416666666667">
                <text:p>44.041666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4.0476190476191">
                <text:p>44.04761904761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4.0952380952381">
                <text:p>44.09523809523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4.0952380952381">
                <text:p>44.09523809523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4.1219512195122">
                <text:p>44.12195121951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.1611374407583">
                <text:p>44.16113744075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.2222222222222">
                <text:p>44.22222222222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4.2222222222222">
                <text:p>44.22222222222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4.2666666666667">
                <text:p>44.2666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4.2727272727273">
                <text:p>44.27272727272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4.2857142857143">
                <text:p>44.28571428571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4.2857142857143">
                <text:p>44.28571428571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4.377358490566">
                <text:p>44.3773584905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.4333333333333">
                <text:p>44.43333333333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4.4523809523809">
                <text:p>44.45238095238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4.46875">
                <text:p>44.468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4.5789473684211">
                <text:p>44.5789473684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4.5862068965517">
                <text:p>44.58620689655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4.5925925925926">
                <text:p>44.59259259259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4.6363636363636">
                <text:p>44.63636363636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4.6428571428571">
                <text:p>44.64285714285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4.6818181818182">
                <text:p>44.68181818181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4.6947368421053">
                <text:p>44.69473684210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4.72">
                <text:p>44.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4.7307692307692">
                <text:p>44.73076923076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4.7391304347826">
                <text:p>44.73913043478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.775">
                <text:p>44.7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4.7857142857143">
                <text:p>44.78571428571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4.7916666666667">
                <text:p>44.79166666666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4.8461538461538">
                <text:p>44.84615384615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4.8653846153846">
                <text:p>44.86538461538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.8660714285714">
                <text:p>44.86607142857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4.9047619047619">
                <text:p>44.90476190476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4.9107142857143">
                <text:p>44.91071428571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4.9166666666667">
                <text:p>44.91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.9508196721312">
                <text:p>44.95081967213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.9803921568627">
                <text:p>44.98039215686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5.0689655172414">
                <text:p>45.06896551724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.1621621621622">
                <text:p>45.16216216216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5.1904761904762">
                <text:p>45.19047619047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5.2083333333333">
                <text:p>45.208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5.2142857142857">
                <text:p>45.21428571428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5.21875">
                <text:p>45.218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.2592592592593">
                <text:p>45.259259259259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.2857142857143">
                <text:p>45.28571428571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5.2962962962963">
                <text:p>45.29629629629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5.3571428571429">
                <text:p>45.35714285714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5.3809523809524">
                <text:p>45.38095238095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5.4146341463415">
                <text:p>45.41463414634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.421052631579">
                <text:p>45.4210526315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5.4329896907217">
                <text:p>45.43298969072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.4615384615385">
                <text:p>45.46153846153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5.4736842105263">
                <text:p>45.47368421052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5.5217391304348">
                <text:p>45.52173913043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5.5375">
                <text:p>45.5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5.5384615384615">
                <text:p>45.53846153846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.5416666666667">
                <text:p>45.54166666666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.6111111111111">
                <text:p>45.61111111111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5.6190476190476">
                <text:p>45.61904761904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.6547619047619">
                <text:p>45.65476190476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.6551724137931">
                <text:p>45.65517241379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.6829268292683">
                <text:p>45.68292682926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.7037037037037">
                <text:p>45.70370370370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.7142857142857">
                <text:p>45.71428571428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5.7352941176471">
                <text:p>45.73529411764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5.7391304347826">
                <text:p>45.73913043478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5.7619047619048">
                <text:p>45.76190476190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5.8076923076923">
                <text:p>45.80769230769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5.8305084745763">
                <text:p>45.83050847457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5.8448275862069">
                <text:p>45.84482758620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.9047619047619">
                <text:p>45.90476190476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.9090909090909">
                <text:p>45.90909090909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.9148936170213">
                <text:p>45.91489361702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.9333333333333">
                <text:p>45.9333333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.952380952381">
                <text:p>45.9523809523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6.0476190476191">
                <text:p>46.04761904761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6.0526315789474">
                <text:p>46.05263157894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6.0714285714286">
                <text:p>46.07142857142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6.0833333333333">
                <text:p>46.08333333333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.0862068965517">
                <text:p>46.08620689655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6.1136363636364">
                <text:p>46.11363636363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6.1428571428572">
                <text:p>46.14285714285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.1428571428572">
                <text:p>46.14285714285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.1578947368421">
                <text:p>46.15789473684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.1588235294118">
                <text:p>46.15882352941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.1702127659575">
                <text:p>46.1702127659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.1785714285714">
                <text:p>46.17857142857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.1860465116279">
                <text:p>46.18604651162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2631578947368">
                <text:p>46.26315789473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.2727272727273">
                <text:p>46.27272727272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3448275862069">
                <text:p>46.34482758620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3953488372093">
                <text:p>46.39534883720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.4047619047619">
                <text:p>46.40476190476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4054054054054">
                <text:p>46.40540540540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.4615384615385">
                <text:p>46.46153846153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.4657534246575">
                <text:p>46.46575342465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.4666666666667">
                <text:p>46.46666666666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.46875">
                <text:p>46.468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6.4782608695652">
                <text:p>46.47826086956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.4821428571429">
                <text:p>46.48214285714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6.5263157894737">
                <text:p>46.5263157894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6.5454545454545">
                <text:p>46.54545454545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6.6190476190476">
                <text:p>46.61904761904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6.6285714285714">
                <text:p>46.62857142857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.6363636363636">
                <text:p>46.63636363636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6.6538461538462">
                <text:p>46.65384615384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6.7058823529412">
                <text:p>46.70588235294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.7254901960784">
                <text:p>46.72549019607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6.7555555555556">
                <text:p>46.75555555555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6.7719298245614">
                <text:p>46.77192982456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6.7777777777778">
                <text:p>46.77777777777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.7777777777778">
                <text:p>46.77777777777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6.7894736842105">
                <text:p>46.78947368421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.8108108108108">
                <text:p>46.81081081081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.8260869565217">
                <text:p>46.82608695652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.8285714285714">
                <text:p>46.82857142857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.8571428571429">
                <text:p>46.85714285714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.8571428571429">
                <text:p>46.85714285714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.8695652173913">
                <text:p>46.86956521739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.8787878787879">
                <text:p>46.87878787878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6.8823529411765">
                <text:p>46.88235294117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6.8846153846154">
                <text:p>46.88461538461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6.8947368421053">
                <text:p>46.89473684210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6.9047619047619">
                <text:p>46.90476190476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6.9473684210526">
                <text:p>46.94736842105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6.9545454545455">
                <text:p>46.95454545454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.9772727272727">
                <text:p>46.97727272727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.0512820512821">
                <text:p>47.05128205128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.0869565217391">
                <text:p>47.08695652173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7.1111111111111">
                <text:p>47.11111111111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.1153846153846">
                <text:p>47.11538461538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7.1363636363636">
                <text:p>47.13636363636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.1388888888889">
                <text:p>47.13888888888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.1428571428571">
                <text:p>47.14285714285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7.1578947368421">
                <text:p>47.15789473684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.28125">
                <text:p>47.281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7.2972972972973">
                <text:p>47.29729729729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.2978723404255">
                <text:p>47.29787234042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7.3058823529412">
                <text:p>47.30588235294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.3181818181818">
                <text:p>47.31818181818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7.3222222222222">
                <text:p>47.32222222222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7.3414634146342">
                <text:p>47.341463414634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7.3478260869565">
                <text:p>47.34782608695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7.3548387096774">
                <text:p>47.35483870967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.3863636363636">
                <text:p>47.386363636363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.4166666666667">
                <text:p>47.416666666666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.4230769230769">
                <text:p>47.42307692307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7.4444444444444">
                <text:p>47.44444444444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7.4444444444444">
                <text:p>47.44444444444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.4464285714286">
                <text:p>47.44642857142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7.4545454545455">
                <text:p>47.45454545454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7.4571428571429">
                <text:p>47.45714285714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7.4666666666667">
                <text:p>47.46666666666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7.4912280701754">
                <text:p>47.49122807017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7.5294117647059">
                <text:p>47.52941176470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7.551724137931">
                <text:p>47.5517241379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.5555555555556">
                <text:p>47.55555555555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7.6818181818182">
                <text:p>47.68181818181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7.6818181818182">
                <text:p>47.68181818181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7.6857142857143">
                <text:p>47.68571428571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7.703125">
                <text:p>47.7031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7.7333333333333">
                <text:p>47.73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7.7407407407407">
                <text:p>47.74074074074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.8181818181818">
                <text:p>47.818181818181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7.8333333333333">
                <text:p>47.83333333333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7.84">
                <text:p>47.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7.8421052631579">
                <text:p>47.84210526315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.8636363636364">
                <text:p>47.86363636363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7.8846153846154">
                <text:p>47.88461538461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7.9310344827586">
                <text:p>47.93103448275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7.9333333333333">
                <text:p>47.93333333333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7.9438202247191">
                <text:p>47.94382022471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7.9444444444444">
                <text:p>47.944444444444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7.9545454545455">
                <text:p>47.95454545454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7.9615384615385">
                <text:p>47.96153846153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7.962962962963">
                <text:p>47.96296296296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8.0277777777778">
                <text:p>48.027777777777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8.03125">
                <text:p>48.03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8.0769230769231">
                <text:p>48.07692307692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8.078431372549">
                <text:p>48.0784313725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8.0909090909091">
                <text:p>48.09090909090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8.1111111111111">
                <text:p>48.11111111111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8.1258278145695">
                <text:p>48.12582781456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8.1363636363636">
                <text:p>48.136363636363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8.1428571428572">
                <text:p>48.142857142857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8.1666666666667">
                <text:p>48.1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8.1764705882353">
                <text:p>48.17647058823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8.1818181818182">
                <text:p>48.181818181818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8.2123142250531">
                <text:p>48.21231422505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8.2173913043478">
                <text:p>48.217391304347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8.2413793103448">
                <text:p>48.24137931034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8.2878787878788">
                <text:p>48.28787878787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8.2897196261682">
                <text:p>48.28971962616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8.2931726907631">
                <text:p>48.293172690763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8.3023255813954">
                <text:p>48.30232558139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8.3157894736842">
                <text:p>48.31578947368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8.32">
                <text:p>48.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8.3571428571429">
                <text:p>48.357142857142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8.3703703703704">
                <text:p>48.370370370370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8.3783783783784">
                <text:p>48.37837837837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8.3947368421053">
                <text:p>48.39473684210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8.4347826086957">
                <text:p>48.434782608695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8.5263157894737">
                <text:p>48.526315789473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8.53125">
                <text:p>48.53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8.531914893617">
                <text:p>48.53191489361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8.5728155339806">
                <text:p>48.572815533980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8.5744680851064">
                <text:p>48.57446808510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8.6315789473684">
                <text:p>48.63157894736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.7058823529412">
                <text:p>48.705882352941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8.7272727272727">
                <text:p>48.72727272727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8.765306122449">
                <text:p>48.76530612244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8.7666666666667">
                <text:p>48.766666666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8.7727272727273">
                <text:p>48.772727272727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8.8085106382979">
                <text:p>48.808510638297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8.859649122807">
                <text:p>48.8596491228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8.8809523809524">
                <text:p>48.88095238095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8.8888888888889">
                <text:p>48.888888888888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8.8978102189781">
                <text:p>48.89781021897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8.9032258064516">
                <text:p>48.90322580645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8.9230769230769">
                <text:p>48.92307692307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8.9375">
                <text:p>48.93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8.9459459459459">
                <text:p>48.94594594594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8.96875">
                <text:p>48.968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9.0169491525424">
                <text:p>49.016949152542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9.03125">
                <text:p>49.031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9.0657894736842">
                <text:p>49.065789473684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9.0909090909091">
                <text:p>49.09090909090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9.0952380952381">
                <text:p>49.09523809523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9.1578947368421">
                <text:p>49.157894736842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9.1714285714286">
                <text:p>49.17142857142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9.1739130434783">
                <text:p>49.173913043478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9.2142857142857">
                <text:p>49.214285714285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9.2272727272727">
                <text:p>49.227272727272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9.2352941176471">
                <text:p>49.23529411764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9.2608695652174">
                <text:p>49.26086956521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9.2666666666667">
                <text:p>49.266666666666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9.2727272727273">
                <text:p>49.27272727272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9.2972972972973">
                <text:p>49.297297297297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9.3076923076923">
                <text:p>49.307692307692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9.3076923076923">
                <text:p>49.307692307692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9.3255813953488">
                <text:p>49.32558139534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9.3488372093023">
                <text:p>49.34883720930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9.4117647058824">
                <text:p>49.41176470588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9.4186046511628">
                <text:p>49.41860465116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9.4642857142857">
                <text:p>49.464285714285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9.4782608695652">
                <text:p>49.47826086956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9.5217391304348">
                <text:p>49.521739130434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9.5238095238095">
                <text:p>49.52380952380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9.5263157894737">
                <text:p>49.526315789473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9.5434782608696">
                <text:p>49.54347826086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9.5454545454546">
                <text:p>49.54545454545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9.5641025641026">
                <text:p>49.564102564102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9.6333333333333">
                <text:p>49.633333333333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9.6981132075472">
                <text:p>49.69811320754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9.7096774193548">
                <text:p>49.709677419354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9.7263157894737">
                <text:p>49.726315789473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9.7619047619048">
                <text:p>49.761904761904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9.7692307692308">
                <text:p>49.76923076923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9.7727272727273">
                <text:p>49.772727272727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9.7916666666667">
                <text:p>49.791666666666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9.8125">
                <text:p>49.81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9.8181818181818">
                <text:p>49.818181818181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9.8571428571429">
                <text:p>49.857142857142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9.8636363636364">
                <text:p>49.863636363636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9.8829787234043">
                <text:p>49.88297872340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9.8979591836735">
                <text:p>49.897959183673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9.9142857142857">
                <text:p>49.91428571428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9.9166666666667">
                <text:p>49.91666666666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9.9565217391304">
                <text:p>49.956521739130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9.9677419354839">
                <text:p>49.96774193548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0.0384615384615">
                <text:p>50.03846153846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0.0434782608696">
                <text:p>50.0434782608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0.0476190476191">
                <text:p>50.04761904761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0.0571428571429">
                <text:p>50.057142857142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0.0666666666667">
                <text:p>50.06666666666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0.0714285714286">
                <text:p>50.07142857142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0.0909090909091">
                <text:p>50.09090909090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0.0975609756098">
                <text:p>50.097560975609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0.1666666666667">
                <text:p>50.166666666666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0.1818181818182">
                <text:p>50.181818181818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0.2153846153846">
                <text:p>50.21538461538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0.2272727272727">
                <text:p>50.227272727272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0.2380952380952">
                <text:p>50.23809523809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0.2727272727273">
                <text:p>50.272727272727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0.2941176470588">
                <text:p>50.294117647058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.3636363636364">
                <text:p>50.36363636363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0.3636363636364">
                <text:p>50.36363636363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0.4347826086956">
                <text:p>50.43478260869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0.4583333333333">
                <text:p>50.458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0.4651162790698">
                <text:p>50.46511627906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0.4651162790698">
                <text:p>50.46511627906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0.4705882352941">
                <text:p>50.470588235294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0.5151515151515">
                <text:p>50.51515151515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0.5555555555556">
                <text:p>50.555555555555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0.5909090909091">
                <text:p>50.59090909090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.6122448979592">
                <text:p>50.61224489795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0.6363636363636">
                <text:p>50.636363636363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0.6363636363636">
                <text:p>50.63636363636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0.6521739130435">
                <text:p>50.65217391304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0.6551724137931">
                <text:p>50.655172413793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0.7058823529412">
                <text:p>50.70588235294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0.734375">
                <text:p>50.7343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0.7352941176471">
                <text:p>50.735294117647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0.7466666666667">
                <text:p>50.746666666666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0.7692307692308">
                <text:p>50.76923076923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0.7699115044248">
                <text:p>50.76991150442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0.9090909090909">
                <text:p>50.90909090909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0.9333333333333">
                <text:p>50.933333333333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0.9393939393939">
                <text:p>50.93939393939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0.9444444444444">
                <text:p>50.94444444444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0.9545454545455">
                <text:p>50.954545454545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0.9545454545455">
                <text:p>50.95454545454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0.9545454545455">
                <text:p>50.95454545454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0.9583333333333">
                <text:p>50.9583333333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0.9666666666667">
                <text:p>50.966666666666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0.9733333333333">
                <text:p>50.97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1.0434782608696">
                <text:p>51.04347826086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1.0454545454545">
                <text:p>51.045454545454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1.0606060606061">
                <text:p>51.060606060606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1.0625">
                <text:p>51.06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1.0666666666667">
                <text:p>51.066666666666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1.0769230769231">
                <text:p>51.076923076923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1.0983606557377">
                <text:p>51.09836065573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1.1304347826087">
                <text:p>51.13043478260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1.1428571428572">
                <text:p>51.142857142857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1.1818181818182">
                <text:p>51.181818181818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.1818181818182">
                <text:p>51.18181818181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1.1904761904762">
                <text:p>51.190476190476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1.2424242424242">
                <text:p>51.242424242424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.3023255813954">
                <text:p>51.302325581395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1.3636363636364">
                <text:p>51.363636363636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1.3703703703704">
                <text:p>51.370370370370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1.3855421686747">
                <text:p>51.385542168674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1.3870967741936">
                <text:p>51.387096774193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1.4006514657981">
                <text:p>51.400651465798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1.4347826086957">
                <text:p>51.434782608695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1.4615384615385">
                <text:p>51.461538461538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1.4651162790698">
                <text:p>51.465116279069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.5277777777778">
                <text:p>51.527777777777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1.5652173913044">
                <text:p>51.565217391304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1.5789473684211">
                <text:p>51.578947368421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1.6046511627907">
                <text:p>51.604651162790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1.625">
                <text:p>51.6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1.6315789473684">
                <text:p>51.631578947368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1.6785714285714">
                <text:p>51.67857142857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1.7222222222222">
                <text:p>51.72222222222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1.7441860465116">
                <text:p>51.74418604651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1.8125">
                <text:p>51.81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1.8181818181818">
                <text:p>51.818181818181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1.8181818181818">
                <text:p>51.818181818181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1.828125">
                <text:p>51.8281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1.8405797101449">
                <text:p>51.840579710144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1.84375">
                <text:p>51.843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1.8529411764706">
                <text:p>51.852941176470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1.8666666666667">
                <text:p>51.86666666666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1.8809523809524">
                <text:p>51.880952380952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1.8947368421053">
                <text:p>51.894736842105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1.906976744186">
                <text:p>51.90697674418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1.9545454545455">
                <text:p>51.95454545454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1.9722222222222">
                <text:p>51.97222222222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2.025">
                <text:p>52.0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2.037037037037">
                <text:p>52.03703703703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2.0625">
                <text:p>52.06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2.0869565217391">
                <text:p>52.086956521739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2.0882352941177">
                <text:p>52.088235294117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2.0952380952381">
                <text:p>52.09523809523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2.1111111111111">
                <text:p>52.11111111111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2.1428571428571">
                <text:p>52.14285714285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2.1538461538462">
                <text:p>52.153846153846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2.1666666666667">
                <text:p>52.16666666666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.2040816326531">
                <text:p>52.204081632653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2.2222222222222">
                <text:p>52.222222222222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2.2727272727273">
                <text:p>52.272727272727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2.2857142857143">
                <text:p>52.285714285714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2.2857142857143">
                <text:p>52.28571428571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2.2857142857143">
                <text:p>52.28571428571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2.3478260869565">
                <text:p>52.347826086956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2.3529411764706">
                <text:p>52.352941176470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2.3846153846154">
                <text:p>52.38461538461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2.4444444444444">
                <text:p>52.44444444444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2.4473684210526">
                <text:p>52.44736842105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2.448275862069">
                <text:p>52.44827586206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.4615384615385">
                <text:p>52.461538461538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2.4722222222222">
                <text:p>52.47222222222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2.5227272727273">
                <text:p>52.52272727272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2.5333333333333">
                <text:p>52.53333333333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2.5428571428571">
                <text:p>52.542857142857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2.5454545454546">
                <text:p>52.54545454545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2.5454545454546">
                <text:p>52.545454545454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2.5454545454546">
                <text:p>52.545454545454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2.5833333333333">
                <text:p>52.583333333333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2.622641509434">
                <text:p>52.62264150943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2.6315789473684">
                <text:p>52.63157894736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2.6333333333333">
                <text:p>52.633333333333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2.6818181818182">
                <text:p>52.681818181818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2.7037037037037">
                <text:p>52.70370370370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2.741935483871">
                <text:p>52.74193548387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2.7619047619048">
                <text:p>52.761904761904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2.7777777777778">
                <text:p>52.777777777777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2.8181818181818">
                <text:p>52.81818181818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2.9024390243903">
                <text:p>52.902439024390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2.9047619047619">
                <text:p>52.90476190476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2.9090909090909">
                <text:p>52.90909090909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2.925">
                <text:p>52.9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3.0222222222222">
                <text:p>53.022222222222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3.0434782608696">
                <text:p>53.043478260869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3.0487804878049">
                <text:p>53.048780487804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3.0555555555556">
                <text:p>53.055555555555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3.0909090909091">
                <text:p>53.09090909090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3.0909090909091">
                <text:p>53.090909090909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3.0952380952381">
                <text:p>53.09523809523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3.1086956521739">
                <text:p>53.10869565217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3.1304347826087">
                <text:p>53.130434782608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3.1363636363636">
                <text:p>53.13636363636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3.1374045801527">
                <text:p>53.137404580152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3.1388888888889">
                <text:p>53.138888888888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3.1515151515151">
                <text:p>53.151515151515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3.1578947368421">
                <text:p>53.15789473684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3.1746031746032">
                <text:p>53.17460317460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3.1851851851852">
                <text:p>53.18518518518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3.2142857142857">
                <text:p>53.21428571428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3.2222222222222">
                <text:p>53.22222222222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3.2222222222222">
                <text:p>53.22222222222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3.2258064516129">
                <text:p>53.225806451612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3.2317073170732">
                <text:p>53.23170731707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3.2537313432836">
                <text:p>53.253731343283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3.2608695652174">
                <text:p>53.26086956521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3.2682926829268">
                <text:p>53.26829268292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3.28125">
                <text:p>53.2812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3.32">
                <text:p>53.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3.3461538461538">
                <text:p>53.346153846153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3.3548387096774">
                <text:p>53.354838709677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3.3636363636364">
                <text:p>53.36363636363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.3666666666667">
                <text:p>53.366666666666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3.4090909090909">
                <text:p>53.40909090909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3.4181818181818">
                <text:p>53.418181818181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3.4183673469388">
                <text:p>53.418367346938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3.4193548387097">
                <text:p>53.419354838709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3.4230769230769">
                <text:p>53.423076923076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3.4285714285714">
                <text:p>53.428571428571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3.4375">
                <text:p>53.43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3.4375">
                <text:p>53.43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3.4545454545455">
                <text:p>53.45454545454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3.4594594594595">
                <text:p>53.459459459459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3.4838709677419">
                <text:p>53.48387096774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3.5294117647059">
                <text:p>53.52941176470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3.5454545454545">
                <text:p>53.545454545454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3.5555555555556">
                <text:p>53.555555555555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3.5583756345178">
                <text:p>53.558375634517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3.5625">
                <text:p>53.56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3.6578947368421">
                <text:p>53.657894736842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3.6818181818182">
                <text:p>53.681818181818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3.695652173913">
                <text:p>53.69565217391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3.7105263157895">
                <text:p>53.710526315789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3.7391304347826">
                <text:p>53.73913043478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3.7619047619048">
                <text:p>53.761904761904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3.7692307692308">
                <text:p>53.769230769230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3.7894736842105">
                <text:p>53.789473684210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3.8095238095238">
                <text:p>53.809523809523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3.8421052631579">
                <text:p>53.842105263157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3.8636363636364">
                <text:p>53.86363636363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3.8823529411765">
                <text:p>53.882352941176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3.90625">
                <text:p>53.9062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3.9090909090909">
                <text:p>53.90909090909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3.9333333333333">
                <text:p>53.9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3.9622641509434">
                <text:p>53.962264150943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4.0714285714286">
                <text:p>54.071428571428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4.1071428571429">
                <text:p>54.107142857142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4.1304347826087">
                <text:p>54.130434782608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4.1428571428571">
                <text:p>54.142857142857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4.1621621621622">
                <text:p>54.162162162162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4.1752577319588">
                <text:p>54.175257731958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4.1875">
                <text:p>54.187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4.2272727272727">
                <text:p>54.227272727272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4.2631578947368">
                <text:p>54.263157894736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4.2857142857143">
                <text:p>54.28571428571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4.3023255813954">
                <text:p>54.302325581395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4.3035714285714">
                <text:p>54.30357142857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4.3181818181818">
                <text:p>54.318181818181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4.3571428571429">
                <text:p>54.357142857142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4.375">
                <text:p>54.37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4.3827160493827">
                <text:p>54.382716049382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4.4166666666667">
                <text:p>54.416666666666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4.4545454545455">
                <text:p>54.45454545454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4.4814814814815">
                <text:p>54.48148148148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4.5238095238095">
                <text:p>54.52380952380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4.5882352941177">
                <text:p>54.58823529411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4.6363636363636">
                <text:p>54.636363636363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4.675">
                <text:p>54.67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4.7037037037037">
                <text:p>54.70370370370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4.7142857142857">
                <text:p>54.714285714285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4.7407407407407">
                <text:p>54.740740740740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4.7727272727273">
                <text:p>54.772727272727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4.804347826087">
                <text:p>54.8043478260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4.8181818181818">
                <text:p>54.81818181818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4.8260869565217">
                <text:p>54.826086956521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4.8571428571429">
                <text:p>54.857142857142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.8636363636364">
                <text:p>54.863636363636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4.8709677419355">
                <text:p>54.87096774193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4.9259259259259">
                <text:p>54.925925925925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5.025">
                <text:p>55.0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5.0666666666667">
                <text:p>55.066666666666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5.0769230769231">
                <text:p>55.076923076923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5.1176470588235">
                <text:p>55.11764705882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5.1428571428571">
                <text:p>55.142857142857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5.1818181818182">
                <text:p>55.181818181818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5.2068965517241">
                <text:p>55.206896551724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5.2083333333333">
                <text:p>55.208333333333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5.214953271028">
                <text:p>55.21495327102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.2272727272727">
                <text:p>55.227272727272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5.2307692307692">
                <text:p>55.230769230769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5.2661290322581">
                <text:p>55.26612903225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5.2666666666667">
                <text:p>55.2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5.2727272727273">
                <text:p>55.27272727272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5.2857142857143">
                <text:p>55.285714285714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5.3108108108108">
                <text:p>55.310810810810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5.3181818181818">
                <text:p>55.31818181818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5.3571428571429">
                <text:p>55.357142857142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5.4137931034483">
                <text:p>55.413793103448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5.421052631579">
                <text:p>55.42105263157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.4583333333333">
                <text:p>55.45833333333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5.4705882352941">
                <text:p>55.470588235294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5.4848484848485">
                <text:p>55.484848484848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5.4897959183674">
                <text:p>55.489795918367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5.5161290322581">
                <text:p>55.516129032258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5.5454545454546">
                <text:p>55.545454545454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5.5714285714286">
                <text:p>55.571428571428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5.5909090909091">
                <text:p>55.590909090909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5.5909090909091">
                <text:p>55.590909090909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5.6923076923077">
                <text:p>55.692307692307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5.6923076923077">
                <text:p>55.692307692307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5.7407407407407">
                <text:p>55.740740740740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5.7619047619048">
                <text:p>55.761904761904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5.8461538461538">
                <text:p>55.846153846153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5.8571428571429">
                <text:p>55.857142857142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5.8571428571429">
                <text:p>55.85714285714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5.8636363636364">
                <text:p>55.863636363636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5.88">
                <text:p>55.8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.9047619047619">
                <text:p>55.904761904761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5.9090909090909">
                <text:p>55.90909090909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5.9090909090909">
                <text:p>55.909090909090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5.9545454545455">
                <text:p>55.954545454545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6.0330578512397">
                <text:p>56.033057851239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6.0555555555556">
                <text:p>56.05555555555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6.0693069306931">
                <text:p>56.06930693069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6.0869565217391">
                <text:p>56.086956521739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6.0909090909091">
                <text:p>56.090909090909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6.0909090909091">
                <text:p>56.090909090909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6.1052631578947">
                <text:p>56.10526315789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6.15625">
                <text:p>56.156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6.1764705882353">
                <text:p>56.176470588235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6.1818181818182">
                <text:p>56.18181818181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6.1830985915493">
                <text:p>56.183098591549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6.1904761904762">
                <text:p>56.190476190476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6.2105263157895">
                <text:p>56.210526315789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6.2285714285714">
                <text:p>56.22857142857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6.2340425531915">
                <text:p>56.234042553191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6.2903225806452">
                <text:p>56.290322580645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6.3055555555556">
                <text:p>56.30555555555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6.3636363636364">
                <text:p>56.363636363636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6.3846153846154">
                <text:p>56.384615384615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6.4444444444444">
                <text:p>56.44444444444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6.5238095238095">
                <text:p>56.523809523809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6.5342465753425">
                <text:p>56.53424657534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6.5416666666667">
                <text:p>56.541666666666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6.56">
                <text:p>56.5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6.5882352941176">
                <text:p>56.588235294117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6.6129032258065">
                <text:p>56.612903225806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6.6363636363636">
                <text:p>56.636363636363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6.7088607594937">
                <text:p>56.708860759493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6.7731092436975">
                <text:p>56.77310924369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6.7826086956522">
                <text:p>56.782608695652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6.7857142857143">
                <text:p>56.78571428571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6.8181818181818">
                <text:p>56.818181818181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6.8571428571429">
                <text:p>56.85714285714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6.8695652173913">
                <text:p>56.86956521739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6.9047619047619">
                <text:p>56.904761904761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6.9375">
                <text:p>56.937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6.9615384615385">
                <text:p>56.96153846153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7.0111111111111">
                <text:p>57.01111111111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7.0476190476191">
                <text:p>57.047619047619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7.0625">
                <text:p>57.06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7.0681818181818">
                <text:p>57.068181818181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7.0967741935484">
                <text:p>57.096774193548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7.1304347826087">
                <text:p>57.130434782608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7.1363636363636">
                <text:p>57.136363636363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7.1538461538462">
                <text:p>57.153846153846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7.1842105263158">
                <text:p>57.184210526315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7.1935483870968">
                <text:p>57.193548387096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7.2040816326531">
                <text:p>57.204081632653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7.2068965517241">
                <text:p>57.206896551724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7.2142857142857">
                <text:p>57.214285714285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7.2258064516129">
                <text:p>57.225806451612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7.2272727272727">
                <text:p>57.227272727272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7.2352941176471">
                <text:p>57.235294117647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7.2857142857143">
                <text:p>57.285714285714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7.3181818181818">
                <text:p>57.31818181818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7.3636363636364">
                <text:p>57.363636363636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7.4444444444444">
                <text:p>57.44444444444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7.6428571428571">
                <text:p>57.642857142857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7.6859504132231">
                <text:p>57.685950413223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7.6981132075472">
                <text:p>57.698113207547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7.7284768211921">
                <text:p>57.728476821192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7.7457627118644">
                <text:p>57.745762711864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7.8076923076923">
                <text:p>57.807692307692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7.8333333333333">
                <text:p>57.833333333333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7.8636363636364">
                <text:p>57.863636363636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7.8648648648649">
                <text:p>57.864864864864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7.8888888888889">
                <text:p>57.888888888888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.9090909090909">
                <text:p>57.909090909090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7.9090909090909">
                <text:p>57.909090909090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7.9411764705882">
                <text:p>57.941176470588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7.9457364341085">
                <text:p>57.945736434108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7.9473684210526">
                <text:p>57.947368421052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7.9583333333333">
                <text:p>57.95833333333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7.9722222222222">
                <text:p>57.972222222222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7.972972972973">
                <text:p>57.97297297297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8.0153846153846">
                <text:p>58.015384615384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8.0196078431373">
                <text:p>58.019607843137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8.0833333333333">
                <text:p>58.08333333333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8.0869565217391">
                <text:p>58.086956521739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8.0909090909091">
                <text:p>58.09090909090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8.1071428571429">
                <text:p>58.10714285714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8.1142857142857">
                <text:p>58.114285714285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8.1739130434783">
                <text:p>58.173913043478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8.1785714285714">
                <text:p>58.178571428571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8.1818181818182">
                <text:p>58.181818181818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8.1842105263158">
                <text:p>58.184210526315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8.1923076923077">
                <text:p>58.192307692307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8.2173913043478">
                <text:p>58.217391304347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8.2272727272727">
                <text:p>58.227272727272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8.2307692307692">
                <text:p>58.230769230769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8.2413793103448">
                <text:p>58.241379310344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8.2666666666667">
                <text:p>58.2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8.3076923076923">
                <text:p>58.307692307692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8.3157894736842">
                <text:p>58.315789473684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8.3157894736842">
                <text:p>58.315789473684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8.3636363636364">
                <text:p>58.363636363636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8.3636363636364">
                <text:p>58.363636363636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8.4090909090909">
                <text:p>58.40909090909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8.4186046511628">
                <text:p>58.418604651162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8.4615384615385">
                <text:p>58.461538461538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8.5294117647059">
                <text:p>58.529411764705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8.5454545454545">
                <text:p>58.54545454545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8.5833333333333">
                <text:p>58.583333333333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8.5882352941176">
                <text:p>58.588235294117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8.6190476190476">
                <text:p>58.619047619047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8.64">
                <text:p>58.6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8.6521739130435">
                <text:p>58.652173913043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.7333333333333">
                <text:p>58.733333333333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8.7692307692308">
                <text:p>58.769230769230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.7741935483871">
                <text:p>58.774193548387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8.8148148148148">
                <text:p>58.814814814814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8.8181818181818">
                <text:p>58.818181818181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8.8181818181818">
                <text:p>58.818181818181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8.8260869565217">
                <text:p>58.826086956521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8.8315789473684">
                <text:p>58.831578947368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8.8787878787879">
                <text:p>58.878787878787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8.8888888888889">
                <text:p>58.888888888888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8.8947368421053">
                <text:p>58.89473684210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9.0222222222222">
                <text:p>59.02222222222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9.0227272727273">
                <text:p>59.022727272727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9.0454545454545">
                <text:p>59.045454545454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9.0555555555556">
                <text:p>59.055555555555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9.0740740740741">
                <text:p>59.074074074074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9.1333333333333">
                <text:p>59.133333333333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9.1764705882353">
                <text:p>59.176470588235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9.2352941176471">
                <text:p>59.235294117647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9.2461538461538">
                <text:p>59.246153846153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9.3157894736842">
                <text:p>59.315789473684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9.3478260869565">
                <text:p>59.347826086956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9.3571428571429">
                <text:p>59.357142857142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9.3684210526316">
                <text:p>59.368421052631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9.4324324324324">
                <text:p>59.432432432432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9.5333333333333">
                <text:p>59.533333333333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9.6111111111111">
                <text:p>59.61111111111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9.6428571428571">
                <text:p>59.642857142857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9.6842105263158">
                <text:p>59.684210526315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9.6888888888889">
                <text:p>59.688888888888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9.7254901960784">
                <text:p>59.725490196078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9.7333333333333">
                <text:p>59.733333333333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9.7692307692308">
                <text:p>59.769230769230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9.8333333333333">
                <text:p>59.833333333333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9.9090909090909">
                <text:p>59.909090909090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9.9354838709678">
                <text:p>59.935483870967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9.9761904761905">
                <text:p>59.976190476190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0.0263157894737">
                <text:p>60.026315789473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0.085201793722">
                <text:p>60.08520179372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0.1153846153846">
                <text:p>60.115384615384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0.1206896551724">
                <text:p>60.120689655172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0.1320754716981">
                <text:p>60.132075471698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0.1428571428571">
                <text:p>60.142857142857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0.1764705882353">
                <text:p>60.17647058823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0.1951219512195">
                <text:p>60.195121951219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0.2727272727273">
                <text:p>60.272727272727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0.2777777777778">
                <text:p>60.277777777777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0.3076923076923">
                <text:p>60.307692307692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0.3157894736842">
                <text:p>60.315789473684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0.3181818181818">
                <text:p>60.318181818181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0.4186046511628">
                <text:p>60.41860465116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0.4347826086956">
                <text:p>60.434782608695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0.4545454545455">
                <text:p>60.454545454545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0.5333333333333">
                <text:p>60.533333333333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0.5454545454546">
                <text:p>60.545454545454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0.5555555555556">
                <text:p>60.555555555555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0.5833333333333">
                <text:p>60.58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0.6153846153846">
                <text:p>60.615384615384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0.6363636363636">
                <text:p>60.63636363636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0.6470588235294">
                <text:p>60.647058823529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0.7096774193548">
                <text:p>60.709677419354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0.7279635258359">
                <text:p>60.727963525835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0.7777777777778">
                <text:p>60.777777777777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0.8064516129032">
                <text:p>60.806451612903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0.8076923076923">
                <text:p>60.807692307692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0.8666666666667">
                <text:p>60.866666666666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0.8947368421053">
                <text:p>60.894736842105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0.9117647058824">
                <text:p>60.91176470588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0.9310344827586">
                <text:p>60.931034482758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1.1029411764706">
                <text:p>61.102941176470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1.1612903225806">
                <text:p>61.161290322580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1.2142857142857">
                <text:p>61.214285714285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1.2272727272727">
                <text:p>61.227272727272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1.2417582417582">
                <text:p>61.241758241758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1.2903225806452">
                <text:p>61.290322580645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1.2916666666667">
                <text:p>61.291666666666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1.304347826087">
                <text:p>61.30434782608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1.34375">
                <text:p>61.3437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1.3478260869565">
                <text:p>61.347826086956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1.3636363636364">
                <text:p>61.363636363636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1.3809523809524">
                <text:p>61.380952380952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1.4347826086957">
                <text:p>61.434782608695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1.4444444444444">
                <text:p>61.44444444444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1.5365853658537">
                <text:p>61.536585365853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1.5454545454545">
                <text:p>61.545454545454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5555555555556">
                <text:p>61.555555555555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6153846153846">
                <text:p>61.61538461538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6195652173913">
                <text:p>61.619565217391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6470588235294">
                <text:p>61.647058823529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7391304347826">
                <text:p>61.739130434782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8095238095238">
                <text:p>61.809523809523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8538461538462">
                <text:p>61.853846153846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8809523809524">
                <text:p>61.880952380952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9130434782609">
                <text:p>61.91304347826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9166666666667">
                <text:p>61.916666666666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9677419354839">
                <text:p>61.967741935483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2.0454545454546">
                <text:p>62.045454545454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2.1304347826087">
                <text:p>62.130434782608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2.1379310344828">
                <text:p>62.137931034482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2.14">
                <text:p>62.1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2.1904761904762">
                <text:p>62.190476190476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2.2368421052632">
                <text:p>62.236842105263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2.2592592592593">
                <text:p>62.259259259259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2.2771739130435">
                <text:p>62.277173913043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2.3636363636364">
                <text:p>62.363636363636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3684210526316">
                <text:p>62.368421052631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4210526315789">
                <text:p>62.421052631578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4210526315789">
                <text:p>62.421052631578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6538461538462">
                <text:p>62.653846153846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6666666666667">
                <text:p>62.666666666666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7333333333333">
                <text:p>62.733333333333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7777777777778">
                <text:p>62.777777777777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8260869565217">
                <text:p>62.826086956521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8571428571429">
                <text:p>62.85714285714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8888888888889">
                <text:p>62.888888888888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9230769230769">
                <text:p>62.923076923076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9285714285714">
                <text:p>62.92857142857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9459459459459">
                <text:p>62.945945945945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9814814814815">
                <text:p>62.981481481481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984375">
                <text:p>62.98437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3.0454545454546">
                <text:p>63.045454545454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3.0555555555556">
                <text:p>63.055555555555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3.0689655172414">
                <text:p>63.068965517241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3.1304347826087">
                <text:p>63.130434782608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15625">
                <text:p>63.1562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1818181818182">
                <text:p>63.18181818181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1904761904762">
                <text:p>63.19047619047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2666666666667">
                <text:p>63.26666666666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3157894736842">
                <text:p>63.315789473684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375">
                <text:p>63.3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4285714285714">
                <text:p>63.428571428571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4444444444444">
                <text:p>63.444444444444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4583333333333">
                <text:p>63.45833333333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4634146341463">
                <text:p>63.46341463414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4716981132075">
                <text:p>63.471698113207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5757575757576">
                <text:p>63.575757575757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6190476190476">
                <text:p>63.619047619047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875">
                <text:p>63.687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7391304347826">
                <text:p>63.739130434782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7857142857143">
                <text:p>63.78571428571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8620689655172">
                <text:p>63.862068965517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9090909090909">
                <text:p>63.909090909090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9107142857143">
                <text:p>63.91071428571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9230769230769">
                <text:p>63.923076923076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555555555556">
                <text:p>64.055555555555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1176470588235">
                <text:p>64.117647058823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428571428571">
                <text:p>64.142857142857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1764705882353">
                <text:p>64.176470588235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1818181818182">
                <text:p>64.181818181818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1818181818182">
                <text:p>64.181818181818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1935483870968">
                <text:p>64.193548387096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2083333333333">
                <text:p>64.208333333333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3548387096774">
                <text:p>64.354838709677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3636363636364">
                <text:p>64.363636363636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3958333333333">
                <text:p>64.395833333333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4347826086957">
                <text:p>64.434782608695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4444444444444">
                <text:p>64.444444444444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4444444444444">
                <text:p>64.444444444444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4545454545455">
                <text:p>64.454545454545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5714285714286">
                <text:p>64.571428571428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6065573770492">
                <text:p>64.60655737704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6190476190476">
                <text:p>64.619047619047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6363636363636">
                <text:p>64.636363636363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7058823529412">
                <text:p>64.705882352941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.7692307692308">
                <text:p>64.769230769230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4.7857142857143">
                <text:p>64.785714285714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4.9230769230769">
                <text:p>64.923076923076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1363636363636">
                <text:p>65.136363636363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1428571428571">
                <text:p>65.142857142857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2222222222222">
                <text:p>65.222222222222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2857142857143">
                <text:p>65.285714285714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3571428571429">
                <text:p>65.357142857142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137931034483">
                <text:p>65.413793103448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4444444444444">
                <text:p>65.444444444444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4864864864865">
                <text:p>65.486486486486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5454545454546">
                <text:p>65.545454545454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5833333333333">
                <text:p>65.583333333333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5882352941177">
                <text:p>65.588235294117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5909090909091">
                <text:p>65.590909090909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6060606060606">
                <text:p>65.606060606060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6666666666667">
                <text:p>65.666666666666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6666666666667">
                <text:p>65.666666666666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7058823529412">
                <text:p>65.705882352941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5.7272727272727">
                <text:p>65.727272727272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5.7547169811321">
                <text:p>65.754716981132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5.7916666666667">
                <text:p>65.79166666666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5.8064516129032">
                <text:p>65.806451612903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0714285714286">
                <text:p>66.071428571428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0909090909091">
                <text:p>66.090909090909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125">
                <text:p>66.12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1363636363636">
                <text:p>66.136363636363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2173913043478">
                <text:p>66.217391304347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2307692307692">
                <text:p>66.230769230769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2307692307692">
                <text:p>66.230769230769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2666666666667">
                <text:p>66.266666666666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2916666666667">
                <text:p>66.291666666666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304347826087">
                <text:p>66.30434782608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3478260869565">
                <text:p>66.347826086956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4285714285714">
                <text:p>66.428571428571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4428571428571">
                <text:p>66.442857142857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5652173913044">
                <text:p>66.565217391304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5882352941177">
                <text:p>66.588235294117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6153846153846">
                <text:p>66.61538461538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7142857142857">
                <text:p>66.714285714285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6.7142857142857">
                <text:p>66.714285714285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6.7727272727273">
                <text:p>66.772727272727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6.7777777777778">
                <text:p>66.777777777777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6.7857142857143">
                <text:p>66.785714285714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6.8571428571429">
                <text:p>66.857142857142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6.8983050847458">
                <text:p>66.898305084745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0714285714286">
                <text:p>67.071428571428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0769230769231">
                <text:p>67.076923076923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1666666666667">
                <text:p>67.166666666666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2380952380952">
                <text:p>67.238095238095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2727272727273">
                <text:p>67.272727272727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2857142857143">
                <text:p>67.285714285714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2941176470588">
                <text:p>67.294117647058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2941176470588">
                <text:p>67.294117647058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3181818181818">
                <text:p>67.318181818181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3636363636364">
                <text:p>67.363636363636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7.4117647058823">
                <text:p>67.411764705882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7.5625">
                <text:p>67.562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7.5714285714286">
                <text:p>67.571428571428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7.5789473684211">
                <text:p>67.578947368421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7.6086956521739">
                <text:p>67.608695652173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7.625">
                <text:p>67.62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7.6315789473684">
                <text:p>67.631578947368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7.6818181818182">
                <text:p>67.681818181818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7.7368421052632">
                <text:p>67.736842105263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7.85">
                <text:p>67.8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7.8510638297872">
                <text:p>67.851063829787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7.9090909090909">
                <text:p>67.909090909090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7.9423076923077">
                <text:p>67.942307692307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7.9473684210526">
                <text:p>67.947368421052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0625">
                <text:p>68.062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0666666666667">
                <text:p>68.066666666666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0909090909091">
                <text:p>68.090909090909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1052631578947">
                <text:p>68.105263157894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8.1764705882353">
                <text:p>68.176470588235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8.2142857142857">
                <text:p>68.214285714285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8.21875">
                <text:p>68.2187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8.2222222222222">
                <text:p>68.222222222222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8.2941176470588">
                <text:p>68.294117647058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8.3571428571429">
                <text:p>68.357142857142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8.4285714285714">
                <text:p>68.428571428571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8.4545454545455">
                <text:p>68.454545454545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8.6428571428571">
                <text:p>68.64285714285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8.6818181818182">
                <text:p>68.681818181818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8.8888888888889">
                <text:p>68.888888888888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1818181818182">
                <text:p>69.181818181818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9.2424242424243">
                <text:p>69.242424242424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9.2631578947368">
                <text:p>69.263157894736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9.2857142857143">
                <text:p>69.285714285714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9.3030303030303">
                <text:p>69.303030303030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9.4166666666667">
                <text:p>69.416666666666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9.4761904761905">
                <text:p>69.476190476190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9.9047619047619">
                <text:p>69.904761904761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9.9166666666667">
                <text:p>69.91666666666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9.9583333333333">
                <text:p>69.958333333333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0869565217391">
                <text:p>70.086956521739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1176470588235">
                <text:p>70.117647058823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1851851851852">
                <text:p>70.185185185185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2173913043478">
                <text:p>70.217391304347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2222222222222">
                <text:p>70.222222222222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0.3333333333333">
                <text:p>70.33333333333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0.5555555555556">
                <text:p>70.555555555555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0.5714285714286">
                <text:p>70.571428571428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0.6086956521739">
                <text:p>70.608695652173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0.7647058823529">
                <text:p>70.764705882352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0.7777777777778">
                <text:p>70.777777777777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0.7777777777778">
                <text:p>70.777777777777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0.952380952381">
                <text:p>70.95238095238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0526315789474">
                <text:p>71.05263157894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0833333333333">
                <text:p>71.083333333333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0833333333333">
                <text:p>71.083333333333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1111111111111">
                <text:p>71.111111111111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1333333333333">
                <text:p>71.133333333333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2777777777778">
                <text:p>71.277777777777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2857142857143">
                <text:p>71.285714285714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4545454545455">
                <text:p>71.454545454545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1.5714285714286">
                <text:p>71.571428571428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1.625">
                <text:p>71.62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1.625">
                <text:p>71.6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1.7222222222222">
                <text:p>71.722222222222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1.9487179487179">
                <text:p>71.948717948717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0588235294118">
                <text:p>72.058823529411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1578947368421">
                <text:p>72.157894736842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2916666666667">
                <text:p>72.291666666666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782608695652">
                <text:p>72.478260869565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454545454546">
                <text:p>72.545454545454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945945945946">
                <text:p>72.594594594594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7142857142857">
                <text:p>72.714285714285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7291666666667">
                <text:p>72.729166666666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8333333333333">
                <text:p>72.833333333333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3.2222222222222">
                <text:p>73.222222222222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3.2432432432432">
                <text:p>73.24324324324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5555555555556">
                <text:p>73.555555555555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5555555555556">
                <text:p>73.555555555555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6666666666667">
                <text:p>73.666666666666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7857142857143">
                <text:p>73.785714285714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8571428571429">
                <text:p>73.857142857142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4.1666666666667">
                <text:p>74.166666666666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4.1785714285714">
                <text:p>74.178571428571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4.2608695652174">
                <text:p>74.260869565217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4.4814814814815">
                <text:p>74.481481481481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4.5555555555556">
                <text:p>74.555555555555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4.8333333333333">
                <text:p>74.833333333333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5.1052631578947">
                <text:p>75.105263157894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5.1666666666667">
                <text:p>75.166666666666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5.1666666666667">
                <text:p>75.166666666666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5.2142857142857">
                <text:p>75.214285714285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5.3571428571429">
                <text:p>75.357142857142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5.3846153846154">
                <text:p>75.384615384615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5.5652173913043">
                <text:p>75.565217391304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6.2272727272727">
                <text:p>76.227272727272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6.3157894736842">
                <text:p>76.315789473684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.4545454545455">
                <text:p>76.454545454545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6.6111111111111">
                <text:p>76.611111111111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7.1111111111111">
                <text:p>77.111111111111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7.1111111111111">
                <text:p>77.111111111111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7.2222222222222">
                <text:p>77.222222222222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7.5714285714286">
                <text:p>77.571428571428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7.5833333333333">
                <text:p>77.583333333333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8.0833333333333">
                <text:p>78.083333333333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8.7142857142857">
                <text:p>78.714285714285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9.0909090909091">
                <text:p>79.090909090909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9.2727272727273">
                <text:p>79.272727272727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9.4666666666667">
                <text:p>79.466666666666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0.1538461538462">
                <text:p>80.153846153846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0.6363636363636">
                <text:p>80.636363636363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0.8571428571429">
                <text:p>80.857142857142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1.2857142857143">
                <text:p>81.285714285714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1.9166666666667">
                <text:p>81.916666666666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3.1666666666667">
                <text:p>83.166666666666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3.3846153846154">
                <text:p>83.384615384615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3.4285714285714">
                <text:p>83.428571428571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3.5555555555556">
                <text:p>83.555555555555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4.5714285714286">
                <text:p>84.57142857142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85.5555555555556">
                <text:p>85.555555555555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5.7777777777778">
                <text:p>85.777777777777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86.8571428571429">
                <text:p>86.857142857142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87.1666666666667">
                <text:p>87.166666666666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87.375">
                <text:p>87.37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88.1428571428571">
                <text:p>88.142857142857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89.2857142857143">
                <text:p>89.28571428571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89.6363636363637">
                <text:p>89.636363636363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31cm" svg:height="15.003cm" xlink:href=".." xlink:type="simple" chart:class="chart:bar" chart:style-name="ch1">
        <chart:title svg:x="8.809cm" svg:y="0.436cm" chart:style-name="ch2">
          <text:p>Number of branches per support range</text:p>
        </chart:title>
        <chart:plot-area chart:style-name="ch3" table:cell-range-address="histo.A2:histo.B13" chart:data-source-has-labels="column" svg:x="1.519cm" svg:y="1.515cm" svg:width="23.404cm" svg:height="12.207cm">
          <chart:coordinate-region svg:x="2.696cm" svg:y="1.714cm" svg:width="22.227cm" svg:height="11.361cm"/>
          <chart:axis chart:dimension="x" chart:name="primary-x" chart:style-name="ch4" chartooo:axis-type="auto">
            <chartooo:date-scale/>
            <chart:title svg:x="12.132cm" svg:y="14.022cm" chart:style-name="ch5">
              <text:p>Support range</text:p>
            </chart:title>
            <chart:categories table:cell-range-address="histo.A2:histo.A13"/>
          </chart:axis>
          <chart:axis chart:dimension="y" chart:name="primary-y" chart:style-name="ch6">
            <chart:title svg:x="0.451cm" svg:y="9.514cm" chart:style-name="ch7">
              <text:p>Total number of branches</text:p>
            </chart:title>
            <chart:grid chart:style-name="ch8" chart:class="major"/>
          </chart:axis>
          <chart:series chart:style-name="ch9" chart:values-cell-range-address="histo.B2:histo.B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isto.A2:histo.A13</svg:desc>
                </draw:g>
              </table:table-cell>
              <table:table-cell office:value-type="float" office:value="8142">
                <text:p>8142</text:p>
                <draw:g>
                  <svg:desc>histo.B2:histo.B13</svg:desc>
                </draw:g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12609">
                <text:p>12609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90-99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99">
                <text:p>3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29cm" svg:height="14.472cm" xlink:href=".." xlink:type="simple" chart:class="chart:bar" chart:style-name="ch1">
        <chart:title svg:x="8.614cm" svg:y="0.425cm" chart:style-name="ch2">
          <text:p>Percentage of branches per support range</text:p>
        </chart:title>
        <chart:legend chart:legend-position="end" svg:x="23.466cm" svg:y="6.937cm" style:legend-expansion="high" chart:style-name="ch3"/>
        <chart:plot-area chart:style-name="ch4" table:cell-range-address="histo.A2:histo.A13 histo.C2:histo.C13" chart:data-source-has-labels="column" svg:x="1.525cm" svg:y="1.493cm" svg:width="21.427cm" svg:height="11.709cm">
          <chart:coordinate-region svg:x="2.437cm" svg:y="1.692cm" svg:width="20.515cm" svg:height="10.863cm"/>
          <chart:axis chart:dimension="x" chart:name="primary-x" chart:style-name="ch5" chartooo:axis-type="auto">
            <chartooo:date-scale/>
            <chart:title svg:x="11.149cm" svg:y="13.491cm" chart:style-name="ch6">
              <text:p>Support range</text:p>
            </chart:title>
            <chart:categories table:cell-range-address="histo.A2:histo.A13"/>
          </chart:axis>
          <chart:axis chart:dimension="y" chart:name="primary-y" chart:style-name="ch7">
            <chart:title svg:x="0.451cm" svg:y="8.264cm" chart:style-name="ch8">
              <text:p>% branches</text:p>
            </chart:title>
            <chart:grid chart:style-name="ch9" chart:class="major"/>
          </chart:axis>
          <chart:series chart:style-name="ch10" chart:values-cell-range-address="histo.C2:histo.C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isto.A2:histo.A13</svg:desc>
                </draw:g>
              </table:table-cell>
              <table:table-cell office:value-type="float" office:value="0.0982953447942824">
                <text:p>0.0982953447942824</text:p>
                <draw:g>
                  <svg:desc>histo.C2:histo.C13</svg:desc>
                </draw:g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152223778249952">
                <text:p>0.152223778249952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0.10056499903419">
                <text:p>0.10056499903419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0.0811401390766853">
                <text:p>0.0811401390766853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0.0754297855901101">
                <text:p>0.0754297855901101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0.0677395209580838">
                <text:p>0.0677395209580838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0.0671117442534286">
                <text:p>0.0671117442534286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0.0674014873478849">
                <text:p>0.0674014873478849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0.0646489279505505">
                <text:p>0.0646489279505505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0.0696469963299208">
                <text:p>0.0696469963299208</text:p>
              </table:table-cell>
            </table:table-row>
            <table:table-row>
              <table:table-cell office:value-type="string">
                <text:p>90-99</text:p>
              </table:table-cell>
              <table:table-cell office:value-type="float" office:value="0.114762410662546">
                <text:p>0.1147624106625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10348657523662">
                <text:p>0.04103486575236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